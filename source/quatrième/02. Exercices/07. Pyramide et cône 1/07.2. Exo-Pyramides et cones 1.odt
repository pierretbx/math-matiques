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1000002134CAA6CE9E472B029.png" manifest:media-type="image/png"/>
  <manifest:file-entry manifest:full-path="Pictures/100000000000019500000169C5DCC8E265D8AC8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OpenDyslexic" style:text-underline-style="solid" style:text-underline-width="auto" style:text-underline-color="font-color" officeooo:rsid="001bc45d" officeooo:paragraph-rsid="001bc45d"/>
    </style:style>
    <style:style style:name="P2" style:family="paragraph" style:parent-style-name="Standard">
      <style:text-properties style:font-name="OpenDyslexic" style:text-underline-style="none" officeooo:rsid="001bc45d" officeooo:paragraph-rsid="001bc45d"/>
    </style:style>
    <style:style style:name="P3" style:family="paragraph" style:parent-style-name="Standard">
      <style:text-properties style:font-name="OpenDyslexic" style:text-underline-style="none" officeooo:rsid="001bc8e3" officeooo:paragraph-rsid="001bc8e3"/>
    </style:style>
    <style:style style:name="P4" style:family="paragraph" style:parent-style-name="Table_20_Contents">
      <style:text-properties style:font-name="OpenDyslexic" officeooo:rsid="001bc45d" officeooo:paragraph-rsid="001bc4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Collège J.BREL <text:s text:c="73"/>4ème</text:p>
            <text:p text:style-name="P4">Exercices <text:s text:c="34"/>Pyramides et cônes</text:p>
          </table:table-cell>
        </table:table-row>
      </table:table>
      <text:p text:style-name="Standard"/>
      <text:p text:style-name="Standard"/>
      <text:p text:style-name="P1">Exercice 1 :</text:p>
      <text:p text:style-name="P2"><draw:frame draw:style-name="fr1" draw:name="Image1" text:anchor-type="paragraph" svg:x="-0.815cm" svg:y="0.325cm" svg:width="13.457cm" svg:height="11.148cm" draw:z-index="0"><draw:image xlink:href="Pictures/1000000000000281000002134CAA6CE9E472B029.png" xlink:type="simple" xlink:show="embed" xlink:actuate="onLoad" loext:mime-type="image/png"/></draw:frame>a. ABCDEFGH est un cube. O est le milieu de [AF].</text:p>
      <text:p text:style-name="P2">Quelle est la nature du triangle DFA ? Justifier.</text:p>
      <text:p text:style-name="P2"/>
      <text:p text:style-name="P2"/>
      <text:p text:style-name="P2">b. Sachant que AB=6cm, donnez la valeur approchée par excés au mm près de DF, AF et AO.</text:p>
      <text:p text:style-name="P2"/>
      <text:p text:style-name="P2">c. Expliquez pourquoi AO=OB=GO=HO. Quelle est la nature du solide OABGH ?</text:p>
      <text:p text:style-name="P2"/>
      <text:p text:style-name="P2">d. Construisez un patron de OABGH puis découpez-le et collez-le pour obtenir la pyramide.</text:p>
      <text:p text:style-name="P2"/>
      <text:p text:style-name="P2">e. Faites cinq autres exemplaires de cette pyramide. Avec les six pièces ainsi constituées, essayez de reformer le cube ABCDEFGH.</text:p>
      <text:p text:style-name="P2"/>
      <text:p text:style-name="P2">f. Construisez un patron du cube ABCDEFGH, collez chacune des pyramides sur une face du cube. Assemblez ensuite le cube en plaçant les pyramides à l’extérieur.</text:p>
      <text:p text:style-name="P2"><draw:frame draw:style-name="fr2" draw:name="Image2" text:anchor-type="paragraph" svg:width="10.716cm" svg:height="9.551cm" draw:z-index="1"><draw:image xlink:href="Pictures/100000000000019500000169C5DCC8E265D8AC83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g. Le solide obtenu s’appelle un dodécaèdre rhombique car chacune de ses faces est un losange. Combien a-t-il de faces ? Quel est son volume ?</text:p>
      <text:p text:style-name="P3"/>
      <text:p text:style-name="P3">h. Construisez un patron du dodécaèdre rhombique et assemblez le directe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6T21:53:29.148000000</meta:creation-date>
    <dc:date>2021-02-16T22:21:36.437000000</dc:date>
    <meta:editing-duration>PT2M26S</meta:editing-duration>
    <meta:editing-cycles>1</meta:editing-cycles>
    <meta:document-statistic meta:table-count="1" meta:image-count="2" meta:object-count="0" meta:page-count="2" meta:paragraph-count="12" meta:word-count="157" meta:character-count="1020" meta:non-whitespace-character-count="768"/>
    <meta:generator>LibreOffice/6.2.3.2$Windows_X86_64 LibreOffice_project/aecc05fe267cc68dde00352a451aa867b3b546ac</meta:generator>
  </office:meta>
</office:document-meta>
</file>