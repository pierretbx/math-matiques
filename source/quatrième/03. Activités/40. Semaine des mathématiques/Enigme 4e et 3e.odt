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T4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style:language-asian="fr" style:country-asian="FR" style:language-complex="ar" style:country-complex="SA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language-asian="fr" style:country-asian="FR" style:language-complex="ar" style:country-complex="SA"/>
    </style:style>
    <style:style style:name="T29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30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style:language-asian="fr" style:country-asian="FR" style:language-complex="ar" style:country-complex="SA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style:language-asian="fr" style:country-asian="FR" style:language-complex="ar" style:country-complex="SA"/>
    </style:style>
    <style:style style:name="T51" style:parent-style-name="Policepardéfaut" style:family="text">
      <style:text-properties style:language-asian="fr" style:country-asian="FR" style:language-complex="ar" style:country-complex="SA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-0.20433in" svg:y="-0.18268in" svg:width="3.16102in" svg:height="1.0311in" style:rel-width="scale" style:rel-height="scale"><draw:image xlink:href="media/image1.png" xlink:type="simple" xlink:show="embed" xlink:actuate="onLoad"/><svg:title/><svg:desc/></draw:frame></text:span><text:tab/><text:tab/><text:tab/><text:tab/><text:tab/></text:p>
      <text:p text:style-name="Standard"/>
      <text:p text:style-name="Standard"><text:span text:style-name="T3"><draw:frame draw:z-index="251659264" draw:style-name="a1" draw:name="Image2" text:anchor-type="paragraph" svg:x="3.02205in" svg:y="0.18071in" svg:width="4.62165in" svg:height="2.1708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ÉNIGME</text:span><text:span text:style-name="T5"><text:s/>1 </text:span><text:span text:style-name="T6">: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/text:p>
      <text:p text:style-name="Standard"><text:span text:style-name="T20"><draw:frame draw:z-index="2" draw:style-name="a2" draw:name="Image3" text:anchor-type="paragraph" svg:x="0.05827in" svg:y="0.09803in" svg:width="6.8626in" svg:height="1.54921in" style:rel-width="scale" style:rel-height="scale"><draw:image xlink:href="media/image3.png" xlink:type="simple" xlink:show="embed" xlink:actuate="onLoad"/><svg:title/><svg:desc/></draw:frame></text:span><text:tab/></text:p>
      <text:p text:style-name="Standard"/>
      <text:p text:style-name="P21"/>
      <text:p text:style-name="P22"/>
      <text:p text:style-name="P23"/>
      <text:p text:style-name="P24"/>
      <text:p text:style-name="P25"/>
      <text:p text:style-name="P26"/>
      <text:p text:style-name="Standard"><text:span text:style-name="T27">ÉNIGME 2</text:span></text:p>
      <text:p text:style-name="Standard"><text:span text:style-name="T28"><draw:frame draw:z-index="3" draw:style-name="a3" draw:name="Image4" text:anchor-type="paragraph" svg:x="0.60903in" svg:y="0.15556in" svg:width="6.26319in" svg:height="1.91944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29"><draw:frame draw:z-index="4" draw:style-name="a4" draw:name="Image5" text:anchor-type="paragraph" svg:x="0.77569in" svg:y="0.26458in" svg:width="6.82778in" svg:height="3.34028in" style:rel-width="scale" style:rel-height="scale"><draw:image xlink:href="media/image5.png" xlink:type="simple" xlink:show="embed" xlink:actuate="onLoad"/><svg:title/><svg:desc/></draw:frame></text:span><text:span text:style-name="T30">ÉNIGME</text:span><text:span text:style-name="T31"><text:s/>3 :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><text:soft-page-break/><text:span text:style-name="T43">ÉNIGME 4 :</text:span><text:tab/></text:p>
      <text:p text:style-name="Standard"><text:span text:style-name="T44"><draw:frame draw:z-index="5" draw:style-name="a5" draw:name="Image6" text:anchor-type="paragraph" svg:x="0.10551in" svg:y="0.3311in" svg:width="7.45157in" svg:height="1.55709in" style:rel-width="scale" style:rel-height="scale"><draw:image xlink:href="media/image6.png" xlink:type="simple" xlink:show="embed" xlink:actuate="onLoad"/><svg:title/><svg:desc/></draw:frame></text:span><text:tab/><text:tab/></text:p>
      <text:p text:style-name="P45"/>
      <text:p text:style-name="P46"/>
      <text:p text:style-name="P47"/>
      <text:p text:style-name="P48">ÉNIGME 5 :</text:p>
      <text:p text:style-name="P49"/>
      <text:p text:style-name="Standard">Sous la véranda, une chatte surveille ses chatons qui jouent avec des mouches et des araignées.</text:p>
      <text:p text:style-name="Standard"><text:span text:style-name="T50"><draw:frame draw:z-index="6" draw:style-name="a6" draw:name="Image7" text:anchor-type="paragraph" svg:x="5.87638in" svg:y="0.09528in" svg:width="1.61024in" svg:height="0.77638in" style:rel-width="scale" style:rel-height="scale"><draw:image xlink:href="media/image7.png" xlink:type="simple" xlink:show="embed" xlink:actuate="onLoad"/><svg:title/><svg:desc/></draw:frame></text:span>Il y a deux fois plus de mouches que d’araignées et trois araignées de plus que de chatons.</text:p>
      <text:p text:style-name="Standard">Au total, il y a 184 pattes<text:s/>sous cette véranda. (sans compter celles de la chatte)</text:p>
      <text:p text:style-name="Standard"/>
      <text:p text:style-name="Standard">Combien y-a t-il de chats, de mouches et d’araignées, sachant qu’une mouche</text:p>
      <text:p text:style-name="Standard">a 6 pattes et une araignée en a <text:s/>8 ?<text:span text:style-name="T51"><draw:frame draw:z-index="7" draw:style-name="a7" draw:name="Image8" text:anchor-type="paragraph" svg:x="4.0752in" svg:y="0.08661in" svg:width="1.08661in" svg:height="0.71811in" style:rel-width="scale" style:rel-height="scale"><draw:image xlink:href="media/image8.png" xlink:type="simple" xlink:show="embed" xlink:actuate="onLoad"/><svg:title/><svg:desc/></draw:frame></text:span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>ÉNIGME COMMUNE A TOUS LES ÉLÈVES :</text:p>
      <text:p text:style-name="Standard"><text:span text:style-name="T53"><draw:frame draw:z-index="8" draw:style-name="a8" draw:name="Image9" text:anchor-type="paragraph" svg:x="0.02087in" svg:y="0.61535in" svg:width="7.24803in" svg:height="2.18268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152in" fo:margin-left="0.3152in" fo:margin-bottom="0.3152in" fo:margin-right="0.315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stien PONSARD</meta:initial-creator>
    <dc:creator>Bastien PONSARD</dc:creator>
    <meta:creation-date>2022-03-06T15:25:00Z</meta:creation-date>
    <dc:date>2022-03-06T19:26:00Z</dc:date>
    <meta:template xlink:href="Normal.dotm" xlink:type="simple"/>
    <meta:editing-cycles>1</meta:editing-cycles>
    <meta:editing-duration>PT1680S</meta:editing-duration>
    <meta:document-statistic meta:page-count="2" meta:paragraph-count="1" meta:word-count="85" meta:character-count="554" meta:row-count="3" meta:non-whitespace-character-count="470"/>
  </office:meta>
</office:document-meta>
</file>