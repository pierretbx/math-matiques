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B000000B8068D31D10FFFA47A.png" manifest:media-type="image/png"/>
  <manifest:file-entry manifest:full-path="Pictures/1000000000000103000000A9A31C9D1A721AC883.png" manifest:media-type="image/png"/>
  <manifest:file-entry manifest:full-path="Pictures/100000000000032200000086B5333077D4E29657.png" manifest:media-type="image/png"/>
  <manifest:file-entry manifest:full-path="Pictures/1000000000000107000000B62F1CBE84C0136E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Standard">
      <style:text-properties style:font-name="OpenDyslexic"/>
    </style:style>
    <style:style style:name="P2" style:family="paragraph" style:parent-style-name="Standard" style:list-style-name="L1">
      <style:text-properties style:font-name="OpenDyslexic" style:text-underline-style="solid" style:text-underline-width="auto" style:text-underline-color="font-color" officeooo:rsid="00144547" officeooo:paragraph-rsid="00144547"/>
    </style:style>
    <style:style style:name="P3" style:family="paragraph" style:parent-style-name="Standard" style:list-style-name="L1">
      <style:text-properties style:font-name="OpenDyslexic" style:text-underline-style="solid" style:text-underline-width="auto" style:text-underline-color="font-color" officeooo:rsid="0015e3fe" officeooo:paragraph-rsid="0017b2ba"/>
    </style:style>
    <style:style style:name="P4" style:family="paragraph" style:parent-style-name="Standard" style:list-style-name="L1">
      <style:text-properties style:font-name="OpenDyslexic" style:text-underline-style="solid" style:text-underline-width="auto" style:text-underline-color="font-color" officeooo:rsid="0016410d" officeooo:paragraph-rsid="0017b2ba"/>
    </style:style>
    <style:style style:name="P5" style:family="paragraph" style:parent-style-name="Standard" style:list-style-name="L1">
      <style:text-properties style:font-name="OpenDyslexic" style:text-underline-style="solid" style:text-underline-width="auto" style:text-underline-color="font-color" officeooo:rsid="0017b2ba" officeooo:paragraph-rsid="0017b2ba"/>
    </style:style>
    <style:style style:name="P6" style:family="paragraph" style:parent-style-name="Standard" style:list-style-name="L1">
      <style:text-properties style:text-underline-style="solid" style:text-underline-width="auto" style:text-underline-color="font-color" officeooo:rsid="0017b2ba" officeooo:paragraph-rsid="0017b2ba"/>
    </style:style>
    <style:style style:name="P7" style:family="paragraph" style:parent-style-name="Standard" style:list-style-name="L1">
      <style:text-properties style:text-underline-style="solid" style:text-underline-width="auto" style:text-underline-color="font-color" officeooo:rsid="001940c2" officeooo:paragraph-rsid="001940c2"/>
    </style:style>
    <style:style style:name="P8" style:family="paragraph" style:parent-style-name="Table_20_Contents">
      <style:text-properties style:font-name="OpenDyslexic" officeooo:rsid="00144547" officeooo:paragraph-rsid="00144547"/>
    </style:style>
    <style:style style:name="P9" style:family="paragraph" style:parent-style-name="Table_20_Contents">
      <style:text-properties style:font-name="OpenDyslexic" officeooo:rsid="0015e3fe" officeooo:paragraph-rsid="0017b2ba"/>
    </style:style>
    <style:style style:name="P10" style:family="paragraph" style:parent-style-name="Table_20_Contents">
      <style:text-properties style:font-name="OpenDyslexic" officeooo:rsid="0016410d" officeooo:paragraph-rsid="0017b2ba"/>
    </style:style>
    <style:style style:name="P11" style:family="paragraph" style:parent-style-name="Table_20_Contents">
      <style:text-properties style:font-name="OpenDyslexic" officeooo:rsid="0017b2ba" officeooo:paragraph-rsid="0017b2ba"/>
    </style:style>
    <style:style style:name="P12" style:family="paragraph" style:parent-style-name="Table_20_Contents">
      <style:text-properties style:font-name="OpenDyslexic" officeooo:rsid="000692c1" officeooo:paragraph-rsid="00144547"/>
    </style:style>
    <style:style style:name="T1" style:family="text">
      <style:text-properties officeooo:rsid="000d6c80"/>
    </style:style>
    <style:style style:name="T2" style:family="text">
      <style:text-properties officeooo:rsid="00144547"/>
    </style:style>
    <style:style style:name="T3" style:family="text">
      <style:text-properties style:text-underline-style="none"/>
    </style:style>
    <style:style style:name="T4" style:family="text">
      <style:text-properties style:text-underline-style="none" officeooo:rsid="0017b2ba"/>
    </style:style>
    <style:style style:name="T5" style:family="text">
      <style:text-properties officeooo:rsid="0017b2ba"/>
    </style:style>
    <style:style style:name="T6" style:family="text">
      <style:text-properties style:font-name="OpenDyslexic"/>
    </style:style>
    <style:style style:name="T7" style:family="text">
      <style:text-properties style:font-name="OpenDyslexic" style:text-underline-style="none"/>
    </style:style>
    <style:style style:name="T8" style:family="text">
      <style:text-properties officeooo:rsid="001940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12">Collège <text:span text:style-name="T2">J.Brel</text:span> <text:s text:c="73"/><text:span text:style-name="T2">4 </text:span>ème<text:line-break/><text:span text:style-name="T1">Cours </text:span><text:s text:c="17"/>Chapitre <text:span text:style-name="T1">2</text:span> : <text:span text:style-name="T2">Pythagore</text:span></text:p>
          </table:table-cell>
        </table:table-row>
      </table:table>
      <text:p text:style-name="P1"/>
      <text:list xml:id="list1025146769" text:style-name="L1">
        <text:list-item>
          <text:p text:style-name="P2">Vocabulaire<text:line-break/><text:span text:style-name="T3"><text:line-break/></text:span>Définition :<text:span text:style-name="T3"> </text:span></text:p>
        </text:list-item>
      </text:list>
      <table:table table:name="Tableau2" table:style-name="Tableau2">
        <table:table-column table:style-name="Tableau2.A"/>
        <table:table-row>
          <table:table-cell table:style-name="Tableau2.A1" office:value-type="string">
            <text:p text:style-name="P8">Dans un triangle rectangle, l’hypoténuse est le ……………………………………..<text:line-break/>…………………………………………………………………………………………………………..</text:p>
          </table:table-cell>
        </table:table-row>
      </table:table>
      <text:list xml:id="list212456232804067" text:continue-numbering="true" text:style-name="L1">
        <text:list-header>
          <text:p text:style-name="P2"><draw:frame draw:style-name="fr1" draw:name="Image1" text:anchor-type="paragraph" svg:x="11.478cm" svg:y="0.423cm" svg:width="6.218cm" svg:height="4.868cm" draw:z-index="0"><draw:image xlink:href="Pictures/10000000000000EB000000B8068D31D10FFFA47A.png" xlink:type="simple" xlink:show="embed" xlink:actuate="onLoad" loext:mime-type="image/png"/></draw:frame>Exemple :<text:line-break/><text:span text:style-name="T3">Sur le dessin suivant :<text:line-break/>-le triangle ABC est …………….</text:span></text:p>
          <text:p text:style-name="P2"><text:span text:style-name="T3">-le côté [BC] est …………………………….<text:line-break/><text:line-break/><text:line-break/><text:line-break/></text:span></text:p>
        </text:list-header>
        <text:list-item>
          <text:p text:style-name="P3">Propriété du triangle rectangle<text:line-break/>Propriété :</text:p>
        </text:list-item>
      </text:list>
      <table:table table:name="Tableau3" table:style-name="Tableau3">
        <table:table-column table:style-name="Tableau3.A"/>
        <table:table-row>
          <table:table-cell table:style-name="Tableau3.A1" office:value-type="string">
            <text:p text:style-name="P9">Si un triangle est rectangle, alors le carré de ………………………………………..<text:line-break/>…………………………………………………………………………………………………………...</text:p>
          </table:table-cell>
        </table:table-row>
      </table:table>
      <text:list xml:id="list212455531543582" text:continue-numbering="true" text:style-name="L1">
        <text:list-header>
          <text:p text:style-name="P4">Exemple :<text:span text:style-name="T3"> Le triangle ABC est rectangle en A.<text:line-break/>L’hypoténuse de ce triangle est le côté [BC], on a donc l’égalité :<text:line-break/><text:line-break/></text:span>Vocabulaire :</text:p>
        </text:list-header>
      </text:list>
      <table:table table:name="Tableau4" table:style-name="Tableau4">
        <table:table-column table:style-name="Tableau4.A"/>
        <table:table-row>
          <table:table-cell table:style-name="Tableau4.A1" office:value-type="string">
            <text:p text:style-name="P10">Dans le triangle ABC rectangle en A, l’égalité ……………………………………….<text:line-break/>…………………………………………………………………………………………………………..</text:p>
          </table:table-cell>
        </table:table-row>
      </table:table>
      <text:list xml:id="list212455445048329" text:continue-numbering="true" text:style-name="L1">
        <text:list-header>
          <text:p text:style-name="P4"><draw:frame draw:style-name="fr1" draw:name="Image2" text:anchor-type="paragraph" svg:x="5.525cm" svg:y="1.614cm" svg:width="6.853cm" svg:height="4.471cm" draw:z-index="1"><draw:image xlink:href="Pictures/1000000000000103000000A9A31C9D1A721AC883.png" xlink:type="simple" xlink:show="embed" xlink:actuate="onLoad" loext:mime-type="image/png"/></draw:frame>Remarque :<text:span text:style-name="T3"> Dans un triangle rectangle, l’égalité de Pythagore permet de calculer la longueur d’un côté connaissant les longueurs des deux autres côtés.</text:span></text:p>
          <text:p text:style-name="P4"><text:span text:style-name="T3"/></text:p>
          <text:p text:style-name="P4"><text:span text:style-name="T3"/></text:p>
          <text:p text:style-name="P4"><text:span text:style-name="T3"/></text:p>
          <text:p text:style-name="P3"><draw:frame draw:style-name="fr1" draw:name="Image4" text:anchor-type="paragraph" svg:x="-2cm" svg:y="1.588cm" svg:width="20.999cm" svg:height="2.84cm" draw:z-index="2"><draw:image xlink:href="Pictures/100000000000032200000086B5333077D4E29657.png" xlink:type="simple" xlink:show="embed" xlink:actuate="onLoad" loext:mime-type="image/png"/></draw:frame><text:soft-page-break/><text:span text:style-name="T5">Exemple :</text:span><text:span text:style-name="T4"> Le triangle EFG est rectangle en E, donc on a l’égalité de Pythagore :<text:line-break/></text:span></text:p>
        </text:list-header>
        <text:list-item>
          <text:p text:style-name="P5">Comment reconnaître un triangle rectangle</text:p>
          <text:p text:style-name="P6"><text:span text:style-name="T6">Propriété :</text:span><text:span text:style-name="T7"><text:line-break/></text:span></text:p>
        </text:list-item>
      </text:list>
      <table:table table:name="Tableau5" table:style-name="Tableau5">
        <table:table-column table:style-name="Tableau5.A"/>
        <table:table-row>
          <table:table-cell table:style-name="Tableau5.A1" office:value-type="string">
            <text:p text:style-name="P11">Pour déterminer si un triangle est rectangle ou non, on compare le carré de la longueur de son plus grand côté avec la somme des carrés des longueurs de ses deux autres côtés.<text:line-break/>- Si ces deux nombres sont égaux, on a l’égalité de Pythagore, donc le triangle est rectangle.<text:line-break/>- Sinon, on n’a pas <text:span text:style-name="T8">l’égalité de Pythagore, donc le triangle n’est pas rectangle.</text:span></text:p>
          </table:table-cell>
        </table:table-row>
      </table:table>
      <text:list xml:id="list212455581751340" text:continue-numbering="true" text:style-name="L1">
        <text:list-header>
          <text:p text:style-name="P7"><text:span text:style-name="T6">Exemple :</text:span></text:p>
          <text:p text:style-name="P7"><draw:frame draw:style-name="fr1" draw:name="Image3" text:anchor-type="paragraph" svg:x="1.609cm" svg:y="0.847cm" svg:width="6.959cm" svg:height="4.815cm" draw:z-index="3"><draw:image xlink:href="Pictures/1000000000000107000000B62F1CBE84C0136E2A.png" xlink:type="simple" xlink:show="embed" xlink:actuate="onLoad" loext:mime-type="image/png"/></draw:frame><draw:frame draw:style-name="fr1" draw:name="Image5" text:anchor-type="paragraph" svg:x="-2cm" svg:y="6.059cm" svg:width="20.999cm" svg:height="2.84cm" draw:z-index="4"><draw:image xlink:href="Pictures/100000000000032200000086B5333077D4E29657.png" xlink:type="simple" xlink:show="embed" xlink:actuate="onLoad" loext:mime-type="image/png"/></draw:frame><text:span text:style-name="T7">On veut savoir si le triangle NOP est rectangle.<text:line-break/></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7:01:06.905000000</meta:creation-date>
    <dc:date>2020-09-14T21:24:54.692000000</dc:date>
    <meta:editing-duration>PT7M6S</meta:editing-duration>
    <meta:editing-cycles>1</meta:editing-cycles>
    <meta:document-statistic meta:table-count="5" meta:image-count="5" meta:object-count="0" meta:page-count="2" meta:paragraph-count="16" meta:word-count="213" meta:character-count="1457" meta:non-whitespace-character-count="1163"/>
    <meta:generator>LibreOffice/6.2.3.2$Windows_X86_64 LibreOffice_project/aecc05fe267cc68dde00352a451aa867b3b546ac</meta:generator>
  </office:meta>
</office:document-meta>
</file>