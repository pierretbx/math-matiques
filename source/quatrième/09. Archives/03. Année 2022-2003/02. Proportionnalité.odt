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E1000000F0429EE2C074948DBC.png" manifest:media-type="image/png"/>
  <manifest:file-entry manifest:full-path="Pictures/10000000000003E0000001164C9A7104C833BB84.png" manifest:media-type="image/png"/>
  <manifest:file-entry manifest:full-path="Pictures/10000000000003E10000007880BC29437C9F9B56.png" manifest:media-type="image/png"/>
  <manifest:file-entry manifest:full-path="Pictures/100000000000017D000001DEBD58C83E59E8BDE5.png" manifest:media-type="image/png"/>
  <manifest:file-entry manifest:full-path="Pictures/100000000000020C0000014278CC03AB3805A479.png" manifest:media-type="image/png"/>
  <manifest:file-entry manifest:full-path="Pictures/10000000000002200000019B674216DB875C3D3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4" style:family="table">
      <style:table-properties style:width="4.001cm" table:align="right" fo:background-color="transparent">
        <style:background-image/>
      </style:table-properties>
    </style:style>
    <style:style style:name="Tableau4.A" style:family="table-column">
      <style:table-column-properties style:column-width="2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189cm" table:align="center"/>
    </style:style>
    <style:style style:name="Tableau5.A" style:family="table-column">
      <style:table-column-properties style:column-width="2.988cm"/>
    </style:style>
    <style:style style:name="Tableau5.B" style:family="table-column">
      <style:table-column-properties style:column-width="1.508cm"/>
    </style:style>
    <style:style style:name="Tableau5.C" style:family="table-column">
      <style:table-column-properties style:column-width="1.69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Dyslexic" style:text-underline-style="solid" style:text-underline-width="auto" style:text-underline-color="font-color" officeooo:rsid="000692c1" officeooo:paragraph-rsid="000692c1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96c9d" officeooo:paragraph-rsid="00096c9d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a30cb" officeooo:paragraph-rsid="000a30cb"/>
    </style:style>
    <style:style style:name="P4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0bfb1a" officeooo:paragraph-rsid="000bfb1a"/>
    </style:style>
    <style:style style:name="P5" style:family="paragraph" style:parent-style-name="Standard">
      <style:text-properties style:font-name="OpenDyslexic" style:text-underline-style="none" fo:font-weight="normal" officeooo:rsid="00086d18" officeooo:paragraph-rsid="00086d18" style:font-weight-asian="normal" style:font-weight-complex="normal"/>
    </style:style>
    <style:style style:name="P6" style:family="paragraph" style:parent-style-name="Standard">
      <style:text-properties style:font-name="OpenDyslexic" fo:font-style="normal" style:text-underline-style="none" fo:font-weight="normal" officeooo:rsid="000a30cb" officeooo:paragraph-rsid="00096c9d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OpenDyslexic" fo:font-style="normal" style:text-underline-style="none" fo:font-weight="normal" officeooo:rsid="000bfb1a" officeooo:paragraph-rsid="000a30cb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Dyslexic" fo:font-style="normal" style:text-underline-style="none" officeooo:rsid="000cb151" officeooo:paragraph-rsid="000cb151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OpenDyslexic" fo:font-style="normal" style:text-underline-style="solid" style:text-underline-width="auto" style:text-underline-color="font-color" officeooo:rsid="000da0dd" officeooo:paragraph-rsid="000da0dd" style:font-style-asian="normal" style:font-style-complex="normal"/>
    </style:style>
    <style:style style:name="P10" style:family="paragraph" style:parent-style-name="Standard">
      <style:text-properties officeooo:paragraph-rsid="000dccfb"/>
    </style:style>
    <style:style style:name="P11" style:family="paragraph" style:parent-style-name="Table_20_Contents">
      <style:text-properties style:font-name="OpenDyslexic" officeooo:rsid="000692c1" officeooo:paragraph-rsid="000692c1"/>
    </style:style>
    <style:style style:name="P12" style:family="paragraph" style:parent-style-name="Table_20_Contents">
      <style:paragraph-properties fo:text-align="center" style:justify-single-word="false"/>
      <style:text-properties style:font-name="OpenDyslexic" officeooo:rsid="00086d18" officeooo:paragraph-rsid="00086d18"/>
    </style:style>
    <style:style style:name="P13" style:family="paragraph" style:parent-style-name="Table_20_Contents">
      <style:paragraph-properties fo:text-align="center" style:justify-single-word="false"/>
      <style:text-properties style:font-name="OpenDyslexic" officeooo:rsid="00096c9d" officeooo:paragraph-rsid="00096c9d"/>
    </style:style>
    <style:style style:name="P14" style:family="paragraph" style:parent-style-name="Table_20_Contents">
      <style:text-properties style:font-name="OpenDyslexic" officeooo:rsid="000bfb1a" officeooo:paragraph-rsid="000bfb1a"/>
    </style:style>
    <style:style style:name="P15" style:family="paragraph" style:parent-style-name="Table_20_Contents">
      <style:paragraph-properties fo:text-align="center" style:justify-single-word="false"/>
      <style:text-properties style:font-name="OpenDyslexic" officeooo:rsid="000bfb1a" officeooo:paragraph-rsid="000bfb1a"/>
    </style:style>
    <style:style style:name="P16" style:family="paragraph" style:parent-style-name="Standard" style:list-style-name="L1">
      <style:text-properties style:font-name="OpenDyslexic" style:text-underline-style="solid" style:text-underline-width="auto" style:text-underline-color="font-color" officeooo:rsid="000692c1" officeooo:paragraph-rsid="000692c1"/>
    </style:style>
    <style:style style:name="P17" style:family="paragraph" style:parent-style-name="Standard" style:list-style-name="L1">
      <style:text-properties style:font-name="OpenDyslexic" style:text-underline-style="none" fo:font-weight="normal" officeooo:rsid="00086d18" officeooo:paragraph-rsid="00086d18" style:font-weight-asian="normal" style:font-weight-complex="normal"/>
    </style:style>
    <style:style style:name="P18" style:family="paragraph" style:parent-style-name="Standard" style:list-style-name="L1">
      <style:text-properties style:font-name="OpenDyslexic" style:text-underline-style="none" fo:font-weight="normal" officeooo:rsid="000692c1" officeooo:paragraph-rsid="000692c1" style:font-weight-asian="normal" style:font-weight-complex="normal"/>
    </style:style>
    <style:style style:name="P19" style:family="paragraph" style:parent-style-name="Standard">
      <style:text-properties style:font-name="OpenDyslexic" style:text-underline-style="none" officeooo:rsid="000da0dd" officeooo:paragraph-rsid="000dccfb"/>
    </style:style>
    <style:style style:name="P20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086d18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86d18" style:font-weight-asian="normal" style:font-weight-complex="normal"/>
    </style:style>
    <style:style style:name="T6" style:family="text">
      <style:text-properties style:text-underline-style="none" officeooo:rsid="00086d18"/>
    </style:style>
    <style:style style:name="T7" style:family="text">
      <style:text-properties fo:font-weight="normal" officeooo:rsid="00086d18" style:font-weight-asian="normal" style:font-weight-complex="normal"/>
    </style:style>
    <style:style style:name="T8" style:family="text">
      <style:text-properties officeooo:rsid="00086d18"/>
    </style:style>
    <style:style style:name="T9" style:family="text">
      <style:text-properties fo:font-style="italic" style:text-underline-style="none" fo:font-weight="normal" officeooo:rsid="00086d18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86d18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cb151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0a30cb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0bfb1a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font-name="OpenDyslexic" style:text-underline-style="solid" style:text-underline-width="auto" style:text-underline-color="font-color" officeooo:rsid="000692c1"/>
    </style:style>
    <style:style style:name="T21" style:family="text">
      <style:text-properties style:font-name="OpenDyslexic" style:text-underline-style="none" officeooo:rsid="000da0dd"/>
    </style:style>
    <style:style style:name="T22" style:family="text">
      <style:text-properties officeooo:rsid="0010747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2" svg:x="16.016cm" svg:y="2.138cm" svg:width="4.242cm" draw:z-index="0">
        <draw:text-box fo:min-height="2.277cm">
          <table:table table:name="Tableau4" table:style-name="Tableau4">
            <table:table-column table:style-name="Tableau4.A" table:number-columns-repeated="2"/>
            <table:table-row table:style-name="Tableau4.1">
              <table:table-cell table:style-name="Tableau4.A1" office:value-type="string">
                <text:p text:style-name="P13"><draw:line text:anchor-type="paragraph" draw:z-index="1" draw:name="Forme1" draw:style-name="gr1" draw:text-style-name="P20" svg:x1="1.057cm" svg:y1="1.434cm" svg:x2="2.724cm" svg:y2="0.243cm"><text:p/></draw:line><draw:line text:anchor-type="paragraph" draw:z-index="2" draw:name="Forme2" draw:style-name="gr1" draw:text-style-name="P20" svg:x1="1.057cm" svg:y1="0.217cm" svg:x2="2.645cm" svg:y2="1.434cm"><text:p/></draw:line>a</text:p>
              </table:table-cell>
              <table:table-cell table:style-name="Tableau4.B1" office:value-type="string">
                <text:p text:style-name="P13">c</text:p>
              </table:table-cell>
            </table:table-row>
            <table:table-row>
              <table:table-cell table:style-name="Tableau4.A2" office:value-type="string">
                <text:p text:style-name="P13">b</text:p>
              </table:table-cell>
              <table:table-cell table:style-name="Tableau4.B2" office:value-type="string">
                <text:p text:style-name="P13">x</text:p>
              </table:table-cell>
            </table:table-row>
          </table:table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ollège J.<text:span text:style-name="T22">FERRY</text:span> <text:s text:c="71"/>4ème<text:line-break/>Cours <text:s text:c="23"/>Chapitre 1 : Proportionnalité 1</text:p>
          </table:table-cell>
        </table:table-row>
      </table:table>
      <text:p text:style-name="Standard"/>
      <text:p text:style-name="Standard"/>
      <text:list xml:id="list1996656948" text:style-name="L1">
        <text:list-item>
          <text:p text:style-name="P16">Grandeurs proportionnelles</text:p>
        </text:list-item>
      </text:list>
      <text:p text:style-name="P1">Reconnaître un tableau de proportionnalité<text:line-break/><text:line-break/>Définition :<text:span text:style-name="T1"> Un tableau de nombres relève d’une situation de proportionnalité si un même coefficient (non nul) multiplicateur s’applique dans tout le tableau. On parle alors de </text:span><text:span text:style-name="T2">coefficient de proportionnalité</text:span><text:span text:style-name="T4">.<text:line-break/><text:line-break/></text:span><text:span text:style-name="T7">Exemples :</text:span><text:span text:style-name="T5"> Ces tableaux de nombres sont-ils des tableaux de proportionnalité ?<text:line-break/></text:span></text:p>
      <text:list xml:id="list84832335709189" text:continue-numbering="true" text:style-name="L1">
        <text:list-item>
          <text:list>
            <text:list-header>
              <text:p text:style-name="P17">a. </text:p>
            </text:list-header>
          </text:list>
        </text:list-item>
      </text:list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12">5</text:p>
          </table:table-cell>
          <table:table-cell table:style-name="Tableau2.A1" office:value-type="string">
            <text:p text:style-name="P12">8</text:p>
          </table:table-cell>
          <table:table-cell table:style-name="Tableau2.A1" office:value-type="string">
            <text:p text:style-name="P12">14</text:p>
          </table:table-cell>
          <table:table-cell table:style-name="Tableau2.A1" office:value-type="string">
            <text:p text:style-name="P12">19</text:p>
          </table:table-cell>
          <table:table-cell table:style-name="Tableau2.E1" office:value-type="string">
            <text:p text:style-name="P12">24</text:p>
          </table:table-cell>
        </table:table-row>
        <table:table-row>
          <table:table-cell table:style-name="Tableau2.A2" office:value-type="string">
            <text:p text:style-name="P12">12</text:p>
          </table:table-cell>
          <table:table-cell table:style-name="Tableau2.A2" office:value-type="string">
            <text:p text:style-name="P12">19,2</text:p>
          </table:table-cell>
          <table:table-cell table:style-name="Tableau2.A2" office:value-type="string">
            <text:p text:style-name="P12">33,6</text:p>
          </table:table-cell>
          <table:table-cell table:style-name="Tableau2.A2" office:value-type="string">
            <text:p text:style-name="P12">45,6</text:p>
          </table:table-cell>
          <table:table-cell table:style-name="Tableau2.E2" office:value-type="string">
            <text:p text:style-name="P12">57,6</text:p>
          </table:table-cell>
        </table:table-row>
      </table:table>
      <text:list xml:id="list84832424434724" text:continue-numbering="true" text:style-name="L1">
        <text:list-item>
          <text:list>
            <text:list-header>
              <text:p text:style-name="P17"><text:line-break/><text:line-break/><text:line-break/><text:line-break/>b.</text:p>
            </text:list-header>
          </text:list>
        </text:list-item>
      </text:list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12">12</text:p>
          </table:table-cell>
          <table:table-cell table:style-name="Tableau3.A1" office:value-type="string">
            <text:p text:style-name="P12">18</text:p>
          </table:table-cell>
          <table:table-cell table:style-name="Tableau3.A1" office:value-type="string">
            <text:p text:style-name="P12">32</text:p>
          </table:table-cell>
          <table:table-cell table:style-name="Tableau3.A1" office:value-type="string">
            <text:p text:style-name="P12">27</text:p>
          </table:table-cell>
          <table:table-cell table:style-name="Tableau3.E1" office:value-type="string">
            <text:p text:style-name="P12">54</text:p>
          </table:table-cell>
        </table:table-row>
        <table:table-row>
          <table:table-cell table:style-name="Tableau3.A2" office:value-type="string">
            <text:p text:style-name="P12">8</text:p>
          </table:table-cell>
          <table:table-cell table:style-name="Tableau3.A2" office:value-type="string">
            <text:p text:style-name="P12">12</text:p>
          </table:table-cell>
          <table:table-cell table:style-name="Tableau3.A2" office:value-type="string">
            <text:p text:style-name="P12">20</text:p>
          </table:table-cell>
          <table:table-cell table:style-name="Tableau3.A2" office:value-type="string">
            <text:p text:style-name="P12">18</text:p>
          </table:table-cell>
          <table:table-cell table:style-name="Tableau3.E2" office:value-type="string">
            <text:p text:style-name="P12">36</text:p>
          </table:table-cell>
        </table:table-row>
      </table:table>
      <text:p text:style-name="P5"><text:line-break/><text:line-break/><text:line-break/></text:p>
      <text:list xml:id="list84830797346548" text:continue-numbering="true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1">Quatrième proportionnelle<text:line-break/><text:span text:style-name="T8">Propriété :</text:span><text:span text:style-name="T6"> Dans une situation de proportionnalité, la </text:span><text:span text:style-name="T3">quatrième proportionnelle</text:span><text:span text:style-name="T5"> est le nombre (x) calculé à partir de 3 autres nombres déjà connus (</text:span><text:span text:style-name="T9">a,b </text:span><text:span text:style-name="T13">et </text:span><text:span text:style-name="T9">c</text:span><text:span text:style-name="T13">). Le tableau ci-</text:span><text:span text:style-name="T14">dessous</text:span><text:span text:style-name="T13"> est un tableau de proportionnalité.</text:span></text:p>
      <text:p text:style-name="P2"><text:soft-page-break/><text:span text:style-name="T13">O</text:span><text:span text:style-name="T12">n a : </text:span><text:span text:style-name="T12"><draw:frame draw:style-name="fr5" draw:name="Objet1" text:anchor-type="as-char" svg:y="-0.891cm" svg:width="1.304cm" svg:height="1.54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5"><text:s text:c="7"/></text:span><text:span text:style-name="T16">a,b et c sont différents de zéro.<text:line-break/>Et donc : </text:span><text:span text:style-name="T16"><draw:frame draw:style-name="fr5" draw:name="Objet2" text:anchor-type="as-char" svg:y="-0.527cm" svg:width="2.348cm" svg:height="0.739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6"><text:s/>(égalités des produits en croix)</text:span></text:p>
      <text:p text:style-name="P6"/>
      <text:p text:style-name="P6"/>
      <text:p text:style-name="P3"><text:span text:style-name="T19">Exemple :</text:span><text:span text:style-name="T15"> Calcule le prix </text:span><text:span text:style-name="T10">x</text:span><text:span text:style-name="T15"> de trois</text:span><draw:frame draw:style-name="fr2" draw:name="Cadre2" text:anchor-type="char" svg:x="10.735cm" svg:y="0.467cm" svg:width="6.907cm" draw:z-index="5"><draw:text-box fo:min-height="2.965cm"><table:table table:name="Tableau5" table:style-name="Tableau5"><table:table-column table:style-name="Tableau5.A"/><table:table-column table:style-name="Tableau5.B"/><table:table-column table:style-name="Tableau5.C"/><table:table-row><table:table-cell table:style-name="Tableau5.A1" office:value-type="string"><text:p text:style-name="P14">Nombre de baguettes</text:p></table:table-cell><table:table-cell table:style-name="Tableau5.A1" office:value-type="string"><text:p text:style-name="P15">5</text:p></table:table-cell><table:table-cell table:style-name="Tableau5.C1" office:value-type="string"><text:p text:style-name="P15">3</text:p></table:table-cell></table:table-row><table:table-row><table:table-cell table:style-name="Tableau5.A2" office:value-type="string"><text:p text:style-name="P14">Prix en €</text:p></table:table-cell><table:table-cell table:style-name="Tableau5.A2" office:value-type="string"><text:p text:style-name="P15">4,25</text:p></table:table-cell><table:table-cell table:style-name="Tableau5.C2" office:value-type="string"><text:p text:style-name="P15">x</text:p></table:table-cell></table:table-row></table:table></draw:text-box></draw:frame><text:span text:style-name="T15"> </text:span><text:span text:style-name="T17">baguettes grâce au tableau de proportionnalité suivant.<text:line-break/></text:span></text:p>
      <text:p text:style-name="P7"/>
      <text:p text:style-name="P7"><draw:frame draw:style-name="fr3" draw:name="Image2" text:anchor-type="paragraph" svg:width="20.876cm" svg:height="2.053cm" draw:z-index="8"><draw:image xlink:href="Pictures/10000000000003E10000007880BC29437C9F9B56.png" xlink:type="simple" xlink:show="embed" xlink:actuate="onLoad" loext:mime-type="image/png"/></draw:frame></text:p>
      <text:p text:style-name="P7"/>
      <text:list xml:id="list84832238293080" text:continue-numbering="true" text:style-name="L1">
        <text:list-item>
          <text:p text:style-name="P16">Caractérisation</text:p>
          <text:list>
            <text:list-item>
              <text:p text:style-name="P16">Représentation Graphique</text:p>
            </text:list-item>
          </text:list>
        </text:list-item>
      </text:list>
      <text:p text:style-name="P4">Propriété :<text:span text:style-name="T1"> Si on représente, dans un repère, une situation de proportionnalité alors on obtient des points alignés avec l’origine du repère.<text:line-break/>Exemple 1 : Le périmètre </text:span><text:span text:style-name="T11">p</text:span><text:span text:style-name="T18"> d’un carré est proportionnel à son côté </text:span><text:span text:style-name="T11">c</text:span><text:span text:style-name="T18"> puisqu’on a </text:span><text:span text:style-name="T18"><draw:frame draw:style-name="fr5" draw:name="Objet3" text:anchor-type="as-char" svg:y="-0.527cm" svg:width="1.399cm" svg:height="0.739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8">.</text:span></text:p>
      <text:p text:style-name="P8">Représente graphiquement le périmètre en fonction du côté.</text:p>
      <text:p text:style-name="P9"><draw:frame draw:style-name="fr3" draw:name="Image1" text:anchor-type="paragraph" svg:width="20.853cm" svg:height="5.179cm" draw:z-index="7"><draw:image xlink:href="Pictures/10000000000003E0000001164C9A7104C833BB84.png" xlink:type="simple" xlink:show="embed" xlink:actuate="onLoad" loext:mime-type="image/png"/></draw:frame>Propriété :<text:span text:style-name="T1"> Si une situation est représentée par des points alignés avec l’origine du repère alors c’est une situation de proportionnalité.</text:span></text:p>
      <text:p text:style-name="P10"><draw:frame draw:style-name="fr4" draw:name="Image5" text:anchor-type="paragraph" svg:x="13.804cm" svg:y="0.894cm" svg:width="4.771cm" svg:height="5.985cm" draw:z-index="11"><draw:image xlink:href="Pictures/100000000000017D000001DEBD58C83E59E8BDE5.png" xlink:type="simple" xlink:show="embed" xlink:actuate="onLoad" loext:mime-type="image/png"/></draw:frame><text:soft-page-break/><text:span text:style-name="T20">Exemples Graphiques<text:line-break/></text:span><text:span text:style-name="T21">Exemple : Ces graphiques représentent-ils des situations de proportionnalité ? Justifie</text:span></text:p>
      <text:p text:style-name="P19"><draw:frame draw:style-name="fr4" draw:name="Image3" text:anchor-type="paragraph" svg:x="0.109cm" svg:y="0.397cm" svg:width="6.262cm" svg:height="3.849cm" draw:z-index="9"><draw:image xlink:href="Pictures/100000000000020C0000014278CC03AB3805A479.png" xlink:type="simple" xlink:show="embed" xlink:actuate="onLoad" loext:mime-type="image/png"/></draw:frame><draw:frame draw:style-name="fr4" draw:name="Image4" text:anchor-type="paragraph" svg:x="6.581cm" svg:y="0.318cm" svg:width="6.167cm" svg:height="3.868cm" draw:z-index="10"><draw:image xlink:href="Pictures/10000000000002200000019B674216DB875C3D35.png" xlink:type="simple" xlink:show="embed" xlink:actuate="onLoad" loext:mime-type="image/png"/></draw:frame></text:p>
      <text:p text:style-name="P19"><text:line-break/></text:p>
      <text:p text:style-name="P19"/>
      <text:p text:style-name="P19"/>
      <text:p text:style-name="P19"/>
      <text:p text:style-name="P19"/>
      <text:p text:style-name="P19"><draw:frame draw:style-name="fr3" draw:name="Image6" text:anchor-type="paragraph" svg:width="20.876cm" svg:height="4.341cm" draw:z-index="12"><draw:image xlink:href="Pictures/10000000000003E1000000F0429EE2C074948D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21:19:42.497000000</meta:creation-date>
    <dc:date>2021-09-06T08:48:29.866000000</dc:date>
    <meta:editing-duration>P1DT10H9M42S</meta:editing-duration>
    <meta:editing-cycles>3</meta:editing-cycles>
    <meta:generator>LibreOffice/6.2.3.2$Windows_X86_64 LibreOffice_project/aecc05fe267cc68dde00352a451aa867b3b546ac</meta:generator>
    <meta:document-statistic meta:table-count="5" meta:image-count="6" meta:object-count="3" meta:page-count="3" meta:paragraph-count="46" meta:word-count="250" meta:character-count="1610" meta:non-whitespace-character-count="1292"/>
  </office:meta>
</office:document-meta>
</file>

<file path=Object 1/content.xml><?xml version="1.0" encoding="utf-8"?>
<math xmlns="http://www.w3.org/1998/Math/MathML" display="block">
  <semantics>
    <mrow>
      <mfrac>
        <mi>a</mi>
        <mi>b</mi>
      </mfrac>
      <mo stretchy="false">=</mo>
      <mfrac>
        <mi>x</mi>
        <mi>c</mi>
      </mfrac>
    </mrow>
    <annotation encoding="StarMath 5.0">{a} over {b}= {x} over {c}  </annotation>
  </semantics>
</math>
</file>

<file path=Object 2/content.xml><?xml version="1.0" encoding="utf-8"?>
<math xmlns="http://www.w3.org/1998/Math/MathML" display="block">
  <semantics>
    <mrow>
      <mrow>
        <mi>a</mi>
        <mo stretchy="false">×</mo>
        <mi>x</mi>
      </mrow>
      <mo stretchy="false">=</mo>
      <mrow>
        <mi>b</mi>
        <mo stretchy="false">×</mo>
        <mi>c</mi>
      </mrow>
    </mrow>
    <annotation encoding="StarMath 5.0">a times x  = b times c</annotation>
  </semantics>
</math>
</file>

<file path=Object 3/content.xml><?xml version="1.0" encoding="utf-8"?>
<math xmlns="http://www.w3.org/1998/Math/MathML" display="block">
  <semantics>
    <mrow>
      <mrow>
        <mi>p</mi>
        <mo stretchy="false">=</mo>
        <mn>4</mn>
      </mrow>
      <mi>c</mi>
    </mrow>
    <annotation encoding="StarMath 5.0">p=4c</annotation>
  </semantics>
</math>
</file>