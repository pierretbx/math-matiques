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0E653C266543B6D1762.png" manifest:media-type="image/png"/>
  <manifest:file-entry manifest:full-path="Pictures/100000000000017900000142C56D9E0EE2FC95EB.png" manifest:media-type="image/png"/>
  <manifest:file-entry manifest:full-path="Pictures/1000000000000170000000BC2274A189999C05F3.png" manifest:media-type="image/png"/>
  <manifest:file-entry manifest:full-path="Pictures/1000000000000179000000F0EC429AB9A5910C43.png" manifest:media-type="image/png"/>
  <manifest:file-entry manifest:full-path="Pictures/100000000000031E000000CA51F06D43B8282741.png" manifest:media-type="image/png"/>
  <manifest:file-entry manifest:full-path="Pictures/10000000000001BA0000010DC7F5C10CCA421A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style:text-underline-style="solid" style:text-underline-width="auto" style:text-underline-color="font-color" officeooo:rsid="000881a8" officeooo:paragraph-rsid="000881a8"/>
    </style:style>
    <style:style style:name="P2" style:family="paragraph" style:parent-style-name="Table_20_Contents">
      <style:text-properties style:font-name="OpenDyslexic" style:text-underline-style="solid" style:text-underline-width="auto" style:text-underline-color="font-color" officeooo:rsid="0009a8f7" officeooo:paragraph-rsid="000aebac"/>
    </style:style>
    <style:style style:name="P3" style:family="paragraph" style:parent-style-name="Table_20_Contents">
      <style:text-properties style:font-name="OpenDyslexic" style:text-underline-style="solid" style:text-underline-width="auto" style:text-underline-color="font-color" officeooo:rsid="000b7666" officeooo:paragraph-rsid="000b7666"/>
    </style:style>
    <style:style style:name="P4" style:family="paragraph" style:parent-style-name="Table_20_Contents">
      <style:text-properties style:font-name="OpenDyslexic" officeooo:rsid="000692c1" officeooo:paragraph-rsid="000881a8"/>
    </style:style>
    <style:style style:name="P5" style:family="paragraph" style:parent-style-name="Standard">
      <style:text-properties style:font-name="OpenDyslexic"/>
    </style:style>
    <style:style style:name="P6" style:family="paragraph" style:parent-style-name="Standard" style:list-style-name="L1">
      <style:text-properties style:font-name="OpenDyslexic" style:text-underline-style="solid" style:text-underline-width="auto" style:text-underline-color="font-color" officeooo:rsid="000881a8" officeooo:paragraph-rsid="000881a8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881a8" officeooo:paragraph-rsid="000881a8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09a8f7" officeooo:paragraph-rsid="0009a8f7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0aebac" officeooo:paragraph-rsid="000aebac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0b7666" officeooo:paragraph-rsid="000b7666"/>
    </style:style>
    <style:style style:name="P11" style:family="paragraph" style:parent-style-name="Standard">
      <style:text-properties style:font-name="OpenDyslexic" style:text-underline-style="none" officeooo:rsid="000881a8" officeooo:paragraph-rsid="000881a8"/>
    </style:style>
    <style:style style:name="T1" style:family="text">
      <style:text-properties officeooo:rsid="00144547"/>
    </style:style>
    <style:style style:name="T2" style:family="text">
      <style:text-properties officeooo:rsid="000d6c80"/>
    </style:style>
    <style:style style:name="T3" style:family="text">
      <style:text-properties officeooo:rsid="000881a8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ollège <text:span text:style-name="T1">J.Brel</text:span> <text:s text:c="73"/><text:span text:style-name="T1">4 </text:span>ème<text:line-break/><text:span text:style-name="T2">Cours </text:span><text:s text:c="14"/>Chapitre <text:span text:style-name="T3">5 : Triangle rectangle &amp; Cercle circonscrit</text:span></text:p>
          </table:table-cell>
        </table:table-row>
      </table:table>
      <text:p text:style-name="P5"/>
      <text:list xml:id="list1714304939" text:style-name="L1">
        <text:list-item>
          <text:p text:style-name="P6">Pour démontrer qu’un point est sur un cercle</text:p>
          <text:p text:style-name="P6"/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Théorème :<text:span text:style-name="T4"> Si un triangle est rectangle alors son cercle circonscrit a pour diamètre son hypoténuse.</text:span></text:p>
          </table:table-cell>
        </table:table-row>
      </table:table>
      <text:p text:style-name="P7"><draw:frame draw:style-name="fr1" draw:name="Image1" text:anchor-type="paragraph" svg:x="-1.725cm" svg:y="0.49cm" svg:width="7.604cm" svg:height="6.495cm" draw:z-index="0"><draw:image xlink:href="Pictures/100000000000017900000142C56D9E0EE2FC95EB.png" xlink:type="simple" xlink:show="embed" xlink:actuate="onLoad" loext:mime-type="image/png"/></draw:frame></text:p>
      <text:p text:style-name="P7"/>
      <text:p text:style-name="P7">Remarque :</text:p>
      <text:p text:style-name="P11">Une autre manière d’énoncer ce théorème : « Si un triangle est rectangle alors le centre du cercle circonscrit à ce triangle est le milieu de l’hypoténuse. »</text:p>
      <text:p text:style-name="P11"/>
      <text:p text:style-name="P11"/>
      <text:p text:style-name="P11"><draw:frame draw:style-name="fr1" draw:name="Image3" text:anchor-type="paragraph" svg:x="11.361cm" svg:y="0.199cm" svg:width="7.638cm" svg:height="3.902cm" draw:z-index="2"><draw:image xlink:href="Pictures/1000000000000170000000BC2274A189999C05F3.png" xlink:type="simple" xlink:show="embed" xlink:actuate="onLoad" loext:mime-type="image/png"/></draw:frame></text:p>
      <text:p text:style-name="P8">Exemple :<text:span text:style-name="T4"> Soit EFG un triangle rectangle en F.</text:span></text:p>
      <text:p text:style-name="P8"><text:span text:style-name="T4">Démontre que le point F appartient au cercle de diamètre [EG].</text:span></text:p>
      <text:p text:style-name="P11"/>
      <text:p text:style-name="P7"><draw:frame draw:style-name="fr1" draw:name="Image2" text:anchor-type="paragraph" svg:x="-1.965cm" svg:y="0.582cm" svg:width="20.481cm" svg:height="4.646cm" draw:z-index="1"><draw:image xlink:href="Pictures/100000000000031E000000CA51F06D43B8282741.png" xlink:type="simple" xlink:show="embed" xlink:actuate="onLoad" loext:mime-type="image/png"/></draw:frame></text:p>
      <text:list xml:id="list151951888852319" text:continue-numbering="true" text:style-name="L1">
        <text:list-item>
          <text:p text:style-name="P6">Longueur de la médiane</text:p>
        </text:list-item>
      </text:list>
      <text:p text:style-name="P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Théorème :<text:span text:style-name="T4"> </text:span></text:p>
            <text:p text:style-name="P2"><text:span text:style-name="T4">Si un triangle est rectangle alors la médiane issue du sommet de l’angle </text:span><text:soft-page-break/><text:span text:style-name="T4">droit a pour longueur la moitié de la longueur de l’hypoténuse.</text:span></text:p>
          </table:table-cell>
        </table:table-row>
      </table:table>
      <text:p text:style-name="P7"><draw:frame draw:style-name="fr1" draw:name="Image4" text:anchor-type="paragraph" svg:x="-1.672cm" svg:y="0.288cm" svg:width="7.488cm" svg:height="4.766cm" draw:z-index="3"><draw:image xlink:href="Pictures/1000000000000179000000F0EC429AB9A5910C4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>Exemple :</text:p>
      <text:p text:style-name="P9"><text:span text:style-name="T4">Le triangle POT est un triangle rectangle en O tel que TP=8cm. Le point S est le milieu du segment [TP]. Quelle est la longueur du segment [SO] ?</text:span></text:p>
      <text:p text:style-name="P9"><draw:frame draw:style-name="fr1" draw:name="Image5" text:anchor-type="paragraph" svg:x="-0.138cm" svg:y="0cm" svg:width="9.234cm" svg:height="6.085cm" draw:z-index="4"><draw:image xlink:href="Pictures/100000000000015D000000E653C266543B6D1762.png" xlink:type="simple" xlink:show="embed" xlink:actuate="onLoad" loext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draw:frame draw:style-name="fr1" draw:name="Image6" text:anchor-type="paragraph" svg:x="-1.965cm" svg:y="0.582cm" svg:width="20.481cm" svg:height="4.646cm" draw:z-index="5"><draw:image xlink:href="Pictures/100000000000031E000000CA51F06D43B8282741.png" xlink:type="simple" xlink:show="embed" xlink:actuate="onLoad" loext:mime-type="image/png"/></draw:frame><text:span text:style-name="T4"/></text:p>
      <text:list xml:id="list151952357163159" text:continue-numbering="true" text:style-name="L1">
        <text:list-item>
          <text:p text:style-name="P6">Pour démontrer qu’un triangle est rectangle</text:p>
        </text:list-item>
      </text:list>
      <text:p text:style-name="P7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Théorème :<text:span text:style-name="T4"> Si un triangle est inscrit dans un cercle de diamètre l’un de ses côtés alors il est rectangle et admet ce diamètre pour hypoténuse.</text:span></text:p>
          </table:table-cell>
        </table:table-row>
      </table:table>
      <text:p text:style-name="P7"/>
      <text:p text:style-name="P10"><text:soft-page-break/>Exemple :<text:span text:style-name="T4"> Trace le cercle de diamètre [SR] tel que SR=7cm puis place sur ce cercle un point H tel que RH=4 cm.</text:span></text:p>
      <text:p text:style-name="P10"><text:span text:style-name="T4">Démontre que le triangle RHS est rectangle en H.</text:span></text:p>
      <text:p text:style-name="P10"><draw:frame draw:style-name="fr1" draw:name="Image7" text:anchor-type="paragraph" svg:x="-1.965cm" svg:y="0.344cm" svg:width="20.481cm" svg:height="4.646cm" draw:z-index="6"><draw:image xlink:href="Pictures/100000000000031E000000CA51F06D43B8282741.png" xlink:type="simple" xlink:show="embed" xlink:actuate="onLoad" loext:mime-type="image/png"/></draw:frame><text:span text:style-name="T4"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Théorème :</text:p>
            <text:p text:style-name="P3"><text:span text:style-name="T4">Si, dans un triangle, la longueur de la médiane relative à un côté est égale à la moitié de la longueur de ce côté alors</text:span></text:p>
            <text:p text:style-name="P3"><text:span text:style-name="T4">ce triangle est rectangle et admet ce côté pour hypoténuse.</text:span></text:p>
          </table:table-cell>
        </table:table-row>
      </table:table>
      <text:p text:style-name="P10"><text:span text:style-name="T4"/></text:p>
      <text:p text:style-name="P10">Exemple :<text:span text:style-name="T4"> MON est un triangle, U est le milieu de [MN] et on a : MN= 8 cm ; OU=4 cm. Démontre que le triangle MON est rectangle en O.</text:span></text:p>
      <text:p text:style-name="P10"><draw:frame draw:style-name="fr1" draw:name="Image8" text:anchor-type="paragraph" svg:x="1.965cm" svg:y="0.086cm" svg:width="11.074cm" svg:height="6.74cm" draw:z-index="7"><draw:image xlink:href="Pictures/10000000000001BA0000010DC7F5C10CCA421AF7.png" xlink:type="simple" xlink:show="embed" xlink:actuate="onLoad" loext:mime-type="image/png"/></draw:frame><draw:frame draw:style-name="fr1" draw:name="Image9" text:anchor-type="paragraph" svg:x="-1.965cm" svg:y="6.932cm" svg:width="20.481cm" svg:height="4.646cm" draw:z-index="8"><draw:image xlink:href="Pictures/100000000000031E000000CA51F06D43B8282741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4:28:33.529000000</meta:creation-date>
    <dc:date>2020-10-31T15:19:50.682000000</dc:date>
    <meta:editing-duration>PT8M8S</meta:editing-duration>
    <meta:editing-cycles>1</meta:editing-cycles>
    <meta:document-statistic meta:table-count="5" meta:image-count="9" meta:object-count="0" meta:page-count="3" meta:paragraph-count="20" meta:word-count="283" meta:character-count="1583" meta:non-whitespace-character-count="1235"/>
    <meta:generator>LibreOffice/6.2.3.2$Windows_X86_64 LibreOffice_project/aecc05fe267cc68dde00352a451aa867b3b546ac</meta:generator>
  </office:meta>
</office:document-meta>
</file>