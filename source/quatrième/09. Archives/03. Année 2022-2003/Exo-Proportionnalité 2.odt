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ede15" officeooo:paragraph-rsid="000ede15"/>
    </style:style>
    <style:style style:name="P3" style:family="paragraph" style:parent-style-name="Standard">
      <style:text-properties style:font-name="OpenDyslexic" style:text-underline-style="none" officeooo:rsid="000ede15" officeooo:paragraph-rsid="000ede15"/>
    </style:style>
    <style:style style:name="P4" style:family="paragraph" style:parent-style-name="Standard">
      <style:paragraph-properties fo:text-align="justify" style:justify-single-word="false"/>
      <style:text-properties style:font-name="OpenDyslexic" style:text-underline-style="none" officeooo:rsid="000ede15" officeooo:paragraph-rsid="000ede15"/>
    </style:style>
    <style:style style:name="P5" style:family="paragraph" style:parent-style-name="Table_20_Contents">
      <style:paragraph-properties fo:text-align="center" style:justify-single-word="false"/>
      <style:text-properties style:font-name="OpenDyslexic" officeooo:rsid="0011cd59" officeooo:paragraph-rsid="0011cd59"/>
    </style:style>
    <style:style style:name="P6" style:family="paragraph" style:parent-style-name="Table_20_Contents">
      <style:text-properties style:font-name="OpenDyslexic" officeooo:rsid="000692c1" officeooo:paragraph-rsid="000ede15"/>
    </style:style>
    <style:style style:name="P7" style:family="paragraph" style:parent-style-name="Standard">
      <style:text-properties style:font-name="OpenDyslexic" style:text-underline-style="none" officeooo:rsid="000ede15" officeooo:paragraph-rsid="000ede15"/>
    </style:style>
    <style:style style:name="P8" style:family="paragraph" style:parent-style-name="Standard">
      <style:text-properties style:text-position="0% 100%" style:font-name="OpenDyslexic" style:text-underline-style="none" officeooo:rsid="0010c451" officeooo:paragraph-rsid="000ede15"/>
    </style:style>
    <style:style style:name="P9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10c451" officeooo:paragraph-rsid="0010c451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OpenDyslexic" fo:font-style="italic" style:text-underline-style="none" officeooo:rsid="0010c451" officeooo:paragraph-rsid="0010c451" style:font-style-asian="italic" style:font-style-complex="italic"/>
    </style:style>
    <style:style style:name="P11" style:family="paragraph" style:parent-style-name="Standard">
      <style:text-properties style:text-position="0% 100%" style:font-name="OpenDyslexic" fo:font-style="normal" style:text-underline-style="none" officeooo:rsid="0010c451" officeooo:paragraph-rsid="0010c451" style:font-style-asian="normal" style:font-style-complex="normal"/>
    </style:style>
    <style:style style:name="P12" style:family="paragraph" style:parent-style-name="Standard">
      <style:text-properties style:text-position="0% 100%" style:font-name="OpenDyslexic" fo:font-style="normal" style:text-underline-style="none" officeooo:rsid="0011cd59" officeooo:paragraph-rsid="0011cd59" style:font-style-asian="normal" style:font-style-complex="normal"/>
    </style:style>
    <style:style style:name="P13" style:family="paragraph" style:parent-style-name="Standard">
      <style:text-properties style:text-position="0% 100%" style:font-name="OpenDyslexic" fo:font-style="normal" style:text-underline-style="none" officeooo:rsid="0013fa9e" officeooo:paragraph-rsid="0013fa9e" style:font-style-asian="normal" style:font-style-complex="normal"/>
    </style:style>
    <style:style style:name="P14" style:family="paragraph" style:parent-style-name="Standard">
      <style:text-properties style:text-position="0% 100%" style:font-name="OpenDyslexic" fo:font-style="normal" style:text-underline-style="none" officeooo:rsid="00157e25" officeooo:paragraph-rsid="00157e25" style:font-style-asian="normal" style:font-style-complex="normal"/>
    </style:style>
    <style:style style:name="P15" style:family="paragraph" style:parent-style-name="Standard">
      <style:text-properties style:text-position="0% 100%" style:font-name="OpenDyslexic" fo:font-style="normal" style:text-underline-style="none" officeooo:rsid="0015bf89" officeooo:paragraph-rsid="0015bf89" style:font-style-asian="normal" style:font-style-complex="normal"/>
    </style:style>
    <style:style style:name="P16" style:family="paragraph" style:parent-style-name="Standard">
      <style:text-properties style:text-position="0% 100%" style:font-name="OpenDyslexic" fo:font-style="normal" style:text-underline-style="none" officeooo:rsid="00167f90" officeooo:paragraph-rsid="00167f90" style:font-style-asian="normal" style:font-style-complex="normal"/>
    </style:style>
    <style:style style:name="P17" style:family="paragraph" style:parent-style-name="Standard">
      <style:text-properties style:text-position="0% 100%" style:font-name="OpenDyslexic" fo:font-style="normal" style:text-underline-style="solid" style:text-underline-width="auto" style:text-underline-color="font-color" officeooo:rsid="0010c451" officeooo:paragraph-rsid="0010c451" style:font-style-asian="normal" style:font-style-complex="normal"/>
    </style:style>
    <style:style style:name="P18" style:family="paragraph" style:parent-style-name="Standard">
      <style:text-properties style:text-position="0% 100%" style:font-name="OpenDyslexic" fo:font-style="normal" style:text-underline-style="solid" style:text-underline-width="auto" style:text-underline-color="font-color" officeooo:rsid="0013fa9e" officeooo:paragraph-rsid="0013fa9e" style:font-style-asian="normal" style:font-style-complex="normal"/>
    </style:style>
    <style:style style:name="P19" style:family="paragraph" style:parent-style-name="Standard">
      <style:text-properties style:text-position="0% 100%" style:font-name="OpenDyslexic" fo:font-style="normal" style:text-underline-style="solid" style:text-underline-width="auto" style:text-underline-color="font-color" officeooo:rsid="00157e25" officeooo:paragraph-rsid="00157e25" style:font-style-asian="normal" style:font-style-complex="normal"/>
    </style:style>
    <style:style style:name="P20" style:family="paragraph" style:parent-style-name="Standard">
      <style:text-properties style:text-position="0% 100%" style:font-name="OpenDyslexic" fo:font-style="normal" style:text-underline-style="solid" style:text-underline-width="auto" style:text-underline-color="font-color" officeooo:rsid="0015bf89" officeooo:paragraph-rsid="0015bf89" style:font-style-asian="normal" style:font-style-complex="normal"/>
    </style:style>
    <style:style style:name="P21" style:family="paragraph" style:parent-style-name="Standard">
      <style:text-properties style:text-position="0% 100%" style:font-name="OpenDyslexic" fo:font-style="normal" style:text-underline-style="solid" style:text-underline-width="auto" style:text-underline-color="font-color" officeooo:rsid="00167f90" officeooo:paragraph-rsid="00167f90" style:font-style-asian="normal" style:font-style-complex="normal"/>
    </style:style>
    <style:style style:name="T1" style:family="text">
      <style:text-properties officeooo:rsid="00144547"/>
    </style:style>
    <style:style style:name="T2" style:family="text">
      <style:text-properties officeooo:rsid="0001478e"/>
    </style:style>
    <style:style style:name="T3" style:family="text">
      <style:text-properties officeooo:rsid="000ede15"/>
    </style:style>
    <style:style style:name="T4" style:family="text">
      <style:text-properties style:text-underline-style="none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0c451"/>
    </style:style>
    <style:style style:name="T7" style:family="text">
      <style:text-properties style:text-position="super 58%" officeooo:rsid="0016a3ae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0c451"/>
    </style:style>
    <style:style style:name="T10" style:family="text">
      <style:text-properties officeooo:rsid="0015bf89"/>
    </style:style>
    <style:style style:name="T11" style:family="text">
      <style:text-properties officeooo:rsid="00167f90"/>
    </style:style>
    <style:style style:name="T12" style:family="text">
      <style:text-properties officeooo:rsid="0016a3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Collège <text:span text:style-name="T1">J.Brel</text:span> <text:s text:c="73"/><text:span text:style-name="T1">4 </text:span>ème<text:line-break/><text:span text:style-name="T3">Exercices </text:span><text:s text:c="11"/>Chapitre <text:span text:style-name="T2">3</text:span> : <text:span text:style-name="T2">Applications de la Proportionnalité</text:span></text:p>
          </table:table-cell>
        </table:table-row>
      </table:table>
      <text:p text:style-name="P1"/>
      <text:p text:style-name="P2">Exercice 1 :</text:p>
      <text:p text:style-name="P3">a) Le record du monde du 100 m est détenu au 15/06/2006 par Asafa Powell en 9,77 s. Quelle a été sa vitesse en m/s lors de sa course ?</text:p>
      <text:p text:style-name="P3"/>
      <text:p text:style-name="P3">b) Le record du monde du 10 000 m est détenu au 26/08/2005 par Kenenisa Bekele en 26 min 17,53 s. Quelle a été sa vitesse en m/s puis en km/h lors de sa course ?</text:p>
      <text:p text:style-name="P3"/>
      <text:p text:style-name="P2">Exercice 2 :</text:p>
      <text:p text:style-name="P3">Cynthia est partie de chez elle à 8h30 et est arrivée à son lieu de vacances à 16h50 après avoir parcouru 625 km en voiture. </text:p>
      <text:p text:style-name="P3">Quelle a été la vitesse moyenne du trajet ?</text:p>
      <text:p text:style-name="P3"/>
      <text:p text:style-name="P2">Exercice 3 :</text:p>
      <text:p text:style-name="P4">Le TGV « Nord » part de Lille à 10h20 vers Paris à la vitesse de227km.h<text:span text:style-name="T5">-1</text:span><text:span text:style-name="T8"><text:line-break/></text:span><text:span text:style-name="T9">et le TGV « Sud » part de Paris à 10h30 vers Lille à la vitesse de 239 km.h</text:span><text:span text:style-name="T6">-1</text:span><text:span text:style-name="T9">. La distance Lille-Paris est environ de 220 km par le train. Ces deux trains vont-ils se croiser avant 10h 53 ?</text:span></text:p>
      <text:p text:style-name="P8"/>
      <text:p text:style-name="P9">Exercice 4 :</text:p>
      <text:p text:style-name="P10">Une nuée ardente composée de gaz surchauffés, de cendre, de pierre ponce et de roche pulvérisée s’échappe latéralement à une vitesse initiale de 350 km/h et accélère rapidement pour atteindre les 1080km/h.</text:p>
      <text:p text:style-name="P11">Quelle distance (en km) la nuée ardente a-t-elle parcourue en 30 s à sa vitesse maximale ?</text:p>
      <text:p text:style-name="P11"/>
      <text:p text:style-name="P17">Exercice 5 :</text:p>
      <text:p text:style-name="P12">Timéo veut emprunter 3 000 euros. À quelle banque va-t-il s’adresser ?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Banque du Nord</text:p>
          </table:table-cell>
          <table:table-cell table:style-name="Tableau2.B1" office:value-type="string">
            <text:p text:style-name="P5">Banque du Sud</text:p>
          </table:table-cell>
        </table:table-row>
        <text:soft-page-break/>
        <table:table-row>
          <table:table-cell table:style-name="Tableau2.A2" office:value-type="string">
            <text:p text:style-name="P5">Coût du crédit : 2,5 % du capital emprunté</text:p>
          </table:table-cell>
          <table:table-cell table:style-name="Tableau2.B2" office:value-type="string">
            <text:p text:style-name="P5">Coût du crédit : 3,2 % du capital emprunté</text:p>
          </table:table-cell>
        </table:table-row>
        <table:table-row>
          <table:table-cell table:style-name="Tableau2.A3" office:value-type="string">
            <text:p text:style-name="P5">Assurance : 200 euros</text:p>
          </table:table-cell>
          <table:table-cell table:style-name="Tableau2.B3" office:value-type="string">
            <text:p text:style-name="P5">Assurance : 155 euros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Exercice 6 :</text:p>
      <text:p text:style-name="P13">Le collège Victor Hugo accueille 800 élèves dont 480 garçons.</text:p>
      <text:p text:style-name="P13">30 % des garçons et 20 % des filles s’y rendent à pied.</text:p>
      <text:p text:style-name="P13">1) Pour déterminer le pourcentage d’élèves qui vont à pied au collège, Chloé, Maréva et Teihotu discutent.</text:p>
      <text:p text:style-name="P13">Chloé dit : «  20 +30 =50 donc 50 % des élèves y vont à pied. »</text:p>
      <text:p text:style-name="P13">Maréva répond : « Tu as oublié de diviser par 2. 25 % des élèves y vont à pied. »</text:p>
      <text:p text:style-name="P13">Teihotu rajoute : « On ne peut pas deviner le résultat car il n’y a pas le même nombre de garçons et de filles. »</text:p>
      <text:p text:style-name="P13"/>
      <text:p text:style-name="P13">Commenter le raisonnement de chacun de ces élèves.</text:p>
      <text:p text:style-name="P13">2) a) Calculer le nombre de garçons qui vont à pied à ce collège.</text:p>
      <text:p text:style-name="P13">b) Calculer le nombre de filles qui vont à pied à ce collège.</text:p>
      <text:p text:style-name="P13">c) En déduire le pourcentage d’élèves qui vont à pied au collège Victor Hugo.</text:p>
      <text:p text:style-name="P13"/>
      <text:p text:style-name="P18">Exercice 7 :</text:p>
      <text:p text:style-name="P14">Un zoo abrite 3 600 animaux dont 15 % représentent des espèces en voie de disparition. </text:p>
      <text:p text:style-name="P14">Les singes représentent 5 % des espèces en voie de disparition et 20 % des autres espèces.</text:p>
      <text:p text:style-name="P14">Calculer le pourcentage de singes dans ce zoo.</text:p>
      <text:p text:style-name="P14"/>
      <text:p text:style-name="P19">Exercice 8 :</text:p>
      <text:p text:style-name="P14">Dans une classe, il y a 15 élèves qui étudient l’allemand. Ces 15 élèves représentent 60 % des élèves de la classe.</text:p>
      <text:p text:style-name="P14">Combien y-a-t-il d’élèves dans la classe ?</text:p>
      <text:p text:style-name="P14"/>
      <text:p text:style-name="P19">Exercice 9 :</text:p>
      <text:p text:style-name="P14">Un congrès de scientifiques s’est divisé en deux commissions. Dans la première commission de 20 personnes, il y a 15 % de femmes.</text:p>
      <text:p text:style-name="P14">Dans la deu<text:span text:style-name="T10">xième commission de 60 personnes, il y a 25 % de femmes.</text:span></text:p>
      <text:p text:style-name="P15">Quel est le pourcentage de femmes dans ce congrès ?</text:p>
      <text:p text:style-name="P20"><text:soft-page-break/>Exercice 10 :</text:p>
      <text:p text:style-name="P20"><text:span text:style-name="T4">Dans le parking de la mairie, il y a 150 voitures dont 80 % de marque française. Dans le parking du lac, il y a 250 voitures dont 96 % de marque française.</text:span></text:p>
      <text:p text:style-name="P20"><text:span text:style-name="T4">Quel est le pourcentage de voitures de marque française dans les deux parkings réunis ?</text:span></text:p>
      <text:p text:style-name="P20"><text:span text:style-name="T4"/></text:p>
      <text:p text:style-name="P20">Exercice 11 :</text:p>
      <text:p text:style-name="P15">Dans un troupeau de 120 animaux, il y a 60 % de moutons. Dans un autre troupeau de 180 animaux, il y a 40 % de moutons. Pour monter à l’alpage, les deux troupeaux sont rassemblés. Quel est le pourcentage de moutons dans les deux groupes réunis ?</text:p>
      <text:p text:style-name="P15"/>
      <text:p text:style-name="P20">Exercice 12 :</text:p>
      <text:p text:style-name="P15">Les Kangiens parlent soit seulement l’anglais, soit seulement le français, soit les deux langues. 85 % parlent anglais, 75 % parlent français. </text:p>
      <text:p text:style-name="P15">Quel pourcentage de Kangiens est bilingue ?</text:p>
      <text:p text:style-name="P15">A) 50 % <text:s/>B) 57 % <text:s/>C) 25 % <text:s/>D) 60 % <text:s/>E) 40 %</text:p>
      <text:p text:style-name="P15"/>
      <text:p text:style-name="P20">Exercice 13 :</text:p>
      <text:p text:style-name="P15">Un camion vide pèse 2 000kg. <text:span text:style-name="T11">Ce matin, la cargaison représentait 80 % du poids total du camion chargé. Au premier arrêt, on a déchargé le quart de la cargaison.</text:span></text:p>
      <text:p text:style-name="P16">Quel pourcentage du poids total représente alors la cargaison ?</text:p>
      <text:p text:style-name="P16">A) 20 % <text:s/>B) 25 % <text:s/>C) 55 % <text:s/>D) 60 % <text:s/>E) 75 %</text:p>
      <text:p text:style-name="P16"/>
      <text:p text:style-name="P21">Exercice 14 :</text:p>
      <text:p text:style-name="P16">Le cours de mathématiques a commencé à 10h. Lucas regarde l’heure, il est 10h35 min. « Tiens, dit-il, il y a déjà 70 % du cours qui est passé ! ».</text:p>
      <text:p text:style-name="P21">Exercice 15 :</text:p>
      <text:p text:style-name="P16">Lors de la crue de l’Ouvèze (affluent du Rhône) qui fit 42 morts le 22 septembre <text:span text:style-name="T12">1992, on a estimé que le débit de cette rivière avait atteint un maximum de 1 100 m³.s</text:span><text:span text:style-name="T7">-1</text:span><text:span text:style-name="T12"> alors que le débit moyen est de 5,2m</text:span><text:span text:style-name="T7">3</text:span><text:span text:style-name="T12">.s</text:span><text:span text:style-name="T7">-1</text:span><text:span text:style-name="T12">. Quel pourcentage d’augmentation cela représente-t-il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1:54:28.479000000</meta:creation-date>
    <dc:date>2020-10-13T22:22:51.924000000</dc:date>
    <meta:editing-duration>PT4M55S</meta:editing-duration>
    <meta:editing-cycles>2</meta:editing-cycles>
    <meta:generator>LibreOffice/6.2.3.2$Windows_X86_64 LibreOffice_project/aecc05fe267cc68dde00352a451aa867b3b546ac</meta:generator>
    <meta:document-statistic meta:table-count="2" meta:image-count="0" meta:object-count="0" meta:page-count="4" meta:paragraph-count="59" meta:word-count="850" meta:character-count="4347" meta:non-whitespace-character-count="3462"/>
  </office:meta>
</office:document-meta>
</file>