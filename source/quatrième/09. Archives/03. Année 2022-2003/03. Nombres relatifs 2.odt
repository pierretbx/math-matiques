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5D000000A1C3E5DA0856CDBA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d6356" officeooo:paragraph-rsid="001d6356"/>
    </style:style>
    <style:style style:name="P2" style:family="paragraph" style:parent-style-name="Table_20_Contents">
      <style:text-properties style:font-name="OpenDyslexic" style:text-underline-style="solid" style:text-underline-width="auto" style:text-underline-color="font-color" officeooo:rsid="001d6356" officeooo:paragraph-rsid="001d6356"/>
    </style:style>
    <style:style style:name="P3" style:family="paragraph" style:parent-style-name="Table_20_Contents" style:list-style-name="L2">
      <style:text-properties style:font-name="OpenDyslexic" style:text-underline-style="solid" style:text-underline-width="auto" style:text-underline-color="font-color" officeooo:rsid="001d6356" officeooo:paragraph-rsid="001d6356"/>
    </style:style>
    <style:style style:name="P4" style:family="paragraph" style:parent-style-name="Table_20_Contents">
      <style:text-properties style:font-name="OpenDyslexic" style:text-underline-style="solid" style:text-underline-width="auto" style:text-underline-color="font-color" officeooo:rsid="001e5050" officeooo:paragraph-rsid="001e5050"/>
    </style:style>
    <style:style style:name="P5" style:family="paragraph" style:parent-style-name="Standard" style:list-style-name="L1">
      <style:text-properties style:font-name="OpenDyslexic" style:text-underline-style="solid" style:text-underline-width="auto" style:text-underline-color="font-color" officeooo:rsid="001d6356" officeooo:paragraph-rsid="001d6356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d6356" officeooo:paragraph-rsid="001d6356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e5050" officeooo:paragraph-rsid="001e5050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202052" officeooo:paragraph-rsid="00202052"/>
    </style:style>
    <style:style style:name="P9" style:family="paragraph" style:parent-style-name="Standard">
      <style:text-properties style:font-name="OpenDyslexic" style:text-underline-style="none" officeooo:rsid="001d6356" officeooo:paragraph-rsid="001d6356"/>
    </style:style>
    <style:style style:name="P10" style:family="paragraph" style:parent-style-name="Standard">
      <style:text-properties style:font-name="OpenDyslexic" style:text-underline-style="none" officeooo:rsid="00202052" officeooo:paragraph-rsid="00202052"/>
    </style:style>
    <style:style style:name="P11" style:family="paragraph" style:parent-style-name="Standard" style:list-style-name="L3">
      <style:text-properties style:font-name="OpenDyslexic" style:text-underline-style="none" officeooo:rsid="00202052" officeooo:paragraph-rsid="00202052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J.BREL <text:s text:c="73"/>4ème</text:p>
            <text:p text:style-name="P1">Cours <text:s text:c="30"/>Chapitre 6 : Nombres relatifs 2</text:p>
          </table:table-cell>
        </table:table-row>
      </table:table>
      <text:p text:style-name="Standard"/>
      <text:list xml:id="list3582961062" text:style-name="L1">
        <text:list-item>
          <text:p text:style-name="P5">Multiplication de nombres relatifs</text:p>
          <text:list>
            <text:list-item>
              <text:p text:style-name="P5">Produit de deux facteurs</text:p>
            </text:list-item>
          </text:list>
        </text:list-item>
      </text:list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Règle :<text:line-break/><text:span text:style-name="T1">Pour multiplier deux nombres relatifs, on multiplie leur distance à zéro et on applique la règle des signes suivante :</text:span></text:p>
            <text:list xml:id="list4121640428" text:style-name="L2">
              <text:list-item>
                <text:p text:style-name="P3"><text:span text:style-name="T1">le produit de deux nombres relatifs, de même signe est positif ;</text:span></text:p>
              </text:list-item>
              <text:list-item>
                <text:p text:style-name="P3"><text:span text:style-name="T1">le produit de deux nombres relatifs de signes contraires est négatif.</text:span></text:p>
              </text:list-item>
            </text:list>
          </table:table-cell>
        </table:table-row>
      </table:table>
      <text:p text:style-name="P6"/>
      <text:p text:style-name="P6">Exemple 1 :</text:p>
      <text:p text:style-name="P9">Effectue la multiplication <draw:frame draw:style-name="fr3" draw:name="Objet1" text:anchor-type="as-char" svg:y="-0.527cm" svg:width="3.378cm" svg:height="0.739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6"><draw:frame draw:style-name="fr1" draw:name="Image1" text:anchor-type="paragraph" svg:width="18.992cm" svg:height="3.179cm" draw:z-index="1"><draw:image xlink:href="Pictures/100000000000035D000000A1C3E5DA0856CDBA8D.png" xlink:type="simple" xlink:show="embed" xlink:actuate="onLoad" loext:mime-type="image/png"/></draw:frame>Exemple 2 :</text:p>
      <text:p text:style-name="P9">Effectue la multiplication : <draw:frame draw:style-name="fr3" draw:name="Objet2" text:anchor-type="as-char" svg:y="-0.527cm" svg:width="3.099cm" svg:height="0.7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Image2" text:anchor-type="paragraph" svg:width="18.992cm" svg:height="3.179cm" draw:z-index="3"><draw:image xlink:href="Pictures/100000000000035D000000A1C3E5DA0856CDBA8D.png" xlink:type="simple" xlink:show="embed" xlink:actuate="onLoad" loext:mime-type="image/png"/></draw:frame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Propriété :<text:span text:style-name="T1"> Multiplier un nombre relatif par -1 revient à prendre son opposé.</text:span></text:p>
          </table:table-cell>
        </table:table-row>
      </table:table>
      <text:p text:style-name="P9"/>
      <text:p text:style-name="P7">Remarque :<text:span text:style-name="T1"> Cela signifie que pour tout nombre relatif </text:span><text:span text:style-name="T3">a </text:span><text:span text:style-name="T5">: </text:span><text:span text:style-name="T5"><draw:frame draw:style-name="fr3" draw:name="Objet3" text:anchor-type="as-char" svg:y="-0.527cm" svg:width="2.332cm" svg:height="0.739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5"/></text:p>
      <text:list xml:id="list94409374357262" text:continue-list="list3582961062" text:style-name="L1">
        <text:list-item>
          <text:list>
            <text:list-item>
              <text:p text:style-name="P5">Produit de plusieurs facteurs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Méthode :<text:span text:style-name="T1"> Pour déterminer le signe d’un produit de plusieurs facteurs, on compte le nombre de facteurs négatifs.<text:line-break/></text:span><text:soft-page-break/><text:span text:style-name="T1">Lorsque le nombre de facteurs négatifs de ce produit est pair, le produit est positif.</text:span></text:p>
            <text:p text:style-name="P4"><text:span text:style-name="T1">Lorsque le nombre de facteurs négatifs de ce produit est impair, le produit est négatif.</text:span></text:p>
          </table:table-cell>
        </table:table-row>
      </table:table>
      <text:p text:style-name="P6"/>
      <text:p text:style-name="P7">Exemple1 :<text:span text:style-name="T1"> Quel est le signe du produit : </text:span><text:span text:style-name="T1"><draw:frame draw:style-name="fr3" draw:name="Objet4" text:anchor-type="as-char" svg:y="-0.527cm" svg:width="4.577cm" svg:height="0.73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 ?</text:span></text:p>
      <text:p text:style-name="P7"><draw:frame draw:style-name="fr2" draw:name="Image3" text:anchor-type="paragraph" svg:x="-0.836cm" svg:y="0cm" svg:width="18.992cm" svg:height="3.179cm" draw:z-index="6"><draw:image xlink:href="Pictures/100000000000035D000000A1C3E5DA0856CDBA8D.png" xlink:type="simple" xlink:show="embed" xlink:actuate="onLoad" loext:mime-type="image/png"/></draw:frame>Exemple 2 :<text:span text:style-name="T1"> Calcule le produit : </text:span><text:span text:style-name="T1"><draw:frame draw:style-name="fr3" draw:name="Objet5" text:anchor-type="as-char" svg:y="-0.527cm" svg:width="6.847cm" svg:height="0.739cm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><draw:frame draw:style-name="fr1" draw:name="Image4" text:anchor-type="paragraph" svg:width="18.992cm" svg:height="3.179cm" draw:z-index="8"><draw:image xlink:href="Pictures/100000000000035D000000A1C3E5DA0856CDBA8D.png" xlink:type="simple" xlink:show="embed" xlink:actuate="onLoad" loext:mime-type="image/png"/></draw:frame><text:span text:style-name="T1"/></text:p>
      <text:list xml:id="list94409766698970" text:continue-numbering="true" text:style-name="L1">
        <text:list-item>
          <text:p text:style-name="P5">Division de deux nombres relatifs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Règle :</text:p>
            <text:p text:style-name="P4"><text:span text:style-name="T1">Pour calculer le quotient d’un nombre relatif par un nombre relatif non nul, on divise leur distance à zéro et on applique la règle des signes suivante :</text:span></text:p>
            <text:p text:style-name="P4"><text:span text:style-name="T1">- le quotient de deux nombres relatifs de même signe est positif ;</text:span></text:p>
            <text:p text:style-name="P4"><text:span text:style-name="T1">- le quotient de deux nombres relatifs de signes contraires est négatif.</text:span></text:p>
          </table:table-cell>
        </table:table-row>
      </table:table>
      <text:p text:style-name="P6"/>
      <text:p text:style-name="P7">Exemple 1 :<text:span text:style-name="T1"> Effectue la division suivante : </text:span><text:span text:style-name="T1"><draw:frame draw:style-name="fr3" draw:name="Objet6" text:anchor-type="as-char" svg:y="-0.527cm" svg:width="2.658cm" svg:height="0.739cm" draw:z-index="9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><draw:frame draw:style-name="fr2" draw:name="Image5" text:anchor-type="paragraph" svg:x="-0.836cm" svg:y="0cm" svg:width="18.992cm" svg:height="3.179cm" draw:z-index="10"><draw:image xlink:href="Pictures/100000000000035D000000A1C3E5DA0856CDBA8D.png" xlink:type="simple" xlink:show="embed" xlink:actuate="onLoad" loext:mime-type="image/png"/></draw:frame>Exemple 2 :<text:span text:style-name="T1"> Quelle est l’écriture décimale du quotient </text:span><text:span text:style-name="T1"><draw:frame draw:style-name="fr3" draw:name="Objet7" text:anchor-type="as-char" svg:y="-0.891cm" svg:width="1.774cm" svg:height="1.54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"> ?</text:span></text:p>
      <text:p text:style-name="P8"><draw:frame draw:style-name="fr2" draw:name="Image6" text:anchor-type="paragraph" svg:x="-0.836cm" svg:y="0cm" svg:width="18.992cm" svg:height="3.179cm" draw:z-index="12"><draw:image xlink:href="Pictures/100000000000035D000000A1C3E5DA0856CDBA8D.png" xlink:type="simple" xlink:show="embed" xlink:actuate="onLoad" loext:mime-type="image/png"/></draw:frame><text:soft-page-break/></text:p>
      <text:p text:style-name="P8">Remarques :</text:p>
      <text:list xml:id="list2237638051" text:style-name="L3">
        <text:list-item>
          <text:p text:style-name="P11">La règle des signes pour la division est la même que celle pour la multiplication.</text:p>
        </text:list-item>
        <text:list-item>
          <text:p text:style-name="P11">Le quotient de 0 par n’importe quel nombre non nul est égal à 0.</text:p>
        </text:list-item>
      </text:list>
      <text:p text:style-name="P10"/>
      <text:p text:style-name="P10">Cela signifie que pour tout nombre relatif non nul <text:span text:style-name="T2">a</text:span><text:span text:style-name="T4">, on a </text:span><text:span text:style-name="T4"><draw:frame draw:style-name="fr3" draw:name="Objet8" text:anchor-type="as-char" svg:y="-0.891cm" svg:width="1.184cm" svg:height="1.54cm" draw:z-index="13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9:15:53.243000000</meta:creation-date>
    <dc:date>2020-12-11T09:44:07.706000000</dc:date>
    <meta:editing-duration>PT7M54S</meta:editing-duration>
    <meta:editing-cycles>1</meta:editing-cycles>
    <meta:document-statistic meta:table-count="5" meta:image-count="6" meta:object-count="8" meta:page-count="3" meta:paragraph-count="29" meta:word-count="299" meta:character-count="1746" meta:non-whitespace-character-count="1374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n>,5</mn>
            </mrow>
          </mrow>
          <mo fence="true" stretchy="false">)</mo>
        </mrow>
      </mrow>
    </mrow>
    <annotation encoding="StarMath 5.0">F=( -4 ) times ( -2,5 )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n>0</mn>
      </mrow>
      <mrow>
        <mn>,2</mn>
        <mo stretchy="false">×</mo>
        <mrow>
          <mo fence="true" stretchy="false">(</mo>
          <mrow>
            <mrow>
              <mo stretchy="false">−</mo>
              <mn>14</mn>
            </mrow>
          </mrow>
          <mo fence="true" stretchy="false">)</mo>
        </mrow>
      </mrow>
    </mrow>
    <annotation encoding="StarMath 5.0">G=0,2 times ( -14 )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1</mn>
        </mrow>
        <mo stretchy="false">×</mo>
        <mi>a</mi>
      </mrow>
      <mo stretchy="false">=</mo>
      <mrow>
        <mo stretchy="false">−</mo>
        <mi>a</mi>
      </mrow>
    </mrow>
    <annotation encoding="StarMath 5.0">-1 times a =-a</annotation>
  </semantics>
</math>
</file>

<file path=Object 4/content.xml><?xml version="1.0" encoding="utf-8"?>
<math xmlns="http://www.w3.org/1998/Math/MathML" display="block">
  <semantics>
    <mrow>
      <mi>H</mi>
      <mo stretchy="false">=</mo>
      <mrow>
        <mrow>
          <mo stretchy="false">−</mo>
          <mn>6</mn>
        </mrow>
        <mo stretchy="false">×</mo>
        <mn>7</mn>
        <mo stretchy="false">×</mo>
        <mrow>
          <mo fence="true" stretchy="false">(</mo>
          <mrow>
            <mrow>
              <mo stretchy="false">−</mo>
              <mn>8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9</mn>
            </mrow>
          </mrow>
          <mo fence="true" stretchy="false">)</mo>
        </mrow>
      </mrow>
    </mrow>
    <annotation encoding="StarMath 5.0">H=-6 times 7 times( -8  ) times ( -9 )</annotation>
  </semantics>
</math>
</file>

<file path=Object 5/content.xml><?xml version="1.0" encoding="utf-8"?>
<math xmlns="http://www.w3.org/1998/Math/MathML" display="block">
  <semantics>
    <mrow>
      <mi>J</mi>
      <mo stretchy="false">=</mo>
      <mrow>
        <mn>2</mn>
        <mo stretchy="false">×</mo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n>,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0</mn>
              </mrow>
              <mn>,8</mn>
            </mrow>
          </mrow>
          <mo fence="true" stretchy="false">)</mo>
        </mrow>
      </mrow>
    </mrow>
    <annotation encoding="StarMath 5.0">J=2 times ( -4 ) times ( -5 ) times ( -2,5 ) times ( -0,8 )</annotation>
  </semantics>
</math>
</file>

<file path=Object 6/content.xml><?xml version="1.0" encoding="utf-8"?>
<math xmlns="http://www.w3.org/1998/Math/MathML" display="block">
  <semantics>
    <mrow>
      <mi>K</mi>
      <mo stretchy="false">=</mo>
      <mrow>
        <mn>65</mn>
        <mo stretchy="false">÷</mo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</mrow>
    </mrow>
    <annotation encoding="StarMath 5.0">K=65  div ( -5 ) </annotation>
  </semantics>
</math>
</file>

<file path=Object 7/content.xml><?xml version="1.0" encoding="utf-8"?>
<math xmlns="http://www.w3.org/1998/Math/MathML" display="block">
  <semantics>
    <mrow>
      <mi>L</mi>
      <mo stretchy="false">=</mo>
      <mfrac>
        <mrow>
          <mo stretchy="false">−</mo>
          <mn>30</mn>
        </mrow>
        <mrow>
          <mo stretchy="false">−</mo>
          <mn>4</mn>
        </mrow>
      </mfrac>
    </mrow>
    <annotation encoding="StarMath 5.0">L= -30 over -4</annotation>
  </semantics>
</math>
</file>

<file path=Object 8/content.xml><?xml version="1.0" encoding="utf-8"?>
<math xmlns="http://www.w3.org/1998/Math/MathML" display="block">
  <semantics>
    <mrow>
      <mfrac>
        <mn>0</mn>
        <mi>a</mi>
      </mfrac>
      <mo stretchy="false">=</mo>
      <mn>0</mn>
    </mrow>
    <annotation encoding="StarMath 5.0">0 over a =0</annotation>
  </semantics>
</math>
</file>