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Standard" style:list-style-name="L1">
      <style:text-properties style:font-name="OpenDyslexic" style:text-underline-style="solid" style:text-underline-width="auto" style:text-underline-color="font-color" officeooo:rsid="00158672" officeooo:paragraph-rsid="00158672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158672" officeooo:paragraph-rsid="00158672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5ee56" officeooo:paragraph-rsid="0015ee56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7a1fe" officeooo:paragraph-rsid="0017a1fe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18310b" officeooo:paragraph-rsid="0018310b"/>
    </style:style>
    <style:style style:name="P6" style:family="paragraph" style:parent-style-name="Standard">
      <style:text-properties style:text-line-through-style="none" style:text-line-through-type="none" style:font-name="OpenDyslexic" style:text-underline-style="solid" style:text-underline-width="auto" style:text-underline-color="font-color" officeooo:rsid="00158672" officeooo:paragraph-rsid="00158672"/>
    </style:style>
    <style:style style:name="P7" style:family="paragraph" style:parent-style-name="Standard">
      <style:text-properties style:text-line-through-style="none" style:text-line-through-type="none" style:font-name="OpenDyslexic" style:text-underline-style="solid" style:text-underline-width="auto" style:text-underline-color="font-color" officeooo:rsid="0015ee56" officeooo:paragraph-rsid="0015ee56"/>
    </style:style>
    <style:style style:name="P8" style:family="paragraph" style:parent-style-name="Table_20_Contents">
      <style:text-properties style:font-name="OpenDyslexic" officeooo:rsid="00158672" officeooo:paragraph-rsid="00158672"/>
    </style:style>
    <style:style style:name="P9" style:family="paragraph" style:parent-style-name="Table_20_Contents">
      <style:text-properties style:font-name="OpenDyslexic" style:text-underline-style="solid" style:text-underline-width="auto" style:text-underline-color="font-color" officeooo:rsid="0015ee56" officeooo:paragraph-rsid="0015ee56"/>
    </style:style>
    <style:style style:name="P10" style:family="paragraph" style:parent-style-name="Table_20_Contents">
      <style:text-properties style:font-name="OpenDyslexic" style:text-underline-style="solid" style:text-underline-width="auto" style:text-underline-color="font-color" officeooo:rsid="0017a1fe" officeooo:paragraph-rsid="0017a1fe"/>
    </style:style>
    <style:style style:name="P11" style:family="paragraph" style:parent-style-name="Table_20_Contents">
      <style:text-properties style:font-name="OpenDyslexic" officeooo:rsid="000692c1" officeooo:paragraph-rsid="00158672"/>
    </style:style>
    <style:style style:name="T1" style:family="text">
      <style:text-properties officeooo:rsid="00144547"/>
    </style:style>
    <style:style style:name="T2" style:family="text">
      <style:text-properties officeooo:rsid="000d6c80"/>
    </style:style>
    <style:style style:name="T3" style:family="text">
      <style:text-properties officeooo:rsid="0015867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8310b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Collège <text:span text:style-name="T1">J.Brel</text:span> <text:s text:c="73"/><text:span text:style-name="T1">4 </text:span>ème<text:line-break/><text:span text:style-name="T2">Cours </text:span><text:s text:c="14"/>Chapitre <text:span text:style-name="T3">4 : Nombres relatifs (addition/soustraction)</text:span></text:p>
          </table:table-cell>
        </table:table-row>
      </table:table>
      <text:p text:style-name="Standard"/>
      <text:p text:style-name="Standard"/>
      <text:list xml:id="list1510157423" text:style-name="L1">
        <text:list-item>
          <text:p text:style-name="P1">Addition de nombres relatifs<text:line-break/>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<text:span text:style-name="T4">Règle :</text:span><text:line-break/>-Pour additionner deux nombres relatifs de même signe, on additionne leur distance à zéro et on garde le signe commun.</text:p>
            <text:p text:style-name="P8">-Pour additionner deux nombres relatifs de signes contraires, on soustrait la plus petite distance à zéro de la plus grande et on prend le signe de celui qui a la plus grande distance à zéro.</text:p>
          </table:table-cell>
        </table:table-row>
      </table:table>
      <text:p text:style-name="P2"/>
      <text:p text:style-name="P2">Exemple 1 :<text:span text:style-name="T5"> Effectue l’addition suivante : A=(-2)+(-3).</text:span></text:p>
      <text:p text:style-name="P2"><text:span text:style-name="T5">A=(-2)+(-3) <text:s text:c="6"/>On veut additionner deux nombres relatifs de même signe.</text:span></text:p>
      <text:p text:style-name="P2"><text:span text:style-name="T5"/></text:p>
      <text:p text:style-name="P2"><text:span text:style-name="T5">A=-(2+3) <text:s text:c="9"/>On additionne leur distance à zéro et on garde le signe <text:tab/><text:tab/><text:tab/>commun : -</text:span></text:p>
      <text:p text:style-name="P2"><text:span text:style-name="T5"/></text:p>
      <text:p text:style-name="P2"><text:span text:style-name="T5">A= -5 <text:s text:c="13"/>On calcule.</text:span></text:p>
      <text:p text:style-name="P2"><text:span text:style-name="T5"/></text:p>
      <text:p text:style-name="P6">Exemple 2 :<text:span text:style-name="T5"> Effectue l’addition suivante : B=(-5)+(+7).</text:span></text:p>
      <text:p text:style-name="P7"><text:span text:style-name="T5">B=(-5)+ (+7) <text:s text:c="5"/>On veut additionner deux nombres relatifs de signes <text:s text:c="7"/><text:tab/><text:tab/><text:tab/>contraires.</text:span></text:p>
      <text:p text:style-name="P7"><text:span text:style-name="T5"/></text:p>
      <text:p text:style-name="P7"><text:span text:style-name="T5">B= + (7-5) <text:s text:c="8"/>On soustrait leur distance à zéro et on écrit le signe du <text:tab/><text:tab/><text:tab/>nombre qui a la plus grande distance à zéro (+7).</text:span></text:p>
      <text:p text:style-name="P7"><text:span text:style-name="T5"/></text:p>
      <text:p text:style-name="P7"><text:span text:style-name="T5">B= +2 <text:s text:c="14"/>On calcule.</text:span></text:p>
      <text:p text:style-name="P7"><text:span text:style-name="T5"/></text:p>
      <text:list xml:id="list163316788438020" text:continue-numbering="true" text:style-name="L1">
        <text:list-item>
          <text:p text:style-name="P1">Soustraction de deux nombres relatifs<text:line-break/></text:p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9">Définition :<text:span text:style-name="T5"> L’opposé d’un nombre relatif est le nombre de signe contraire qui a la même distance à zéro.</text:span></text:p>
          </table:table-cell>
        </table:table-row>
      </table:table>
      <text:p text:style-name="P3"><text:soft-page-break/>Exemple 1 :<text:span text:style-name="T5"> Donne l’opposé de chacun des nombres relatifs : </text:span></text:p>
      <text:p text:style-name="P3"><text:span text:style-name="T5"><text:s text:c="2"/>-2 531 ; 0 ; 1 245 ; -0,03 et + 0,003.</text:span></text:p>
      <text:p text:style-name="P3"><text:span text:style-name="T5"/></text:p>
      <text:p text:style-name="P3"><text:span text:style-name="T5">Les opposés de ces nombres sont respectivement : </text:span></text:p>
      <text:p text:style-name="P3"><text:span text:style-name="T5"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">Règle :</text:p>
            <text:p text:style-name="P10"><text:span text:style-name="T5">Soustraire un nombre relatif revient à ajouter son opposé.</text:span></text:p>
          </table:table-cell>
        </table:table-row>
      </table:table>
      <text:p text:style-name="P3"><text:span text:style-name="T5"/></text:p>
      <text:p text:style-name="P4">Exemple 2 :<text:span text:style-name="T5"> Effectue la soustraction suivante : C=(-2)-(-3).</text:span></text:p>
      <text:p text:style-name="P4"><text:span text:style-name="T5">C=(-2)-(-3) <text:s text:c="18"/>On veut soustraire le nombre -3.</text:span></text:p>
      <text:p text:style-name="P4"><text:span text:style-name="T5"/></text:p>
      <text:p text:style-name="P4"><text:span text:style-name="T5">C=(-2)+(+3) <text:s text:c="17"/>On ajoute l’opposé de -3 qui est +3.</text:span></text:p>
      <text:p text:style-name="P4"><text:span text:style-name="T5"/></text:p>
      <text:p text:style-name="P4"><text:span text:style-name="T5">C=+(3-2) <text:s text:c="21"/>On ajoute deux nombres de signes contraires <text:s text:c="2"/><text:tab/><text:tab/><text:tab/><text:tab/> <text:s text:c="3"/>donc on soustrait leur distance à zéro et on <text:tab/> <text:s text:c="2"/><text:tab/><text:tab/><text:tab/><text:tab/> <text:s text:c="3"/>prend le signe du nombre qui a la plus grande <text:s/><text:tab/><text:tab/><text:tab/><text:tab/> <text:s text:c="3"/>distance à zéro (+3).</text:span></text:p>
      <text:p text:style-name="P4"><text:span text:style-name="T5"/></text:p>
      <text:list xml:id="list163317160708315" text:continue-numbering="true" text:style-name="L1">
        <text:list-item>
          <text:p text:style-name="P1">Enchaînement de calculs<text:line-break/><text:line-break/></text:p>
        </text:list-item>
      </text:list>
      <text:p text:style-name="P4">Exemple 1 :<text:span text:style-name="T5"> Calcule l’expression D=(+4)+(-5)-(-8) en effectuant les calculs de gauche à droite.</text:span></text:p>
      <text:p text:style-name="P4"><text:span text:style-name="T5">D= (+4) + (-5) + (+8) <text:s text:c="5"/></text:span><text:span text:style-name="T6">On transforme les soustractions en addition des <text:s text:c="2"/><text:tab/><text:tab/><text:tab/><text:tab/> <text:s text:c="3"/>opposés.</text:span></text:p>
      <text:p text:style-name="P4"><text:span text:style-name="T6"/></text:p>
      <text:p text:style-name="P5"><text:span text:style-name="T5">D=(-1)+(+8) <text:s text:c="18"/>On effectue les calculs de gauche à droite.</text:span></text:p>
      <text:p text:style-name="P5"><text:span text:style-name="T5"/></text:p>
      <text:p text:style-name="P5"><text:span text:style-name="T5">D=+7 <text:s text:c="27"/>On termine le calcu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5:29:33.959000000</meta:creation-date>
    <dc:date>2020-10-30T16:33:16.634000000</dc:date>
    <meta:editing-duration>PT1S</meta:editing-duration>
    <meta:editing-cycles>1</meta:editing-cycles>
    <meta:document-statistic meta:table-count="4" meta:image-count="0" meta:object-count="0" meta:page-count="2" meta:paragraph-count="28" meta:word-count="327" meta:character-count="2174" meta:non-whitespace-character-count="1565"/>
    <meta:generator>LibreOffice/6.2.3.2$Windows_X86_64 LibreOffice_project/aecc05fe267cc68dde00352a451aa867b3b546ac</meta:generator>
  </office:meta>
</office:document-meta>
</file>