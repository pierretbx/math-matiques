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48000000ED17AF27BB9F31EAB3.png" manifest:media-type="image/png"/>
  <manifest:file-entry manifest:full-path="Pictures/1000020100000332000000E38757630692E2D455.png" manifest:media-type="image/png"/>
  <manifest:file-entry manifest:full-path="Pictures/10000201000000F3000000E282BFA94947BB0E00.png" manifest:media-type="image/png"/>
  <manifest:file-entry manifest:full-path="Pictures/1000020100000111000000D2BFEB53B19EF43133.png" manifest:media-type="image/png"/>
  <manifest:file-entry manifest:full-path="Pictures/10000201000000E3000000BC6550AC7619E9B83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994cm" style:rel-column-width="42382*"/>
    </style:style>
    <style:style style:name="Tableau6.B" style:family="table-column">
      <style:table-column-properties style:column-width="2cm" style:rel-column-width="7710*"/>
    </style:style>
    <style:style style:name="Tableau6.C" style:family="table-column">
      <style:table-column-properties style:column-width="1.998cm" style:rel-column-width="7704*"/>
    </style:style>
    <style:style style:name="Tableau6.D" style:family="table-column">
      <style:table-column-properties style:column-width="2.007cm" style:rel-column-width="7739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f0687" officeooo:paragraph-rsid="001f0687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21297a" officeooo:paragraph-rsid="0021297a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23f6d0" officeooo:paragraph-rsid="0023f6d0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266d9c" officeooo:paragraph-rsid="00266d9c"/>
    </style:style>
    <style:style style:name="P6" style:family="paragraph" style:parent-style-name="Standard">
      <style:text-properties style:font-name="OpenDyslexic" style:text-underline-style="none" officeooo:rsid="0023f6d0" officeooo:paragraph-rsid="0023f6d0"/>
    </style:style>
    <style:style style:name="P7" style:family="paragraph" style:parent-style-name="Standard">
      <style:text-properties style:font-name="OpenDyslexic" style:text-underline-style="none" officeooo:rsid="00266d9c" officeooo:paragraph-rsid="00266d9c"/>
    </style:style>
    <style:style style:name="P8" style:family="paragraph" style:parent-style-name="Table_20_Contents">
      <style:text-properties style:font-name="OpenDyslexic" officeooo:rsid="001f0687" officeooo:paragraph-rsid="001f0687"/>
    </style:style>
    <style:style style:name="P9" style:family="paragraph" style:parent-style-name="Table_20_Contents">
      <style:text-properties style:font-name="OpenDyslexic" style:text-underline-style="solid" style:text-underline-width="auto" style:text-underline-color="font-color" officeooo:rsid="001f0687" officeooo:paragraph-rsid="001f0687"/>
    </style:style>
    <style:style style:name="P10" style:family="paragraph" style:parent-style-name="Table_20_Contents">
      <style:text-properties style:font-name="OpenDyslexic" style:text-underline-style="solid" style:text-underline-width="auto" style:text-underline-color="font-color" officeooo:rsid="001f5b23" officeooo:paragraph-rsid="001f5b23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21297a" officeooo:paragraph-rsid="0021297a"/>
    </style:style>
    <style:style style:name="P12" style:family="paragraph" style:parent-style-name="Table_20_Contents">
      <style:text-properties style:font-name="OpenDyslexic" style:text-underline-style="solid" style:text-underline-width="auto" style:text-underline-color="font-color" officeooo:rsid="00221dba" officeooo:paragraph-rsid="00221dba"/>
    </style:style>
    <style:style style:name="P13" style:family="paragraph" style:parent-style-name="Table_20_Contents">
      <style:text-properties style:font-name="OpenDyslexic" style:text-underline-style="none" officeooo:rsid="001f0687" officeooo:paragraph-rsid="001f0687"/>
    </style:style>
    <style:style style:name="P14" style:family="paragraph" style:parent-style-name="Table_20_Contents">
      <style:text-properties style:font-name="OpenDyslexic" style:text-underline-style="none" officeooo:rsid="0021297a" officeooo:paragraph-rsid="0021297a"/>
    </style:style>
    <style:style style:name="P15" style:family="paragraph" style:parent-style-name="Table_20_Contents">
      <style:paragraph-properties fo:text-align="center" style:justify-single-word="false"/>
      <style:text-properties style:font-name="OpenDyslexic" officeooo:rsid="0023f6d0" officeooo:paragraph-rsid="0023f6d0"/>
    </style:style>
    <style:style style:name="P16" style:family="paragraph" style:parent-style-name="Table_20_Contents">
      <style:text-properties style:font-name="OpenDyslexic" style:text-underline-style="none" officeooo:rsid="00221dba" officeooo:paragraph-rsid="00221dba"/>
    </style:style>
    <style:style style:name="P17" style:family="paragraph" style:parent-style-name="Standard" style:list-style-name="L1">
      <style:text-properties style:font-name="OpenDyslexic" style:text-underline-style="solid" style:text-underline-width="auto" style:text-underline-color="font-color" officeooo:rsid="001f0687" officeooo:paragraph-rsid="001f0687"/>
    </style:style>
    <style:style style:name="P18" style:family="paragraph" style:parent-style-name="Standard">
      <style:text-properties style:font-name="OpenDyslexic" style:text-underline-style="none" officeooo:rsid="001f0687" officeooo:paragraph-rsid="001f0687"/>
    </style:style>
    <style:style style:name="P19" style:family="paragraph" style:parent-style-name="Standard">
      <style:text-properties style:font-name="OpenDyslexic" style:text-underline-style="none" officeooo:rsid="0021297a" officeooo:paragraph-rsid="0021297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297a"/>
    </style:style>
    <style:style style:name="T3" style:family="text">
      <style:text-properties officeooo:rsid="002869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Collège J.BREL <text:s text:c="69"/>4ème</text:p>
            <text:p text:style-name="P8">Cours <text:s text:c="25"/>Chapitre 1<text:span text:style-name="T3">1</text:span> : Théorème de Thales</text:p>
          </table:table-cell>
        </table:table-row>
      </table:table>
      <text:p text:style-name="P1"/>
      <text:list xml:id="list3434858229" text:style-name="L1">
        <text:list-item>
          <text:p text:style-name="P17">Les différentes formes du théorème des milieux</text:p>
          <text:list>
            <text:list-item>
              <text:p text:style-name="P17">Montrer que des droites sont parallèles</text:p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Théorème :</text:p>
            <text:p text:style-name="P13">Si, dans un triangle, une droite passe par les milieux de deux côtés du triangle alors elle est parallèle au troisième côté.</text:p>
          </table:table-cell>
        </table:table-row>
      </table:table>
      <text:p text:style-name="P2">Exemple :</text:p>
      <text:p text:style-name="P18">Soit la figure codée ci-dessous. Démontre que la droite (MN) est parallèle à la droite (OL).</text:p>
      <text:p text:style-name="P18"><draw:frame draw:style-name="fr1" draw:name="Image1" text:anchor-type="paragraph" svg:x="0.076cm" svg:y="0cm" svg:width="8.678cm" svg:height="6.271cm" draw:z-index="0"><draw:image xlink:href="Pictures/1000020100000148000000ED17AF27BB9F31EAB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2" text:anchor-type="paragraph" svg:width="20.001cm" svg:height="4.717cm" draw:z-index="1"><draw:image xlink:href="Pictures/1000020100000332000000E38757630692E2D455.png" xlink:type="simple" xlink:show="embed" xlink:actuate="onLoad" loext:mime-type="image/png"/></draw:frame></text:p>
      <text:list xml:id="list95643066646437" text:continue-numbering="true" text:style-name="L1">
        <text:list-item>
          <text:list>
            <text:list-item>
              <text:p text:style-name="P17">Calculer une longueur connaissant des milieux</text:p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Théorème :<text:span text:style-name="T1"> </text:span></text:p>
            <text:p text:style-name="P10"><text:span text:style-name="T1">Si, dans un triangle , </text:span><text:span text:style-name="T2">un segment joignant les milieux de deux côtés alors sa longueur est égale à la moitié de celle du troisième côté.</text:span></text:p>
          </table:table-cell>
        </table:table-row>
      </table:table>
      <text:p text:style-name="P3">Exemple :<text:span text:style-name="T1"> On donne la figure codée ci-dessous. Calcule la longueur JK.</text:span></text:p>
      <text:p text:style-name="P19"/>
      <text:p text:style-name="P19"><draw:frame draw:style-name="fr1" draw:name="Image3" text:anchor-type="paragraph" svg:x="0.362cm" svg:y="0cm" svg:width="7.223cm" svg:height="5.556cm" draw:z-index="2"><draw:image xlink:href="Pictures/1000020100000111000000D2BFEB53B19EF43133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4" text:anchor-type="paragraph" svg:width="20.001cm" svg:height="4.717cm" draw:z-index="3"><draw:image xlink:href="Pictures/1000020100000332000000E38757630692E2D455.png" xlink:type="simple" xlink:show="embed" xlink:actuate="onLoad" loext:mime-type="image/png"/></draw:frame></text:p>
      <text:list xml:id="list95641787437346" text:continue-numbering="true" text:style-name="L1">
        <text:list-item>
          <text:list>
            <text:list-item>
              <text:p text:style-name="P17">Montrer qu’un point est le milieu d’un segment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Théorème :</text:p>
            <text:p text:style-name="P14">Si, dans un triangle, une droite passe par le milieu d’un côté et est parallèle à un deuxième côté alors elle passe par le milieu du troisième côté.</text:p>
          </table:table-cell>
        </table:table-row>
      </table:table>
      <text:p text:style-name="P2"/>
      <text:p text:style-name="P3">Exemple :<text:span text:style-name="T1"> Soit TOR un triangle tel que M soit le milieu du côté [RO]. La parallèle à (TR) passant par M coupe le côté [OT] en N. Démontre que N est le milieu du côté [OT].</text:span></text:p>
      <text:p text:style-name="P19"><draw:frame draw:style-name="fr1" draw:name="Image5" text:anchor-type="paragraph" svg:x="0.03cm" svg:y="0cm" svg:width="6.006cm" svg:height="4.974cm" draw:z-index="4"><draw:image xlink:href="Pictures/10000201000000E3000000BC6550AC7619E9B83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6" text:anchor-type="paragraph" svg:width="20.001cm" svg:height="4.717cm" draw:z-index="5"><draw:image xlink:href="Pictures/1000020100000332000000E38757630692E2D455.png" xlink:type="simple" xlink:show="embed" xlink:actuate="onLoad" loext:mime-type="image/png"/></draw:frame><text:soft-page-break/></text:p>
      <text:list xml:id="list95642436474909" text:continue-numbering="true" text:style-name="L1">
        <text:list-item>
          <text:p text:style-name="P17">Proportionnalité des longueurs dans le triangle</text:p>
          <text:list>
            <text:list-item>
              <text:p text:style-name="P17">Énoncé</text:p>
            </text:list-item>
          </text:list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">Théorème :<text:span text:style-name="T1"> Si, dans un triangle ABC, M est un point de la demi-droite [AB), N est un point de la demi-droite [AC) et les droites (MN) et (BC) sont parallèles alors </text:span><text:span text:style-name="T1"><draw:frame draw:style-name="fr3" draw:name="Objet1" text:anchor-type="as-char" svg:y="-0.891cm" svg:width="3.263cm" svg:height="1.54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      <text:p text:style-name="P16"><draw:frame draw:style-name="fr1" draw:name="Image7" text:anchor-type="paragraph" svg:x="5.808cm" svg:y="0.353cm" svg:width="6.429cm" svg:height="5.98cm" draw:z-index="7"><draw:image xlink:href="Pictures/10000201000000F3000000E282BFA94947BB0E00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2"/>
      <text:p text:style-name="P4">Remarques :</text:p>
      <text:p text:style-name="P6">Lorsque ce théorème s’applique, le tableau suivant est un tableau de proportionnalité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5">Longueurs des côtés du triangle ABC</text:p>
          </table:table-cell>
          <table:table-cell table:style-name="Tableau6.A1" office:value-type="string">
            <text:p text:style-name="P15">AB</text:p>
          </table:table-cell>
          <table:table-cell table:style-name="Tableau6.A1" office:value-type="string">
            <text:p text:style-name="P15">AC</text:p>
          </table:table-cell>
          <table:table-cell table:style-name="Tableau6.D1" office:value-type="string">
            <text:p text:style-name="P15">BC</text:p>
          </table:table-cell>
        </table:table-row>
        <table:table-row>
          <table:table-cell table:style-name="Tableau6.A2" office:value-type="string">
            <text:p text:style-name="P15">Longueurs des côtés du triangle AMN</text:p>
          </table:table-cell>
          <table:table-cell table:style-name="Tableau6.A2" office:value-type="string">
            <text:p text:style-name="P15">AM</text:p>
          </table:table-cell>
          <table:table-cell table:style-name="Tableau6.A2" office:value-type="string">
            <text:p text:style-name="P15">AN</text:p>
          </table:table-cell>
          <table:table-cell table:style-name="Tableau6.D2" office:value-type="string">
            <text:p text:style-name="P15">MN</text:p>
          </table:table-cell>
        </table:table-row>
      </table:table>
      <text:p text:style-name="P6"/>
      <text:list xml:id="list95642139924748" text:continue-numbering="true" text:style-name="L1">
        <text:list-item>
          <text:list>
            <text:list-item>
              <text:p text:style-name="P17">Calcul d’une longueur avec des rapports égaux</text:p>
            </text:list-item>
          </text:list>
        </text:list-item>
      </text:list>
      <text:p text:style-name="P5">Exemple :</text:p>
      <text:p text:style-name="P7"><text:soft-page-break/>Sur la figure suivante, les droites (OL) et (TE) sont parallèles. O et L appartiennent respectivement aux demi-droites [HT) et [HL). On donne HE=5cm, HL=2cm, TE=7cm et HO=3cm. Calcule les longueurs HT et O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09:55:01.107000000</meta:creation-date>
    <dc:date>2021-06-11T09:56:40.733000000</dc:date>
    <meta:editing-duration>PT10H15M58S</meta:editing-duration>
    <meta:editing-cycles>3</meta:editing-cycles>
    <meta:generator>LibreOffice/6.2.3.2$Windows_X86_64 LibreOffice_project/aecc05fe267cc68dde00352a451aa867b3b546ac</meta:generator>
    <meta:document-statistic meta:table-count="6" meta:image-count="7" meta:object-count="1" meta:page-count="4" meta:paragraph-count="32" meta:word-count="308" meta:character-count="1781" meta:non-whitespace-character-count="1417"/>
  </office:meta>
</office:document-meta>
</file>

<file path=Object 1/content.xml><?xml version="1.0" encoding="utf-8"?>
<math xmlns="http://www.w3.org/1998/Math/MathML" display="block">
  <semantics>
    <mrow>
      <mfrac>
        <mi mathvariant="italic">AM</mi>
        <mi mathvariant="italic">AB</mi>
      </mfrac>
      <mo stretchy="false">=</mo>
      <mfrac>
        <mi mathvariant="italic">AN</mi>
        <mi mathvariant="italic">AC</mi>
      </mfrac>
      <mo stretchy="false">=</mo>
      <mfrac>
        <mi mathvariant="italic">MN</mi>
        <mi mathvariant="italic">BC</mi>
      </mfrac>
    </mrow>
    <annotation encoding="StarMath 5.0">{ AM } over { AB }={ AN } over { AC }={ MN } over { BC }</annotation>
  </semantics>
</math>
</file>