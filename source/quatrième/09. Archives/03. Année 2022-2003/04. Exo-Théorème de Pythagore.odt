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F00000093B3BEABFDC5FCD1C3.png" manifest:media-type="image/png"/>
  <manifest:file-entry manifest:full-path="Pictures/1000000000000122000001DA6BDC205201CD1A12.png" manifest:media-type="image/png"/>
  <manifest:file-entry manifest:full-path="Pictures/100000000000014A0000009E988D30BCBA7E3EC4.png" manifest:media-type="image/png"/>
  <manifest:file-entry manifest:full-path="Pictures/10000000000000FC000000A530C73BCDF891B32F.png" manifest:media-type="image/png"/>
  <manifest:file-entry manifest:full-path="Pictures/1000000000000159000000ADAF0A6827561E711D.png" manifest:media-type="image/png"/>
  <manifest:file-entry manifest:full-path="Pictures/10000000000001C7000000D991764523743C0CDB.png" manifest:media-type="image/png"/>
  <manifest:file-entry manifest:full-path="Pictures/100000000000016900000107AA16FE0966124B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Dyslexic" svg:font-family="OpenDyslexic"/>
    <style:font-face style:name="Arial1" svg:font-family="Arial" style:font-family-generic="swiss"/>
    <style:font-face style:name="OpenDyslexic1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3cm" style:rel-column-width="10922*"/>
    </style:style>
    <style:style style:name="Tableau3.F" style:family="table-column">
      <style:table-column-properties style:column-width="2.835cm" style:rel-column-width="1092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OpenDyslexic1"/>
    </style:style>
    <style:style style:name="P2" style:family="paragraph" style:parent-style-name="Table_20_Contents">
      <style:text-properties style:font-name="OpenDyslexic1" officeooo:rsid="001da7f0" officeooo:paragraph-rsid="001da7f0"/>
    </style:style>
    <style:style style:name="P3" style:family="paragraph" style:parent-style-name="Table_20_Contents">
      <style:text-properties style:font-name="OpenDyslexic1" officeooo:rsid="001f87fa" officeooo:paragraph-rsid="001f87fa"/>
    </style:style>
    <style:style style:name="P4" style:family="paragraph" style:parent-style-name="Table_20_Contents">
      <style:text-properties style:font-name="OpenDyslexic1" officeooo:rsid="000692c1" officeooo:paragraph-rsid="001b9e08"/>
    </style:style>
    <style:style style:name="P5" style:family="paragraph" style:parent-style-name="Table_20_Contents">
      <style:paragraph-properties fo:text-align="center" style:justify-single-word="false"/>
      <style:text-properties style:font-name="OpenDyslexic1"/>
    </style:style>
    <style:style style:name="P6" style:family="paragraph" style:parent-style-name="Table_20_Contents">
      <style:paragraph-properties fo:text-align="center" style:justify-single-word="false"/>
      <style:text-properties style:font-name="OpenDyslexic1" officeooo:paragraph-rsid="0028f1ad"/>
    </style:style>
    <style:style style:name="P7" style:family="paragraph" style:parent-style-name="Table_20_Contents">
      <style:paragraph-properties fo:text-align="center" style:justify-single-word="false"/>
      <style:text-properties style:font-name="OpenDyslexic1" officeooo:rsid="00278a22" officeooo:paragraph-rsid="00278a22"/>
    </style:style>
    <style:style style:name="P8" style:family="paragraph" style:parent-style-name="Table_20_Contents">
      <style:paragraph-properties fo:text-align="center" style:justify-single-word="false"/>
      <style:text-properties style:font-name="OpenDyslexic1" officeooo:rsid="00280eb5" officeooo:paragraph-rsid="00280eb5"/>
    </style:style>
    <style:style style:name="P9" style:family="paragraph" style:parent-style-name="Table_20_Contents">
      <style:paragraph-properties fo:text-align="center" style:justify-single-word="false"/>
      <style:text-properties style:font-name="OpenDyslexic1" officeooo:rsid="00280eb5" officeooo:paragraph-rsid="00281553"/>
    </style:style>
    <style:style style:name="P10" style:family="paragraph" style:parent-style-name="Table_20_Contents">
      <style:paragraph-properties fo:text-align="center" style:justify-single-word="false"/>
      <style:text-properties style:font-name="OpenDyslexic1" officeooo:rsid="00281553" officeooo:paragraph-rsid="00281553"/>
    </style:style>
    <style:style style:name="P11" style:family="paragraph" style:parent-style-name="Table_20_Contents">
      <style:paragraph-properties fo:text-align="center" style:justify-single-word="false"/>
      <style:text-properties style:font-name="OpenDyslexic1" officeooo:rsid="0028f1ad" officeooo:paragraph-rsid="0028f1ad"/>
    </style:style>
    <style:style style:name="P12" style:family="paragraph" style:parent-style-name="Standard">
      <style:text-properties style:font-name="OpenDyslexic1" style:text-underline-style="solid" style:text-underline-width="auto" style:text-underline-color="font-color" officeooo:rsid="001b9e08" officeooo:paragraph-rsid="001b9e08"/>
    </style:style>
    <style:style style:name="P13" style:family="paragraph" style:parent-style-name="Standard">
      <style:text-properties style:font-name="OpenDyslexic1" style:text-underline-style="solid" style:text-underline-width="auto" style:text-underline-color="font-color" officeooo:rsid="002100aa" officeooo:paragraph-rsid="002100aa"/>
    </style:style>
    <style:style style:name="P14" style:family="paragraph" style:parent-style-name="Standard">
      <style:text-properties style:font-name="OpenDyslexic1" style:text-underline-style="solid" style:text-underline-width="auto" style:text-underline-color="font-color" officeooo:rsid="00217480" officeooo:paragraph-rsid="00217480"/>
    </style:style>
    <style:style style:name="P15" style:family="paragraph" style:parent-style-name="Standard">
      <style:text-properties style:font-name="OpenDyslexic1" style:text-underline-style="solid" style:text-underline-width="auto" style:text-underline-color="font-color" officeooo:rsid="0023c773" officeooo:paragraph-rsid="0023c773"/>
    </style:style>
    <style:style style:name="P16" style:family="paragraph" style:parent-style-name="Standard">
      <style:text-properties style:font-name="OpenDyslexic1" style:text-underline-style="solid" style:text-underline-width="auto" style:text-underline-color="font-color" officeooo:rsid="0025ac2b" officeooo:paragraph-rsid="0025ac2b"/>
    </style:style>
    <style:style style:name="P17" style:family="paragraph" style:parent-style-name="Standard">
      <style:text-properties style:font-name="OpenDyslexic1" style:text-underline-style="solid" style:text-underline-width="auto" style:text-underline-color="font-color" officeooo:rsid="00278a22" officeooo:paragraph-rsid="00278a22"/>
    </style:style>
    <style:style style:name="P18" style:family="paragraph" style:parent-style-name="Standard">
      <style:text-properties style:font-name="OpenDyslexic1" style:text-underline-style="solid" style:text-underline-width="auto" style:text-underline-color="font-color" officeooo:rsid="00280eb5" officeooo:paragraph-rsid="00280eb5"/>
    </style:style>
    <style:style style:name="P19" style:family="paragraph" style:parent-style-name="Standard">
      <style:text-properties style:font-name="OpenDyslexic1" style:text-underline-style="none" officeooo:rsid="0023c773" officeooo:paragraph-rsid="0023c773"/>
    </style:style>
    <style:style style:name="P20" style:family="paragraph" style:parent-style-name="Standard">
      <style:text-properties style:font-name="OpenDyslexic1" style:text-underline-style="none" officeooo:rsid="001b9e08" officeooo:paragraph-rsid="001b9e08"/>
    </style:style>
    <style:style style:name="P21" style:family="paragraph" style:parent-style-name="Standard">
      <style:text-properties style:font-name="OpenDyslexic1" style:text-underline-style="none" officeooo:rsid="002100aa" officeooo:paragraph-rsid="002100aa"/>
    </style:style>
    <style:style style:name="P22" style:family="paragraph" style:parent-style-name="Standard">
      <style:text-properties style:font-name="OpenDyslexic1" style:text-underline-style="none" officeooo:rsid="00217480" officeooo:paragraph-rsid="00217480"/>
    </style:style>
    <style:style style:name="P23" style:family="paragraph" style:parent-style-name="Standard">
      <style:text-properties style:font-name="OpenDyslexic1" style:text-underline-style="none" officeooo:rsid="0024d16a" officeooo:paragraph-rsid="0024d16a"/>
    </style:style>
    <style:style style:name="P24" style:family="paragraph" style:parent-style-name="Standard">
      <style:text-properties style:font-name="OpenDyslexic1" style:text-underline-style="none" officeooo:rsid="00280eb5" officeooo:paragraph-rsid="00280eb5"/>
    </style:style>
    <style:style style:name="P25" style:family="paragraph" style:parent-style-name="Standard">
      <style:text-properties style:font-name="OpenDyslexic1" style:text-underline-style="none" officeooo:rsid="00281553" officeooo:paragraph-rsid="00281553"/>
    </style:style>
    <style:style style:name="P26" style:family="paragraph" style:parent-style-name="Standard">
      <style:text-properties style:font-name="OpenDyslexic1" style:text-underline-style="none" officeooo:rsid="0028f1ad" officeooo:paragraph-rsid="0028f1ad" style:font-name-asian="NSimSun" style:font-name-complex="Arial"/>
    </style:style>
    <style:style style:name="P27" style:family="paragraph" style:parent-style-name="Standard">
      <style:text-properties style:font-name="OpenDyslexic1" style:text-underline-style="none" officeooo:rsid="0025ac2b" officeooo:paragraph-rsid="0025ac2b"/>
    </style:style>
    <style:style style:name="P28" style:family="paragraph" style:parent-style-name="Standard">
      <style:text-properties style:font-name="OpenDyslexic1" style:text-underline-style="none" officeooo:rsid="00278a22" officeooo:paragraph-rsid="00278a22"/>
    </style:style>
    <style:style style:name="P29" style:family="paragraph" style:parent-style-name="Standard">
      <style:text-properties style:font-name="OpenDyslexic1" style:text-underline-style="none" officeooo:rsid="00298ce1" officeooo:paragraph-rsid="00298ce1"/>
    </style:style>
    <style:style style:name="P30" style:family="paragraph" style:parent-style-name="Standard">
      <style:text-properties style:font-name="OpenDyslexic1" style:text-underline-style="none" officeooo:rsid="002a5447" officeooo:paragraph-rsid="002a5447"/>
    </style:style>
    <style:style style:name="P31" style:family="paragraph" style:parent-style-name="Standard">
      <style:text-properties style:font-name="OpenDyslexic1" style:text-underline-style="none" officeooo:rsid="00280eb5" officeooo:paragraph-rsid="002a5447"/>
    </style:style>
    <style:style style:name="P32" style:family="paragraph" style:parent-style-name="Standard">
      <style:text-properties style:font-name="OpenDyslexic1" style:text-underline-style="none" officeooo:rsid="002f56d7" officeooo:paragraph-rsid="002f56d7"/>
    </style:style>
    <style:style style:name="P33" style:family="paragraph" style:parent-style-name="Standard">
      <style:text-properties style:font-name="OpenDyslexic1" style:text-underline-style="solid" style:text-underline-width="auto" style:text-underline-color="font-color" officeooo:rsid="00298ce1" officeooo:paragraph-rsid="00298ce1"/>
    </style:style>
    <style:style style:name="P34" style:family="paragraph" style:parent-style-name="Standard">
      <style:text-properties style:text-line-through-style="none" style:text-line-through-type="none" style:font-name="OpenDyslexic1" style:text-underline-style="solid" style:text-underline-width="auto" style:text-underline-color="font-color" officeooo:rsid="002a5447" officeooo:paragraph-rsid="002a5447"/>
    </style:style>
    <style:style style:name="P35" style:family="paragraph" style:parent-style-name="Standard">
      <style:text-properties style:text-line-through-style="none" style:text-line-through-type="none" style:font-name="OpenDyslexic1" style:text-underline-style="solid" style:text-underline-width="auto" style:text-underline-color="font-color" officeooo:rsid="002bf0a3" officeooo:paragraph-rsid="002bf0a3"/>
    </style:style>
    <style:style style:name="P36" style:family="paragraph" style:parent-style-name="Standard">
      <style:text-properties style:text-line-through-style="none" style:text-line-through-type="none" style:font-name="OpenDyslexic1" style:text-underline-style="solid" style:text-underline-width="auto" style:text-underline-color="font-color" officeooo:rsid="002db78a" officeooo:paragraph-rsid="002db78a"/>
    </style:style>
    <style:style style:name="P37" style:family="paragraph" style:parent-style-name="Standard">
      <style:text-properties style:text-line-through-style="none" style:text-line-through-type="none" style:font-name="OpenDyslexic1" style:text-underline-style="solid" style:text-underline-width="auto" style:text-underline-color="font-color" officeooo:rsid="002f56d7" officeooo:paragraph-rsid="002f56d7"/>
    </style:style>
    <style:style style:name="T1" style:family="text">
      <style:text-properties officeooo:rsid="00144547"/>
    </style:style>
    <style:style style:name="T2" style:family="text">
      <style:text-properties officeooo:rsid="000d6c80"/>
    </style:style>
    <style:style style:name="T3" style:family="text">
      <style:text-properties officeooo:rsid="001b9e08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bf0a3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officeooo:rsid="002db78a"/>
    </style:style>
    <style:style style:name="T8" style:family="text">
      <style:text-properties officeooo:rsid="00278a2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OpenDyslexic" style:font-name-asian="OpenDyslexic" style:font-name-complex="OpenDyslexic"/>
    </style:style>
    <style:style style:name="T11" style:family="text">
      <style:text-properties style:font-name="OpenDyslexic" officeooo:rsid="0028f1ad" style:font-name-asian="OpenDyslexic" style:font-name-complex="OpenDyslexic"/>
    </style:style>
    <style:style style:name="T12" style:family="text">
      <style:text-properties style:font-name-asian="NSimSun" style:font-name-complex="Arial"/>
    </style:style>
    <style:style style:name="T13" style:family="text">
      <style:text-properties officeooo:rsid="0028f1ad" style:font-name-asian="NSimSun" style:font-name-complex="Arial"/>
    </style:style>
    <style:style style:name="T14" style:family="text">
      <style:text-properties officeooo:rsid="0028f1ad"/>
    </style:style>
    <style:style style:name="T15" style:family="text">
      <style:text-properties officeooo:rsid="002f56d7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2f56d7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2f56d7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09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Collège <text:span text:style-name="T1">J.Brel</text:span> <text:s text:c="73"/><text:span text:style-name="T1">4 </text:span>ème<text:line-break/><text:span text:style-name="T3">Exercices</text:span> <text:s text:c="16"/>Chapitre <text:span text:style-name="T2">2</text:span> : <text:span text:style-name="T1">Pythagore</text:span></text:p>
          </table:table-cell>
        </table:table-row>
      </table:table>
      <text:p text:style-name="Standard"/>
      <text:p text:style-name="P18">Activité 1 :</text:p>
      <text:p text:style-name="P24">1) Comment se lit « 7 m² » ? …………………………………………………….</text:p>
      <text:p text:style-name="P24">2) Dans un carré ABCD, de côté 5 cm, on souhaite déterminer son aire.</text:p>
      <text:p text:style-name="P24">a) Quelle est la formule de l’aire d’un carré de côté <text:span text:style-name="T9">c</text:span> ? …………………….</text:p>
      <text:p text:style-name="P24">b) Quelle est l’aire d’un carré de côté 5 cm ? ………………………………..</text:p>
      <text:p text:style-name="P24">c) Compléter le tableau suivant.<text:line-break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8">Côté d’un carré (cm)</text:p>
          </table:table-cell>
          <table:table-cell table:style-name="Tableau4.B1" office:value-type="string">
            <text:p text:style-name="P8">Aire du carré (cm²)</text:p>
          </table:table-cell>
        </table:table-row>
        <table:table-row>
          <table:table-cell table:style-name="Tableau4.A2" office:value-type="string">
            <text:p text:style-name="P8">2</text:p>
          </table:table-cell>
          <table:table-cell table:style-name="Tableau4.B2" office:value-type="string">
            <text:p text:style-name="P5">……………………...</text:p>
          </table:table-cell>
        </table:table-row>
        <table:table-row>
          <table:table-cell table:style-name="Tableau4.A2" office:value-type="string">
            <text:p text:style-name="P8">4</text:p>
          </table:table-cell>
          <table:table-cell table:style-name="Tableau4.B2" office:value-type="string">
            <text:p text:style-name="P5">……………………….</text:p>
          </table:table-cell>
        </table:table-row>
        <table:table-row>
          <table:table-cell table:style-name="Tableau4.A2" office:value-type="string">
            <text:p text:style-name="P8">9</text:p>
          </table:table-cell>
          <table:table-cell table:style-name="Tableau4.B2" office:value-type="string">
            <text:p text:style-name="P5">……………………….</text:p>
          </table:table-cell>
        </table:table-row>
        <table:table-row>
          <table:table-cell table:style-name="Tableau4.A2" office:value-type="string">
            <text:p text:style-name="P8">2,5</text:p>
          </table:table-cell>
          <table:table-cell table:style-name="Tableau4.B2" office:value-type="string">
            <text:p text:style-name="P5">………………………..</text:p>
          </table:table-cell>
        </table:table-row>
        <table:table-row>
          <table:table-cell table:style-name="Tableau4.A2" office:value-type="string">
            <text:p text:style-name="P8">3,2</text:p>
          </table:table-cell>
          <table:table-cell table:style-name="Tableau4.B2" office:value-type="string">
            <text:p text:style-name="P5">………………………...</text:p>
          </table:table-cell>
        </table:table-row>
        <table:table-row>
          <table:table-cell table:style-name="Tableau4.A2" office:value-type="string">
            <text:p text:style-name="P8">13</text:p>
          </table:table-cell>
          <table:table-cell table:style-name="Tableau4.B2" office:value-type="string">
            <text:p text:style-name="P5">…………………………</text:p>
          </table:table-cell>
        </table:table-row>
        <table:table-row>
          <table:table-cell table:style-name="Tableau4.A2" office:value-type="string">
            <text:p text:style-name="P9">…………………………</text:p>
          </table:table-cell>
          <table:table-cell table:style-name="Tableau4.B2" office:value-type="string">
            <text:p text:style-name="P8">9</text:p>
          </table:table-cell>
        </table:table-row>
        <table:table-row>
          <table:table-cell table:style-name="Tableau4.A2" office:value-type="string">
            <text:p text:style-name="P9">…………………………</text:p>
          </table:table-cell>
          <table:table-cell table:style-name="Tableau4.B2" office:value-type="string">
            <text:p text:style-name="P8">25</text:p>
          </table:table-cell>
        </table:table-row>
        <table:table-row>
          <table:table-cell table:style-name="Tableau4.A2" office:value-type="string">
            <text:p text:style-name="P9">…………………………</text:p>
          </table:table-cell>
          <table:table-cell table:style-name="Tableau4.B2" office:value-type="string">
            <text:p text:style-name="P8">36</text:p>
          </table:table-cell>
        </table:table-row>
        <table:table-row>
          <table:table-cell table:style-name="Tableau4.A2" office:value-type="string">
            <text:p text:style-name="P9">…………………………</text:p>
          </table:table-cell>
          <table:table-cell table:style-name="Tableau4.B2" office:value-type="string">
            <text:p text:style-name="P10">100</text:p>
          </table:table-cell>
        </table:table-row>
      </table:table>
      <text:p text:style-name="P25"><draw:frame draw:style-name="fr1" draw:name="Image7" text:anchor-type="paragraph" svg:x="13.457cm" svg:y="0.215cm" svg:width="5.544cm" svg:height="9.061cm" draw:z-index="6"><draw:image xlink:href="Pictures/1000000000000122000001DA6BDC205201CD1A12.png" xlink:type="simple" xlink:show="embed" xlink:actuate="onLoad" loext:mime-type="image/png"/></draw:frame>3) On souhaite déterminer le côté d’un carré d’aire 20 cm².</text:p>
      <text:p text:style-name="P25">a) Déterminer un encadrement par des valeurs entières du côté du carré.<text:line-break/>……………………………………………………………………………………..<text:line-break/>b) à l’aide de la touche <text:span text:style-name="T10">√ </text:span><text:span text:style-name="T11">de la calculatrice</text:span><text:span text:style-name="T12">, </text:span><text:span text:style-name="T13">déterminer </text:span><text:span text:style-name="T11">√</text:span><text:span text:style-name="T13">20 puis écrire le résultat en arrondissant au centième.<text:line-break/>……………………………………………………………………………….</text:span></text:p>
      <text:p text:style-name="P26">c) On peut répondre à la question initiale, le côté d’un carré d’aire 20 cm² est de ………………………………….</text:p>
      <text:p text:style-name="P26">d) Compléter le tableau suivant :</text:p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11">c²</text:p>
          </table:table-cell>
          <table:table-cell table:style-name="Tableau5.B1" office:value-type="string">
            <text:p text:style-name="P11">c</text:p>
          </table:table-cell>
        </table:table-row>
        <table:table-row>
          <table:table-cell table:style-name="Tableau5.A2" office:value-type="string">
            <text:p text:style-name="P11">20</text:p>
          </table:table-cell>
          <table:table-cell table:style-name="Tableau5.B2" office:value-type="string">
            <text:p text:style-name="P5">…………………………...</text:p>
          </table:table-cell>
        </table:table-row>
        <table:table-row>
          <table:table-cell table:style-name="Tableau5.A2" office:value-type="string">
            <text:p text:style-name="P11">2</text:p>
          </table:table-cell>
          <table:table-cell table:style-name="Tableau5.B2" office:value-type="string">
            <text:p text:style-name="P5">…………………………...</text:p>
          </table:table-cell>
        </table:table-row>
        <table:table-row>
          <table:table-cell table:style-name="Tableau5.A2" office:value-type="string">
            <text:p text:style-name="P11">6</text:p>
          </table:table-cell>
          <table:table-cell table:style-name="Tableau5.B2" office:value-type="string">
            <text:p text:style-name="P6">…………………………...</text:p>
          </table:table-cell>
        </table:table-row>
        <table:table-row>
          <table:table-cell table:style-name="Tableau5.A2" office:value-type="string">
            <text:p text:style-name="P11">5</text:p>
          </table:table-cell>
          <table:table-cell table:style-name="Tableau5.B2" office:value-type="string">
            <text:p text:style-name="P6">…………………………...</text:p>
          </table:table-cell>
        </table:table-row>
        <table:table-row>
          <table:table-cell table:style-name="Tableau5.A2" office:value-type="string">
            <text:p text:style-name="P11">49</text:p>
          </table:table-cell>
          <table:table-cell table:style-name="Tableau5.B2" office:value-type="string">
            <text:p text:style-name="P6">…………………………...</text:p>
          </table:table-cell>
        </table:table-row>
      </table:table>
      <text:p text:style-name="P26"/>
      <text:p text:style-name="P12">Exercice 1 :<text:span text:style-name="T4"><text:line-break/>Pour chaque triangle, justifier pourquoi on a l’égalité de Pythagore et énoncer cette propriété.<text:line-break/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<draw:frame draw:style-name="fr1" draw:name="Image1" text:anchor-type="paragraph" svg:x="0.85cm" svg:y="0.139cm" svg:width="7.17cm" svg:height="3.889cm" draw:z-index="0"><draw:image xlink:href="Pictures/100000000000010F00000093B3BEABFDC5FCD1C3.png" xlink:type="simple" xlink:show="embed" xlink:actuate="onLoad" loext:mime-type="image/png"/></draw:frame>a)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au2.B1" office:value-type="string">
            <text:p text:style-name="P2"><draw:frame draw:style-name="fr2" draw:name="Image2" text:anchor-type="paragraph" svg:x="0cm" svg:y="0.873cm" svg:width="8.306cm" svg:height="3.976cm" draw:z-index="1"><draw:image xlink:href="Pictures/100000000000014A0000009E988D30BCBA7E3EC4.png" xlink:type="simple" xlink:show="embed" xlink:actuate="onLoad" loext:mime-type="image/png"/></draw:frame>b) </text:p>
          </table:table-cell>
        </table:table-row>
        <table:table-row>
          <table:table-cell table:style-name="Tableau2.A2" office:value-type="string">
            <text:p text:style-name="P3"><draw:frame draw:style-name="fr2" draw:name="Image3" text:anchor-type="paragraph" svg:x="-0.026cm" svg:y="1.402cm" svg:width="8.306cm" svg:height="4.165cm" draw:z-index="2"><draw:image xlink:href="Pictures/1000000000000159000000ADAF0A6827561E711D.png" xlink:type="simple" xlink:show="embed" xlink:actuate="onLoad" loext:mime-type="image/png"/></draw:frame>c) </text:p>
            <text:p text:style-name="P3"/>
          </table:table-cell>
          <table:table-cell table:style-name="Tableau2.B2" office:value-type="string">
            <text:p text:style-name="P3"><draw:frame draw:style-name="fr2" draw:name="Image4" text:anchor-type="paragraph" svg:x="1.004cm" svg:y="1.032cm" svg:width="6.668cm" svg:height="4.366cm" draw:z-index="3"><draw:image xlink:href="Pictures/10000000000000FC000000A530C73BCDF891B32F.png" xlink:type="simple" xlink:show="embed" xlink:actuate="onLoad" loext:mime-type="image/png"/></draw:frame>d) </text:p>
          </table:table-cell>
        </table:table-row>
      </table:table>
      <text:p text:style-name="P20"/>
      <text:p text:style-name="P13">Exercice 2 :</text:p>
      <text:p text:style-name="P21">Nommer l’hypoténuse des triangles ART et BUS.</text:p>
      <text:p text:style-name="P21">a) ART est rectangle en A.</text:p>
      <text:p text:style-name="P21">b) [BU] et [SB] sont les côtés de l’angle droit.</text:p>
      <text:p text:style-name="P21"/>
      <text:p text:style-name="P13"><text:soft-page-break/>Exercice 3 :</text:p>
      <text:p text:style-name="P21">Nommer tous les triangles rectangles de la figure et, pour chacun, nommer son hypoténuse.</text:p>
      <text:p text:style-name="P21"><draw:frame draw:style-name="fr2" draw:name="Image5" text:anchor-type="paragraph" svg:x="3.725cm" svg:y="-0.291cm" svg:width="9.551cm" svg:height="6.959cm" draw:z-index="4"><draw:image xlink:href="Pictures/100000000000016900000107AA16FE0966124BE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section text:style-name="Sect1" text:name="Section1">
        <text:p text:style-name="P14">Exercice 4 :</text:p>
        <text:p text:style-name="P22">Le triangle GAL, rectangle en A, est tel que GA=84 m et AL= 35 m.</text:p>
        <text:p text:style-name="P22">Calculer la longueur GL de son hypoténuse.</text:p>
        <text:p text:style-name="P22"/>
        <text:p text:style-name="P14">Exercice 5 :</text:p>
        <text:p text:style-name="P19">à quel triangle s’applique chacune des égalités suivantes ?</text:p>
        <text:p text:style-name="P19">a) AB²=AC²+BC² <text:s text:c="13"/>b) BC²=AB²+AC² <text:s text:c="15"/>c) AC²=AB²+BC²</text:p>
        <text:p text:style-name="P19"/>
        <text:p text:style-name="P15">Exercice 6 :</text:p>
        <text:p text:style-name="P19">Le triangle GAL, rectangle en A, est tel que GA= 84 m et AL= 35 m.<text:line-break/>Calculer la longueur GL de son hypoténuse.</text:p>
        <text:p text:style-name="P15">Exercice 7 :</text:p>
        <text:p text:style-name="P19">Le triangle PIM, rectangle en P, est tel que PI=68 mm et MI=68,9mm.</text:p>
        <text:p text:style-name="P19">Calculer la longueur du côté [PM]</text:p>
        <text:p text:style-name="P19"/>
        <text:p text:style-name="P15">Exercice 8 :</text:p>
        <text:p text:style-name="P23">BUS est un triangle rectangle en B tel que : <text:line-break/>BS= 6cm et SU=9 cm</text:p>
        <text:p text:style-name="P23">Calculer la longueur UB, arrondie au millimètre près.</text:p>
        <text:p text:style-name="P23"/>
        <text:p text:style-name="P16">Exercice 9 :</text:p>
        <text:p text:style-name="P27">ABC est un triangle rectangle en A tel que :<text:line-break/>AB= 3cm et AC= 1cm.</text:p>
        <text:p text:style-name="P27">a) Joseph a écrit « BC²=6+2 ; BC²=8 donc BC=4 cm »<text:line-break/>Indique et analyse ses erreurs.</text:p>
        <text:p text:style-name="P27">b) Calcule BC² puis en utilisant la touche racine carrée de la calculatrice, donne la valeur de BC approchée par défaut au millimètre près.</text:p>
      </text:section>
      <text:p text:style-name="P17"><text:soft-page-break/>Exercice 1<text:span text:style-name="T14">0</text:span> :</text:p>
      <text:p text:style-name="P28">MER est un triangle rectangle en E.</text:p>
      <text:p text:style-name="P28"><draw:frame draw:style-name="fr2" draw:name="Image6" text:anchor-type="paragraph" svg:x="0.286cm" svg:y="0cm" svg:width="12.039cm" svg:height="5.741cm" draw:z-index="5"><draw:image xlink:href="Pictures/10000000000001C7000000D991764523743C0CDB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a) Écris l’égalité de Pythagore pour ce triangle.</text:p>
      <text:p text:style-name="P28">b) Le tableau suivant présente plusieurs cas de dimensions du triangle MER. Complète-le en écrivant le détail de tes calculs (tu arrondiras au dixième si nécessaire) :</text:p>
      <table:table table:name="Tableau3" table:style-name="Tableau3">
        <table:table-column table:style-name="Tableau3.A" table:number-columns-repeated="5"/>
        <table:table-column table:style-name="Tableau3.F"/>
        <table:table-row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7">n°1</text:p>
          </table:table-cell>
          <table:table-cell table:style-name="Tableau3.A1" office:value-type="string">
            <text:p text:style-name="P7">n°2</text:p>
          </table:table-cell>
          <table:table-cell table:style-name="Tableau3.A1" office:value-type="string">
            <text:p text:style-name="P7">n°3</text:p>
          </table:table-cell>
          <table:table-cell table:style-name="Tableau3.A1" office:value-type="string">
            <text:p text:style-name="P7">n°4</text:p>
          </table:table-cell>
          <table:table-cell table:style-name="Tableau3.F1" office:value-type="string">
            <text:p text:style-name="P7">n°5</text:p>
          </table:table-cell>
        </table:table-row>
        <table:table-row>
          <table:table-cell table:style-name="Tableau3.A2" office:value-type="string">
            <text:p text:style-name="P7">MR</text:p>
          </table:table-cell>
          <table:table-cell table:style-name="Tableau3.A2" office:value-type="string">
            <text:p text:style-name="P5">….</text:p>
          </table:table-cell>
          <table:table-cell table:style-name="Tableau3.A2" office:value-type="string">
            <text:p text:style-name="P5">….</text:p>
          </table:table-cell>
          <table:table-cell table:style-name="Tableau3.A2" office:value-type="string">
            <text:p text:style-name="P7">5,3 cm</text:p>
          </table:table-cell>
          <table:table-cell table:style-name="Tableau3.A2" office:value-type="string">
            <text:p text:style-name="P7">9,1 cm</text:p>
          </table:table-cell>
          <table:table-cell table:style-name="Tableau3.F2" office:value-type="string">
            <text:p text:style-name="P7">7 m</text:p>
          </table:table-cell>
        </table:table-row>
        <table:table-row>
          <table:table-cell table:style-name="Tableau3.A2" office:value-type="string">
            <text:p text:style-name="P7">RE</text:p>
          </table:table-cell>
          <table:table-cell table:style-name="Tableau3.A2" office:value-type="string">
            <text:p text:style-name="P7">15 cm</text:p>
          </table:table-cell>
          <table:table-cell table:style-name="Tableau3.A2" office:value-type="string">
            <text:p text:style-name="P7">36 cm</text:p>
          </table:table-cell>
          <table:table-cell table:style-name="Tableau3.A2" office:value-type="string">
            <text:p text:style-name="P5">….</text:p>
          </table:table-cell>
          <table:table-cell table:style-name="Tableau3.A2" office:value-type="string">
            <text:p text:style-name="P7">9 cm</text:p>
          </table:table-cell>
          <table:table-cell table:style-name="Tableau3.F2" office:value-type="string">
            <text:p text:style-name="P5">… <text:span text:style-name="T8">m</text:span></text:p>
          </table:table-cell>
        </table:table-row>
        <table:table-row>
          <table:table-cell table:style-name="Tableau3.A2" office:value-type="string">
            <text:p text:style-name="P7">ME</text:p>
          </table:table-cell>
          <table:table-cell table:style-name="Tableau3.A2" office:value-type="string">
            <text:p text:style-name="P7">8 cm</text:p>
          </table:table-cell>
          <table:table-cell table:style-name="Tableau3.A2" office:value-type="string">
            <text:p text:style-name="P7">7,7 dm</text:p>
          </table:table-cell>
          <table:table-cell table:style-name="Tableau3.A2" office:value-type="string">
            <text:p text:style-name="P7">2,8 cm</text:p>
          </table:table-cell>
          <table:table-cell table:style-name="Tableau3.A2" office:value-type="string">
            <text:p text:style-name="P5">…</text:p>
          </table:table-cell>
          <table:table-cell table:style-name="Tableau3.F2" office:value-type="string">
            <text:p text:style-name="P7">53 cm</text:p>
          </table:table-cell>
        </table:table-row>
      </table:table>
      <text:p text:style-name="P28"/>
      <text:p text:style-name="P33">Exercice 11 :</text:p>
      <text:p text:style-name="P29">Théo veut franchir, avec une échelle, un mur de 3,50m de haut devant lequel se trouve un fossé rempli d’eau, d’une largeur de 1,15m.</text:p>
      <text:p text:style-name="P29">a) Fais un schéma de la situation.</text:p>
      <text:p text:style-name="P29">b) Il doit poser l’échelle sur le sommet du mur. Quelle doit être la longueur minimum de cette échelle ? Arrondis au cm.</text:p>
      <text:p text:style-name="P29"/>
      <text:p text:style-name="P33">Exercice 12 :</text:p>
      <text:p text:style-name="P30">TSF est un triangle isocèle en S tel que ST= 4,5 cm et TF=5,4 cm.</text:p>
      <text:p text:style-name="P30">a. Calcule la longueur de la hauteur relative à la base [TF].</text:p>
      <text:p text:style-name="P30">b. Déduis-en l’aire de ce triangle.</text:p>
      <text:p text:style-name="P30"/>
      <text:p text:style-name="P34">Exercice 13 :<text:span text:style-name="T4"> Dans chacun des cas ci_dessous,….</text:span></text:p>
      <text:p text:style-name="P34"><text:span text:style-name="T4">- identifie le plus long côté du triangle EFG ;</text:span></text:p>
      <text:p text:style-name="P34"><text:soft-page-break/><text:span text:style-name="T4">- calcule, d’une part, le carré de la longueur de ce côté ;</text:span></text:p>
      <text:p text:style-name="P34"><text:span text:style-name="T4">- calcule, d’autre part, la somme des carrés des longueurs des deux autres côtés ;</text:span></text:p>
      <text:p text:style-name="P34"><text:span text:style-name="T4">- compare les résultats obtenus et conclus.</text:span></text:p>
      <text:p text:style-name="P34"><text:span text:style-name="T4">a) EF=4,5 cm ; FG= 6cm ; EG= 7,5 cm.</text:span></text:p>
      <text:p text:style-name="P34"><text:span text:style-name="T4">b) </text:span><text:span text:style-name="T5">EF= 3,6 cm ; FG= 6cm ; EG= 7 cm.</text:span></text:p>
      <text:p text:style-name="P35"><text:span text:style-name="T4">c) FG= 64 mm ; EF= 72 mm ; EG= 65 mm.</text:span></text:p>
      <text:p text:style-name="P35"><text:span text:style-name="T4">d) EF= 3,2 dam ; FG= 25,6 m ; EG= 19,2 m.</text:span></text:p>
      <text:p text:style-name="P35"><text:span text:style-name="T4"/></text:p>
      <text:p text:style-name="P35">Exercice 14 :<text:span text:style-name="T4"> </text:span><text:span text:style-name="T6">COMPAS</text:span></text:p>
      <text:p text:style-name="P35"><text:span text:style-name="T4">Le triangle OUI est tel que : UI= 5 cm ; UO=1,4 cm et OI= 4,8 cm.</text:span></text:p>
      <text:p text:style-name="P35"><text:span text:style-name="T4">a. </text:span><text:span text:style-name="T7">Construis ce triangle en vraie grandeur.</text:span></text:p>
      <text:p text:style-name="P36"><text:span text:style-name="T4">b. Par la symétrie de centre O, construis les points T et N symétriques respectifs des points U et I.</text:span></text:p>
      <text:p text:style-name="P36"><text:span text:style-name="T4">c. Quelle semble être la nature de NUIT ? Démontre ta conjecture.</text:span></text:p>
      <text:p text:style-name="P36"><text:span text:style-name="T4"/></text:p>
      <text:p text:style-name="P36">Exercice 15 :</text:p>
      <text:p text:style-name="P35"><text:span text:style-name="T4">A</text:span><text:span text:style-name="T7">BC est un triangle rectangle en B tel que : AB=5cm et AC= 8 cm.</text:span></text:p>
      <text:p text:style-name="P36"><text:span text:style-name="T4">a. Calcule BC (arrondis au mm).</text:span></text:p>
      <text:p text:style-name="P36"><text:span text:style-name="T4">b. D est un point tel que : CD=20 cm et BD= 19cm. D est-il unique ?</text:span></text:p>
      <text:p text:style-name="P36"><text:span text:style-name="T4">c. Montre que le triangle BCD est rectangle. Précise en quel point.</text:span></text:p>
      <text:p text:style-name="P36"><text:span text:style-name="T4">d. Déduis-en que les points A, B et D sont alignés.</text:span></text:p>
      <text:p text:style-name="P36"><text:span text:style-name="T4"/></text:p>
      <text:p text:style-name="P37">Exercice 16 :</text:p>
      <text:p text:style-name="P31">D<text:span text:style-name="T15">eux droites (d</text:span><text:span text:style-name="T17">1</text:span><text:span text:style-name="T19">) et (d</text:span><text:span text:style-name="T17">2</text:span><text:span text:style-name="T19">) sont sécantes en O ;</text:span></text:p>
      <text:p text:style-name="P32"><text:span text:style-name="T18">M est un point de (d</text:span><text:span text:style-name="T16">1</text:span><text:span text:style-name="T18">) tel que : OM=11,9 cm et N est un point de (d</text:span><text:span text:style-name="T16">2</text:span><text:span text:style-name="T18">) tel que : ON= 12 cm. On sait d’autre part que : MN= 16,9 cm.</text:span></text:p>
      <text:p text:style-name="P32"><text:span text:style-name="T18">Démontre que les droites (d</text:span><text:span text:style-name="T16">1</text:span><text:span text:style-name="T18">) et (d</text:span><text:span text:style-name="T16">2</text:span><text:span text:style-name="T18">) sont perpendiculai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Dyslexic" svg:font-family="OpenDyslexic"/>
    <style:font-face style:name="Arial1" svg:font-family="Arial" style:font-family-generic="swiss"/>
    <style:font-face style:name="OpenDyslexic1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21:25:20.344000000</meta:creation-date>
    <dc:date>2020-09-24T22:03:48.433000000</dc:date>
    <meta:editing-duration>PT15M11S</meta:editing-duration>
    <meta:editing-cycles>3</meta:editing-cycles>
    <meta:generator>LibreOffice/6.2.3.2$Windows_X86_64 LibreOffice_project/aecc05fe267cc68dde00352a451aa867b3b546ac</meta:generator>
    <meta:document-statistic meta:table-count="5" meta:image-count="7" meta:object-count="0" meta:page-count="5" meta:paragraph-count="133" meta:word-count="892" meta:character-count="4469" meta:non-whitespace-character-count="3614"/>
  </office:meta>
</office:document-meta>
</file>