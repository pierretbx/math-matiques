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A0000022DA9E146884E41951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OpenDyslexic" style:text-underline-style="solid" style:text-underline-width="auto" style:text-underline-color="font-color" officeooo:rsid="00011e1a" officeooo:paragraph-rsid="00011e1a"/>
    </style:style>
    <style:style style:name="P2" style:family="paragraph" style:parent-style-name="Standard">
      <style:text-properties style:font-name="OpenDyslexic" style:text-underline-style="solid" style:text-underline-width="auto" style:text-underline-color="font-color" officeooo:rsid="00018488" officeooo:paragraph-rsid="00018488"/>
    </style:style>
    <style:style style:name="P3" style:family="paragraph" style:parent-style-name="Standard">
      <style:text-properties style:font-name="OpenDyslexic" style:text-underline-style="none" officeooo:rsid="00011e1a" officeooo:paragraph-rsid="00011e1a"/>
    </style:style>
    <style:style style:name="P4" style:family="paragraph" style:parent-style-name="Standard">
      <style:text-properties style:font-name="OpenDyslexic" style:text-underline-style="none" officeooo:rsid="00018488" officeooo:paragraph-rsid="00018488"/>
    </style:style>
    <style:style style:name="P5" style:family="paragraph" style:parent-style-name="Table_20_Contents">
      <style:text-properties style:font-name="OpenDyslexic" officeooo:rsid="00011e1a" officeooo:paragraph-rsid="00011e1a"/>
    </style:style>
    <style:style style:name="P6" style:family="paragraph" style:parent-style-name="Table_20_Contents">
      <style:paragraph-properties fo:text-align="center" style:justify-single-word="false"/>
      <style:text-properties style:font-name="OpenDyslexic" officeooo:rsid="00018488" officeooo:paragraph-rsid="00018488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Collège J.Brel <text:s text:c="74"/>4ème</text:p>
            <text:p text:style-name="P5">Travail en groupe <text:s text:c="21"/>Exercices</text:p>
          </table:table-cell>
        </table:table-row>
      </table:table>
      <text:p text:style-name="P1">Consigne :<text:span text:style-name="T1"> Vous devez vous mettre par deux et faire les exercices suivants sur une copie double que vous remettrez à la fin de l’heure. Sur la copie double je veux les deux écritures.</text:span></text:p>
      <text:p text:style-name="P1"><text:span text:style-name="T1"/></text:p>
      <text:p text:style-name="P1">Exercice 1 :</text:p>
      <text:p text:style-name="P1"><text:span text:style-name="T1">a. Lors d’une élection, dans une commune où 480 votes ont été exprimés, une candidate a obtenu 11,25 % des voix. Calcule le nombre de personnes qui ont voté pour elle.</text:span></text:p>
      <text:p text:style-name="P1"><text:span text:style-name="T1">b. Pour la même élection, un autre candidat a obtenu 132 voix. Calcule le pourcentage de votes exprimés pour ce candidat.</text:span></text:p>
      <text:p text:style-name="P1"><text:span text:style-name="T1"/></text:p>
      <text:p text:style-name="P1">Exercice 2 :</text:p>
      <text:p text:style-name="P3">Sur 720 000 jeunes sortis du système éducatif 8 % sont sans diplôme et 13 % ont au moins réussi le bac.</text:p>
      <text:p text:style-name="P3">Quatre ans plus tard, 32 % des « sans diplôme » et 18 % des simples bacheliers sont au chômage.</text:p>
      <text:p text:style-name="P3">Calcule le nombre de chômeurs de chaque catégorie.</text:p>
      <text:p text:style-name="P3"/>
      <text:p text:style-name="P1">Exercice 3 :</text:p>
      <text:p text:style-name="P3">On compte environ 25 823 000 actifs en France en 2016.</text:p>
      <text:p text:style-name="P3">a. Sachant qu’il y <text:s/>a environ 2,8 % d’agriculteurs, quel est leur nombre approximatif ?</text:p>
      <text:p text:style-name="P3">b. Le nombre de personnes travaillant en 2016 dans la construction est d’environ 1 704 300 personnes. Calcule leur pourcentage à 0,1 % près par rapport au nombre d’actifs.</text:p>
      <text:p text:style-name="P3"/>
      <text:p text:style-name="P1">Exercice 4 :</text:p>
      <text:p text:style-name="P3">Introduit en Australie en 1935 pour lutter contre les insectes rongeant la canne à sucre, le crapaud buffle, qui est venimeux, ravage désormais la faune locale.</text:p>
      <text:p text:style-name="P3">a. La taille des 100 spécimens introduits à l’origine était au maximum de 14 cm mais un spécimen de 38 cm a été capturé en 2007. De quel <text:soft-page-break/>pourcentage sa taille a-t-elle augmenté ?</text:p>
      <text:p text:style-name="P3">b. Une estimation actuelle donne une population de crapauds buffles en Australie de l’ordre de 200 millions d’individus. De quel pourcentage leur nombre a-t-il augmenté par rapport à 1935 ?</text:p>
      <text:p text:style-name="P3"/>
      <text:p text:style-name="P2">Exercice 5 :</text:p>
      <text:p text:style-name="P4">1) Convertir les vitesses ci-dessous en km/h.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6">Randonneur expérimenté </text:p>
          </table:table-cell>
          <table:table-cell table:style-name="Tableau2.B1" office:value-type="string">
            <text:p text:style-name="P6">3s pour 5 m</text:p>
          </table:table-cell>
        </table:table-row>
        <table:table-row>
          <table:table-cell table:style-name="Tableau2.A2" office:value-type="string">
            <text:p text:style-name="P6">Guépard en chasse</text:p>
          </table:table-cell>
          <table:table-cell table:style-name="Tableau2.B2" office:value-type="string">
            <text:p text:style-name="P6">270 m en 9s</text:p>
          </table:table-cell>
        </table:table-row>
        <table:table-row>
          <table:table-cell table:style-name="Tableau2.A2" office:value-type="string">
            <text:p text:style-name="P6">Faucon pèlerin en piqué</text:p>
          </table:table-cell>
          <table:table-cell table:style-name="Tableau2.B2" office:value-type="string">
            <text:p text:style-name="P6">150 m en 3 s </text:p>
          </table:table-cell>
        </table:table-row>
        <table:table-row>
          <table:table-cell table:style-name="Tableau2.A2" office:value-type="string">
            <text:p text:style-name="P6">Escargot motivé</text:p>
          </table:table-cell>
          <table:table-cell table:style-name="Tableau2.B2" office:value-type="string">
            <text:p text:style-name="P6">12 cm par minute</text:p>
          </table:table-cell>
        </table:table-row>
        <table:table-row>
          <table:table-cell table:style-name="Tableau2.A2" office:value-type="string">
            <text:p text:style-name="P6">Boeing 747 au décollage</text:p>
          </table:table-cell>
          <table:table-cell table:style-name="Tableau2.B2" office:value-type="string">
            <text:p text:style-name="P6">69 m par seconde</text:p>
          </table:table-cell>
        </table:table-row>
        <table:table-row>
          <table:table-cell table:style-name="Tableau2.A2" office:value-type="string">
            <text:p text:style-name="P6">Record d’Usain Bolt en 2009</text:p>
          </table:table-cell>
          <table:table-cell table:style-name="Tableau2.B2" office:value-type="string">
            <text:p text:style-name="P6">9,58 s sur 100 m</text:p>
          </table:table-cell>
        </table:table-row>
        <table:table-row>
          <table:table-cell table:style-name="Tableau2.A2" office:value-type="string">
            <text:p text:style-name="P6">Espadon Voilier</text:p>
          </table:table-cell>
          <table:table-cell table:style-name="Tableau2.B2" office:value-type="string">
            <text:p text:style-name="P6">11,2 km en 6 min</text:p>
          </table:table-cell>
        </table:table-row>
        <table:table-row>
          <table:table-cell table:style-name="Tableau2.A2" office:value-type="string">
            <text:p text:style-name="P6">Boa Constrictor</text:p>
          </table:table-cell>
          <table:table-cell table:style-name="Tableau2.B2" office:value-type="string">
            <text:p text:style-name="P6">23 m en 4 min</text:p>
          </table:table-cell>
        </table:table-row>
        <table:table-row>
          <table:table-cell table:style-name="Tableau2.A2" office:value-type="string">
            <text:p text:style-name="P6">Limace sportive</text:p>
          </table:table-cell>
          <table:table-cell table:style-name="Tableau2.B2" office:value-type="string">
            <text:p text:style-name="P6">30 min par mètre</text:p>
          </table:table-cell>
        </table:table-row>
        <table:table-row>
          <table:table-cell table:style-name="Tableau2.A2" office:value-type="string">
            <text:p text:style-name="P6">Lièvre en pleine course</text:p>
          </table:table-cell>
          <table:table-cell table:style-name="Tableau2.B2" office:value-type="string">
            <text:p text:style-name="P6">1,2 km/min</text:p>
          </table:table-cell>
        </table:table-row>
        <table:table-row>
          <table:table-cell table:style-name="Tableau2.A2" office:value-type="string">
            <text:p text:style-name="P6">Lévrier en cynodrome</text:p>
          </table:table-cell>
          <table:table-cell table:style-name="Tableau2.B2" office:value-type="string">
            <text:p text:style-name="P6">20,6 m/s</text:p>
          </table:table-cell>
        </table:table-row>
        <table:table-row>
          <table:table-cell table:style-name="Tableau2.A2" office:value-type="string">
            <text:p text:style-name="P6">Autruche en fuite</text:p>
          </table:table-cell>
          <table:table-cell table:style-name="Tableau2.B2" office:value-type="string">
            <text:p text:style-name="P6">16,2 km en 10 min</text:p>
          </table:table-cell>
        </table:table-row>
        <table:table-row>
          <table:table-cell table:style-name="Tableau2.A2" office:value-type="string">
            <text:p text:style-name="P6">Record du TGV en 2007</text:p>
          </table:table-cell>
          <table:table-cell table:style-name="Tableau2.B2" office:value-type="string">
            <text:p text:style-name="P6">638 m en 4s</text:p>
          </table:table-cell>
        </table:table-row>
        <table:table-row>
          <table:table-cell table:style-name="Tableau2.A2" office:value-type="string">
            <text:p text:style-name="P6">Vitesse d’une tornade</text:p>
          </table:table-cell>
          <table:table-cell table:style-name="Tableau2.B2" office:value-type="string">
            <text:p text:style-name="P6">130 m par seconde</text:p>
          </table:table-cell>
        </table:table-row>
        <table:table-row>
          <table:table-cell table:style-name="Tableau2.A2" office:value-type="string">
            <text:p text:style-name="P6">Rotation de la terre à l’équateur</text:p>
          </table:table-cell>
          <table:table-cell table:style-name="Tableau2.B2" office:value-type="string">
            <text:p text:style-name="P6">464 m/s</text:p>
          </table:table-cell>
        </table:table-row>
        <table:table-row>
          <table:table-cell table:style-name="Tableau2.A2" office:value-type="string">
            <text:p text:style-name="P6">Rotation de la Terre autour du Soleil</text:p>
          </table:table-cell>
          <table:table-cell table:style-name="Tableau2.B2" office:value-type="string">
            <text:p text:style-name="P6">29,8 km/s</text:p>
          </table:table-cell>
        </table:table-row>
        <table:table-row>
          <table:table-cell table:style-name="Tableau2.A2" office:value-type="string">
            <text:p text:style-name="P6">Rotation de la Terre autour du Soleil</text:p>
          </table:table-cell>
          <table:table-cell table:style-name="Tableau2.B2" office:value-type="string">
            <text:p text:style-name="P6">29,8 km/s</text:p>
          </table:table-cell>
        </table:table-row>
      </table:table>
      <text:p text:style-name="P4"><text:soft-page-break/>2) Découper les vignettes associées en les rangeant dans l’ordre croissant.</text:p>
      <text:p text:style-name="P1"><draw:frame draw:style-name="fr1" draw:name="Image1" text:anchor-type="paragraph" svg:width="17cm" svg:height="12.171cm" draw:z-index="0"><draw:image xlink:href="Pictures/100000000000030A0000022DA9E146884E41951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09:36:11.855000000</meta:creation-date>
    <dc:date>2020-10-16T10:51:54.358000000</dc:date>
    <meta:editing-duration>PT40M40S</meta:editing-duration>
    <meta:editing-cycles>1</meta:editing-cycles>
    <meta:document-statistic meta:table-count="2" meta:image-count="1" meta:object-count="0" meta:page-count="3" meta:paragraph-count="55" meta:word-count="448" meta:character-count="2477" meta:non-whitespace-character-count="1986"/>
    <meta:generator>LibreOffice/6.2.3.2$Windows_X86_64 LibreOffice_project/aecc05fe267cc68dde00352a451aa867b3b546ac</meta:generator>
  </office:meta>
</office:document-meta>
</file>