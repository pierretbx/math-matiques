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B000000D429822B33348467C1.png" manifest:media-type="image/png"/>
  <manifest:file-entry manifest:full-path="Pictures/100000000000020A0000015954A942E54043AE24.png" manifest:media-type="image/png"/>
  <manifest:file-entry manifest:full-path="Pictures/1000000000000120000000BB0D5D2E747C7277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Graphecrit" svg:font-family="Graphecrit" style:font-pitch="variable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OpenDyslexic" officeooo:rsid="000692c1" officeooo:paragraph-rsid="0005d7f4"/>
    </style:style>
    <style:style style:name="P2" style:family="paragraph" style:parent-style-name="Standard">
      <style:text-properties style:font-name="OpenDyslexic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05d7f4" officeooo:paragraph-rsid="0005d7f4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06affe" officeooo:paragraph-rsid="0006affe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07b531" officeooo:paragraph-rsid="0007b531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07e123" officeooo:paragraph-rsid="0007e123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097438" officeooo:paragraph-rsid="00097438"/>
    </style:style>
    <style:style style:name="P8" style:family="paragraph" style:parent-style-name="Standard">
      <style:text-properties style:font-name="OpenDyslexic" style:text-underline-style="none" officeooo:rsid="0006affe" officeooo:paragraph-rsid="0006affe"/>
    </style:style>
    <style:style style:name="P9" style:family="paragraph" style:parent-style-name="Standard">
      <style:text-properties style:font-name="OpenDyslexic" style:text-underline-style="none" officeooo:rsid="0007b531" officeooo:paragraph-rsid="0007b531"/>
    </style:style>
    <style:style style:name="P10" style:family="paragraph" style:parent-style-name="Standard">
      <style:text-properties style:font-name="OpenDyslexic" style:text-underline-style="none" officeooo:rsid="0007b531" officeooo:paragraph-rsid="0007e123"/>
    </style:style>
    <style:style style:name="P11" style:family="paragraph" style:parent-style-name="Standard">
      <style:text-properties style:font-name="OpenDyslexic" style:text-underline-style="none" officeooo:rsid="0007e123" officeooo:paragraph-rsid="0007e123"/>
    </style:style>
    <style:style style:name="P12" style:family="paragraph" style:parent-style-name="Standard">
      <style:text-properties style:font-name="OpenDyslexic" style:text-underline-style="none" officeooo:rsid="00097438" officeooo:paragraph-rsid="00097438"/>
    </style:style>
    <style:style style:name="T1" style:family="text">
      <style:text-properties officeooo:rsid="00144547"/>
    </style:style>
    <style:style style:name="T2" style:family="text">
      <style:text-properties officeooo:rsid="0005d7f4"/>
    </style:style>
    <style:style style:name="T3" style:family="text">
      <style:text-properties style:font-name="Graphecrit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Graphecrit" fo:font-size="18pt" fo:font-weight="bold" officeooo:rsid="0007e123" style:font-size-asian="18pt" style:font-weight-asian="bold" style:font-size-complex="18pt" style:font-weight-complex="bold"/>
    </style:style>
    <style:style style:name="T5" style:family="text">
      <style:text-properties officeooo:rsid="0007e123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7e123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7b531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<text:span text:style-name="T1">J.Brel</text:span> <text:s text:c="73"/><text:span text:style-name="T1">4 </text:span>ème<text:line-break/>E<text:span text:style-name="T2">xercices </text:span><text:s text:c="7"/>Chapitre <text:span text:style-name="T2">5 :Triangle rectangle &amp; Cercle circonscrit</text:span></text:p>
          </table:table-cell>
        </table:table-row>
      </table:table>
      <text:p text:style-name="P2"/>
      <text:p text:style-name="P3">Exercice 1 :</text:p>
      <text:p text:style-name="P8"><draw:frame draw:style-name="fr1" draw:name="Image1" text:anchor-type="paragraph" svg:x="-1.328cm" svg:y="0.238cm" svg:width="7.911cm" svg:height="5.609cm" draw:z-index="0"><draw:image xlink:href="Pictures/100000000000012B000000D429822B33348467C1.png" xlink:type="simple" xlink:show="embed" xlink:actuate="onLoad" loext:mime-type="image/png"/></draw:frame>a) Quel est le centre du cercle circonscrit au triangle EFH ?</text:p>
      <text:p text:style-name="P8"/>
      <text:p text:style-name="P8">b) Quel est le centre du cercle circonscrit au triangle EHG ?</text:p>
      <text:p text:style-name="P8"/>
      <text:p text:style-name="P8"/>
      <text:p text:style-name="P8"/>
      <text:p text:style-name="P4">Exercice 2 :</text:p>
      <text:p text:style-name="P8">BIEN est un rectangle de centre M.</text:p>
      <text:p text:style-name="P8">a. Que représente le point M pour le segment [EB] ? Justifie.</text:p>
      <text:p text:style-name="P8">b. Quel est le centre du cercle circonscrit au triangle BIE ? Pourquoi ?</text:p>
      <text:p text:style-name="P8">c. Pourquoi N appartient-il aussi à ce cercle ?</text:p>
      <text:p text:style-name="P8"/>
      <text:p text:style-name="P4">Exercice 3 :</text:p>
      <text:p text:style-name="P8">Soient ABC et BCD deux triangles rectangles respectivement en A et en D. Démontre que les points A et D appartiennent au cercle de diamètre [BC].</text:p>
      <text:p text:style-name="P8"/>
      <text:p text:style-name="P4"><draw:frame draw:style-name="fr1" draw:name="Image2" text:anchor-type="paragraph" svg:x="3.122cm" svg:y="0.291cm" svg:width="11.55cm" svg:height="7.634cm" draw:z-index="1"><draw:image xlink:href="Pictures/100000000000020A0000015954A942E54043AE24.png" xlink:type="simple" xlink:show="embed" xlink:actuate="onLoad" loext:mime-type="image/png"/></draw:frame>Exercice 4 :</text:p>
      <text:p text:style-name="P8">BO= 4 cm ;</text:p>
      <text:p text:style-name="P8">OA= 6 cm :</text:p>
      <text:p text:style-name="P8">BA = 3 cm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. Fais une figure en vraie grandeur</text:p>
      <text:p text:style-name="P9"><text:soft-page-break/>b. Démontre que le point M appartient au cercle de diamètre [OA].</text:p>
      <text:p text:style-name="P9">c. Démontre que les points M, O, N et A sont sur un même cercle dont tu préciseras le centre et le rayon.</text:p>
      <text:p text:style-name="P9"/>
      <text:p text:style-name="P5">Exercice 5 :</text:p>
      <text:p text:style-name="P10">Construis un cercle (<text:span text:style-name="T4">C</text:span><text:span text:style-name="T5">) de centre I et de rayon 5 cm. Place un point P sur (</text:span><text:span text:style-name="T4">C</text:span><text:span text:style-name="T7">) et trace un diamètre [MN] de </text:span><text:span text:style-name="T6">(</text:span><text:span text:style-name="T4">C</text:span><text:span text:style-name="T7">).</text:span></text:p>
      <text:p text:style-name="P11"><text:span text:style-name="T6">Quelle est la nature du triangle MNP ? Pourquoi ?</text:span></text:p>
      <text:p text:style-name="P11"><text:span text:style-name="T6"/></text:p>
      <text:p text:style-name="P6"><text:span text:style-name="T6">Exercice 6 :</text:span></text:p>
      <text:p text:style-name="P11"><text:span text:style-name="T6">R, I et O sont trois points alignés dans cet ordre. </text:span><text:span text:style-name="T8">(</text:span><text:span text:style-name="T3">C</text:span><text:span text:style-name="T6">) est le cercle de diamètre [RI] et </text:span><text:span text:style-name="T8">(</text:span><text:span text:style-name="T3">C ’</text:span><text:span text:style-name="T6">) est le cercle de diamètre [IO]. Soit A un point de </text:span><text:span text:style-name="T8">(</text:span><text:span text:style-name="T3">C</text:span><text:span text:style-name="T6">) différent de I et R. La droite (AI) coupe </text:span><text:span text:style-name="T8">(</text:span><text:span text:style-name="T3">C ’</text:span><text:span text:style-name="T6">) en B.</text:span></text:p>
      <text:p text:style-name="P11"><text:span text:style-name="T6">a. Fais une figure.</text:span></text:p>
      <text:p text:style-name="P11"><text:span text:style-name="T6">d. Démontre que les droites (RA) et (BO) sont parallèles.</text:span></text:p>
      <text:p text:style-name="P11"><text:span text:style-name="T6"/></text:p>
      <text:p text:style-name="P6"><text:span text:style-name="T6">Exercice 7 :</text:span></text:p>
      <text:p text:style-name="P11"><text:span text:style-name="T6">Soit IBC un triangle rectangle en C. Soit M le milieu de [IB].</text:span></text:p>
      <text:p text:style-name="P11"><text:span text:style-name="T6">Quelle est la nature du triangle MIC ? Justifie ta réponse.</text:span></text:p>
      <text:p text:style-name="P11"><text:span text:style-name="T6"/></text:p>
      <text:p text:style-name="P7"><text:span text:style-name="T6">Exercice 8 :</text:span></text:p>
      <text:p text:style-name="P12"><text:span text:style-name="T6">Le triangle ROD est tel que RD=8,5 cm ; RO=1,3 cm et DO=8,4 cm.</text:span></text:p>
      <text:p text:style-name="P12"><text:span text:style-name="T6">a. Fais une figure en vraie grandeur. Ce triangle est-il rectangle ? Justifie ta réponse.</text:span></text:p>
      <text:p text:style-name="P12"><text:span text:style-name="T6">b. Place un point N tel que RN=7,7 cm et DN=3,6 cm.</text:span></text:p>
      <text:p text:style-name="P12"><text:span text:style-name="T6">Les points R, O, N et D sont-ils sur un même cercle ? Justifie ta réponse.</text:span></text:p>
      <text:p text:style-name="P12"><text:span text:style-name="T6"/></text:p>
      <text:p text:style-name="P7"><text:span text:style-name="T6">Exercice 9 :</text:span></text:p>
      <text:p text:style-name="P12"><draw:frame draw:style-name="fr1" draw:name="Image3" text:anchor-type="paragraph" svg:x="4.902cm" svg:y="1.111cm" svg:width="7.62cm" svg:height="4.948cm" draw:z-index="2"><draw:image xlink:href="Pictures/1000000000000120000000BB0D5D2E747C7277B5.png" xlink:type="simple" xlink:show="embed" xlink:actuate="onLoad" loext:mime-type="image/png"/></draw:frame><text:span text:style-name="T6">Calcule, en justifiant, la valeur approchée par défaut de EF au centième près.</text:span></text:p>
      <text:p text:style-name="P12"><text:span text:style-name="T6"/></text:p>
      <text:p text:style-name="P1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Graphecrit" svg:font-family="Graphecrit" style:font-pitch="variable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5:19:58.220000000</meta:creation-date>
    <dc:date>2020-10-31T16:29:06.017000000</dc:date>
    <meta:editing-duration>PT31S</meta:editing-duration>
    <meta:editing-cycles>1</meta:editing-cycles>
    <meta:document-statistic meta:table-count="1" meta:image-count="3" meta:object-count="0" meta:page-count="2" meta:paragraph-count="35" meta:word-count="374" meta:character-count="1904" meta:non-whitespace-character-count="1485"/>
    <meta:generator>LibreOffice/6.2.3.2$Windows_X86_64 LibreOffice_project/aecc05fe267cc68dde00352a451aa867b3b546ac</meta:generator>
  </office:meta>
</office:document-meta>
</file>