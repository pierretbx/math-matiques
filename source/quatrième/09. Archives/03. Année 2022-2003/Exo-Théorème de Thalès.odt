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201000002A10000024715EAE40027D0BC43.png" manifest:media-type="image/png"/>
  <manifest:file-entry manifest:full-path="Pictures/10000201000002A10000025109CF08585D36808B.png" manifest:media-type="image/png"/>
  <manifest:file-entry manifest:full-path="Pictures/100002010000020D00000103F926DF63A819AFD0.png" manifest:media-type="image/png"/>
  <manifest:file-entry manifest:full-path="Pictures/1000020100000195000000C67CC5E3FCF29F0716.png" manifest:media-type="image/png"/>
  <manifest:file-entry manifest:full-path="Pictures/1000020100000296000001D097C093F405988CD4.png" manifest:media-type="image/png"/>
  <manifest:file-entry manifest:full-path="Pictures/100002010000029C0000016DE8D60576222F2DE0.png" manifest:media-type="image/png"/>
  <manifest:file-entry manifest:full-path="Pictures/10000201000002A3000001858DABA1702E6FDF2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OpenDyslexic" officeooo:rsid="00111cc9" officeooo:paragraph-rsid="00111cc9"/>
    </style:style>
    <style:style style:name="P2" style:family="paragraph" style:parent-style-name="Standard">
      <style:text-properties style:font-name="OpenDyslexic" style:text-underline-style="solid" style:text-underline-width="auto" style:text-underline-color="font-color" officeooo:rsid="00111cc9" officeooo:paragraph-rsid="00111cc9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12d6a4" officeooo:paragraph-rsid="0012d6a4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13d626" officeooo:paragraph-rsid="0012d6a4"/>
    </style:style>
    <style:style style:name="P5" style:family="paragraph" style:parent-style-name="Standard">
      <style:text-properties style:font-name="OpenDyslexic" style:text-underline-style="none" officeooo:rsid="00111cc9" officeooo:paragraph-rsid="00111cc9"/>
    </style:style>
    <style:style style:name="P6" style:family="paragraph" style:parent-style-name="Standard">
      <style:text-properties style:font-name="OpenDyslexic" style:text-underline-style="none" officeooo:rsid="0012d6a4" officeooo:paragraph-rsid="0012d6a4"/>
    </style:style>
    <style:style style:name="T1" style:family="text">
      <style:text-properties officeooo:rsid="0014dfc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Collège J.Brel <text:s text:c="71"/>4ème</text:p>
            <text:p text:style-name="P1">Exercice <text:s text:c="25"/>Chapitre 1<text:span text:style-name="T1">1</text:span> : Théorème de Thalès</text:p>
          </table:table-cell>
        </table:table-row>
      </table:table>
      <text:p text:style-name="Standard"/>
      <text:p text:style-name="P2">Exercice 1 :</text:p>
      <text:p text:style-name="P5">Dans quelle(s) figure(s) peux-tu démontrer que les droites (AB) et (MT) sont parallèles ? Justifier.</text:p>
      <text:p text:style-name="P2"><draw:frame draw:style-name="fr1" draw:name="Image1" text:anchor-type="paragraph" svg:width="17cm" svg:height="14.979cm" draw:z-index="0"><draw:image xlink:href="Pictures/10000201000002A10000025109CF08585D36808B.png" xlink:type="simple" xlink:show="embed" xlink:actuate="onLoad" loext:mime-type="image/png"/></draw:frame>Exercice 2 :</text:p>
      <text:p text:style-name="P5">Dans quelle(s) figure(s) peux-tu démontrer que le point J est le milieu de [BC] ? Justifie tes réponses. Les droites vertes sont parallèles (en gras).</text:p>
      <text:p text:style-name="P2"><draw:frame draw:style-name="fr2" draw:name="Image2" text:anchor-type="paragraph" svg:width="17cm" svg:height="14.727cm" draw:z-index="1"><draw:image xlink:href="Pictures/10000201000002A10000024715EAE40027D0BC43.png" xlink:type="simple" xlink:show="embed" xlink:actuate="onLoad" loext:mime-type="image/png"/></draw:frame><text:soft-page-break/>Exercice 3 :</text:p>
      <text:p text:style-name="P5">AOR est un triangle rectangle en O tel que AO=5 cm et OR=3,5 cm. Soit L le milieu de [AO] et S le milieu de [AR].</text:p>
      <text:p text:style-name="P5">a. Fais un dessin en vraie grandeur et code-le.</text:p>
      <text:p text:style-name="P5">b. Montre que (LS) est parallèle à (OR).</text:p>
      <text:p text:style-name="P5">c. Déduis-en que (LS) est perpendiculaire à (AO).</text:p>
      <text:p text:style-name="P5"/>
      <text:p text:style-name="P2">Exercice 4 :</text:p>
      <text:p text:style-name="P5">Jonathan a construit la figure suivante :</text:p>
      <text:p text:style-name="P5"><draw:frame draw:style-name="fr3" draw:name="Image3" text:anchor-type="paragraph" svg:width="13.892cm" svg:height="6.853cm" draw:z-index="2"><draw:image xlink:href="Pictures/100002010000020D00000103F926DF63A819AFD0.png" xlink:type="simple" xlink:show="embed" xlink:actuate="onLoad" loext:mime-type="image/png"/></draw:frame><text:soft-page-break/>Explique pourquoi la figure est fausse.</text:p>
      <text:p text:style-name="P5"/>
      <text:p text:style-name="P2">Exercice 5 :</text:p>
      <text:p text:style-name="P5">Écris toutes les égalités des rapports de longueurs dans chacun des cas suivants. Les droites vertes sont parallèles.</text:p>
      <text:p text:style-name="P3"><draw:frame draw:style-name="fr1" draw:name="Image4" text:anchor-type="paragraph" svg:width="17cm" svg:height="11.915cm" draw:z-index="3"><draw:image xlink:href="Pictures/1000020100000296000001D097C093F405988CD4.png" xlink:type="simple" xlink:show="embed" xlink:actuate="onLoad" loext:mime-type="image/png"/></draw:frame>Exercice 6 :</text:p>
      <text:p text:style-name="P6">Sur la figure ci-dessous, les droites (AB) et (TR) sont parallèles. On donne SA=4cm ; ST=15cm ; AB=2,4 cm et SR=7,5 cm.</text:p>
      <text:p text:style-name="P6"/>
      <text:p text:style-name="P6"><draw:frame draw:style-name="fr4" draw:name="Image5" text:anchor-type="paragraph" svg:width="10.717cm" svg:height="5.239cm" draw:z-index="4"><draw:image xlink:href="Pictures/1000020100000195000000C67CC5E3FCF29F0716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. Reporte les données sur le croquis.</text:p>
      <text:p text:style-name="P6">b. Pour calculer SB et RT, compléte :</text:p>
      <text:p text:style-name="P6">Dans le triangle ……., on sait que <draw:frame draw:style-name="fr6" draw:name="Objet1" text:anchor-type="as-char" svg:y="-0.527cm" svg:width="1.801cm" svg:height="0.739cm" draw:z-index="5"><draw:object xlink:href="./Object 1" xlink:type="simple" xlink:show="embed" xlink:actuate="onLoad"/><draw:image xlink:href="./ObjectReplacements/Object 1" xlink:type="simple" xlink:show="embed" xlink:actuate="onLoad"/></draw:frame>, <draw:frame draw:style-name="fr6" draw:name="Objet2" text:anchor-type="as-char" svg:y="-0.527cm" svg:width="1.489cm" svg:height="0.739cm" draw:z-index="6"><draw:object xlink:href="./Object 2" xlink:type="simple" xlink:show="embed" xlink:actuate="onLoad"/><draw:image xlink:href="./ObjectReplacements/Object 2" xlink:type="simple" xlink:show="embed" xlink:actuate="onLoad"/></draw:frame><text:s/>et (AB)//(……) donc d’après le théorème de Thales :</text:p>
      <text:p text:style-name="P6"/>
      <text:p text:style-name="P3">Exercice 7 :</text:p>
      <text:p text:style-name="P6">Dans chacun des cas suivants, les droites vertes sont parallèles.</text:p>
      <text:p text:style-name="P4"><draw:frame draw:style-name="fr1" draw:name="Image6" text:anchor-type="paragraph" svg:width="17cm" svg:height="9.287cm" draw:z-index="7"><draw:image xlink:href="Pictures/100002010000029C0000016DE8D60576222F2DE0.png" xlink:type="simple" xlink:show="embed" xlink:actuate="onLoad" loext:mime-type="image/png"/></draw:frame></text:p>
      <text:p text:style-name="P4"><draw:frame draw:style-name="fr5" draw:name="Image7" text:anchor-type="paragraph" svg:x="0.058cm" svg:y="0.22cm" svg:width="17cm" svg:height="9.795cm" draw:z-index="8"><draw:image xlink:href="Pictures/10000201000002A3000001858DABA1702E6FDF2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0T21:15:49.590000000</meta:creation-date>
    <dc:date>2021-06-11T09:57:06.204000000</dc:date>
    <meta:editing-duration>PT2M45S</meta:editing-duration>
    <meta:editing-cycles>2</meta:editing-cycles>
    <meta:generator>LibreOffice/6.2.3.2$Windows_X86_64 LibreOffice_project/aecc05fe267cc68dde00352a451aa867b3b546ac</meta:generator>
    <meta:document-statistic meta:table-count="1" meta:image-count="7" meta:object-count="2" meta:page-count="5" meta:paragraph-count="23" meta:word-count="217" meta:character-count="1282" meta:non-whitespace-character-count="991"/>
  </office:meta>
</office:document-meta>
</file>

<file path=Object 1/content.xml><?xml version="1.0" encoding="utf-8"?>
<math xmlns="http://www.w3.org/1998/Math/MathML" display="block">
  <semantics>
    <mrow>
      <mi>A</mi>
      <mo stretchy="false">∈</mo>
      <mrow>
        <mo fence="true" stretchy="false">[</mo>
        <mrow>
          <mi mathvariant="italic">ST</mi>
        </mrow>
        <mo fence="true" stretchy="false">]</mo>
      </mrow>
    </mrow>
    <annotation encoding="StarMath 5.0">A in [ ST ]</annotation>
  </semantics>
</math>
</file>

<file path=Object 2/content.xml><?xml version="1.0" encoding="utf-8"?>
<math xmlns="http://www.w3.org/1998/Math/MathML" display="block">
  <semantics>
    <mrow>
      <mi>B</mi>
      <mo stretchy="false">∈</mo>
      <mrow>
        <mo fence="true" stretchy="false">[</mo>
        <mrow>
          <mn>...</mn>
        </mrow>
        <mo fence="true" stretchy="false">]</mo>
      </mrow>
    </mrow>
    <annotation encoding="StarMath 5.0">B in [ ... ]</annotation>
  </semantics>
</math>
</file>