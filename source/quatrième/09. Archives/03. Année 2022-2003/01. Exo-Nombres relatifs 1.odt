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9000001313828879302CF5FCA.png" manifest:media-type="image/png"/>
  <manifest:file-entry manifest:full-path="Pictures/10000000000001FD00000154B6A3810491A5D2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4.895cm" fo:margin-left="3.794cm" table:align="left"/>
    </style:style>
    <style:style style:name="Tableau3.A" style:family="table-column">
      <style:table-column-properties style:column-width="1.032cm"/>
    </style:style>
    <style:style style:name="Tableau3.B" style:family="table-column">
      <style:table-column-properties style:column-width="0.979cm"/>
    </style:style>
    <style:style style:name="Tableau3.D" style:family="table-column">
      <style:table-column-properties style:column-width="1.005cm"/>
    </style:style>
    <style:style style:name="Tableau3.E" style:family="table-column">
      <style:table-column-properties style:column-width="0.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 style:list-style-name="L1">
      <style:text-properties style:font-name="OpenDyslexic" officeooo:rsid="0008973b" officeooo:paragraph-rsid="0008973b"/>
    </style:style>
    <style:style style:name="P2" style:family="paragraph" style:parent-style-name="Table_20_Contents">
      <style:paragraph-properties fo:text-align="center" style:justify-single-word="false"/>
      <style:text-properties style:font-name="OpenDyslexic"/>
    </style:style>
    <style:style style:name="P3" style:family="paragraph" style:parent-style-name="Table_20_Contents">
      <style:paragraph-properties fo:text-align="center" style:justify-single-word="false"/>
      <style:text-properties style:font-name="OpenDyslexic" officeooo:rsid="000b5112" officeooo:paragraph-rsid="000b5112"/>
    </style:style>
    <style:style style:name="P4" style:family="paragraph" style:parent-style-name="Table_20_Contents">
      <style:text-properties style:font-name="OpenDyslexic" officeooo:rsid="000692c1" officeooo:paragraph-rsid="000669b8"/>
    </style:style>
    <style:style style:name="P5" style:family="paragraph" style:parent-style-name="Standard">
      <style:text-properties style:font-name="OpenDyslexic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0669b8" officeooo:paragraph-rsid="000669b8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07bfae" officeooo:paragraph-rsid="0007bfae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08973b" officeooo:paragraph-rsid="0008973b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0b5112" officeooo:paragraph-rsid="000b5112"/>
    </style:style>
    <style:style style:name="P10" style:family="paragraph" style:parent-style-name="Standard">
      <style:text-properties style:font-name="OpenDyslexic" style:text-underline-style="none" officeooo:rsid="000669b8" officeooo:paragraph-rsid="000669b8"/>
    </style:style>
    <style:style style:name="P11" style:family="paragraph" style:parent-style-name="Standard">
      <style:text-properties style:font-name="OpenDyslexic" style:text-underline-style="none" officeooo:rsid="00069e11" officeooo:paragraph-rsid="00069e11"/>
    </style:style>
    <style:style style:name="P12" style:family="paragraph" style:parent-style-name="Standard">
      <style:text-properties style:font-name="OpenDyslexic" style:text-underline-style="none" officeooo:rsid="0007bfae" officeooo:paragraph-rsid="0007bfae"/>
    </style:style>
    <style:style style:name="P13" style:family="paragraph" style:parent-style-name="Standard">
      <style:text-properties style:font-name="OpenDyslexic" style:text-underline-style="none" officeooo:rsid="0008973b" officeooo:paragraph-rsid="0008973b"/>
    </style:style>
    <style:style style:name="P14" style:family="paragraph" style:parent-style-name="Standard">
      <style:text-properties style:font-name="OpenDyslexic" style:text-underline-style="none" officeooo:rsid="000b5112" officeooo:paragraph-rsid="000b5112"/>
    </style:style>
    <style:style style:name="T1" style:family="text">
      <style:text-properties officeooo:rsid="00144547"/>
    </style:style>
    <style:style style:name="T2" style:family="text">
      <style:text-properties officeooo:rsid="00158672"/>
    </style:style>
    <style:style style:name="T3" style:family="text">
      <style:text-properties officeooo:rsid="000669b8"/>
    </style:style>
    <style:style style:name="T4" style:family="text">
      <style:text-properties officeooo:rsid="0008973b"/>
    </style:style>
    <style:style style:name="T5" style:family="text">
      <style:text-properties officeooo:rsid="000b51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Collège <text:span text:style-name="T1">J.Brel</text:span> <text:s text:c="73"/><text:span text:style-name="T1">4 </text:span>ème<text:line-break/><text:span text:style-name="T3">Exercices</text:span> <text:s text:c="11"/>Chapitre <text:span text:style-name="T2">4 : Nombres relatifs (addition/soustraction)</text:span></text:p>
          </table:table-cell>
        </table:table-row>
      </table:table>
      <text:p text:style-name="P5"/>
      <text:p text:style-name="P5"/>
      <text:p text:style-name="P6">Exercice 1 :</text:p>
      <text:p text:style-name="P10">Effectue les additions suivantes.</text:p>
      <text:p text:style-name="P10">A= (-11)+(-9)</text:p>
      <text:p text:style-name="P10">B=(+12)+(-15)</text:p>
      <text:p text:style-name="P10">C=(+1)+(+3)+(-2)</text:p>
      <text:p text:style-name="P10">D=(-10,8)+(+2,5)</text:p>
      <text:p text:style-name="P10">E=(+25,2)+(-15,3)</text:p>
      <text:p text:style-name="P10">F=(-21,15)+(+21,15)</text:p>
      <text:p text:style-name="P10"/>
      <text:p text:style-name="P6">Exercice 2 :</text:p>
      <text:p text:style-name="P10">Complète les pyramides suivantes sachant que le nombre contenu dans une case est la somme des nombres contenus dans les deux cases situées en dessous de lui.</text:p>
      <text:p text:style-name="P11"><draw:frame draw:style-name="fr1" draw:name="Image1" text:anchor-type="paragraph" svg:x="2.614cm" svg:y="0.325cm" svg:width="12.779cm" svg:height="7.481cm" draw:z-index="0"><draw:image xlink:href="Pictures/1000000000000209000001313828879302CF5FCA.png" xlink:type="simple" xlink:show="embed" xlink:actuate="onLoad" loext:mime-type="image/png"/></draw:frame>a. </text:p>
      <text:p text:style-name="P12"><draw:frame draw:style-name="fr1" draw:name="Image2" text:anchor-type="paragraph" svg:x="3.276cm" svg:y="6.073cm" svg:width="12.118cm" svg:height="8.094cm" draw:z-index="1"><draw:image xlink:href="Pictures/10000000000001FD00000154B6A3810491A5D259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b.</text:p>
      <text:p text:style-name="P12"/>
      <text:p text:style-name="P12"/>
      <text:p text:style-name="P12"/>
      <text:p text:style-name="P12"/>
      <text:p text:style-name="P12"/>
      <text:p text:style-name="P8"><text:soft-page-break/>Exercice 3 :</text:p>
      <text:p text:style-name="P13">Recopie puis complète afin de transformer les soustractions suivantes en additions.</text:p>
      <text:p text:style-name="P13">a. (+2)-(+7)=(+2)+(….)</text:p>
      <text:p text:style-name="P13">b.(-4)-(+5)=(-4)+(….)</text:p>
      <text:p text:style-name="P13">c. (-8)-(-14)=(...)+(…)</text:p>
      <text:p text:style-name="P13">d. (+9)-(-9)=(...)+(...)</text:p>
      <text:p text:style-name="P7">Exercice <text:span text:style-name="T4">4</text:span> :</text:p>
      <text:p text:style-name="P12">Pour chaque expression, transforme les soustractions en additions puis effectue les calculs de gauche à droite.</text:p>
      <text:p text:style-name="P12">a. (+4)-(-2)+(-8)-(+7)</text:p>
      <text:p text:style-name="P12">b. (-27)-(-35)-(-20)+(+17)</text:p>
      <text:p text:style-name="P12">c. (+3,1)+(-3,5)-(+7,8)-(+1,6)</text:p>
      <text:p text:style-name="P12">d. (-16,1)-(+4,25)+(+7,85)-(+1,66)</text:p>
      <text:p text:style-name="P12"/>
      <text:p text:style-name="P7">Exercice <text:span text:style-name="T4">5</text:span> :</text:p>
      <text:p text:style-name="P13">Le professeur Mme Eltyka donne à ses élèves un questionnaire à choix multiples (Q.C.M) comportant huit questions. Elle note de la façon suivante :</text:p>
      <table:table table:name="Tableau2" table:style-name="Tableau2">
        <table:table-column table:style-name="Tableau2.A"/>
        <table:table-row>
          <table:table-cell table:style-name="Tableau2.A1" office:value-type="string">
            <text:list xml:id="list486231279" text:style-name="L1">
              <text:list-item>
                <text:p text:style-name="P1">Réponse fausse (F) : <text:s text:c="24"/>-3 points</text:p>
              </text:list-item>
              <text:list-item>
                <text:p text:style-name="P1">Sans réponse (S) : <text:s text:c="27"/>-1 point</text:p>
              </text:list-item>
              <text:list-item>
                <text:p text:style-name="P1">Réponse bonne (B) : <text:s text:c="25"/>+4 points</text:p>
              </text:list-item>
            </text:list>
          </table:table-cell>
        </table:table-row>
      </table:table>
      <text:p text:style-name="P13">a. Calcule la note de Wenda dont les résultats aux questions sont :</text:p>
      <text:p text:style-name="P13">F ;B ;S ;F ;F ;B ;B ;S</text:p>
      <text:p text:style-name="P13">b. Quelle est la note la plus basse qu’un élève peut obtenir ? Et la plus haute ?</text:p>
      <text:p text:style-name="P13">c. Quels sont les résultats possibles pour Émeline qui a obtenu une note +4 ?</text:p>
      <text:p text:style-name="P13"/>
      <text:p text:style-name="P8">Exercice 6 :</text:p>
      <text:p text:style-name="P13">Recopie et complète ce carré magique sachant qu’il contient tous les entiers de -12 à 12 et que les sommes des nombres de chaque ligne, de chaque colonne et de chaque diagonale sont toutes nulles.</text:p>
      <text:p text:style-name="P13"/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column table:style-name="Tableau3.E"/>
        <text:soft-page-break/>
        <table:table-row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3">0</text:p>
          </table:table-cell>
          <table:table-cell table:style-name="Tableau3.A1" office:value-type="string">
            <text:p text:style-name="P3">8</text:p>
          </table:table-cell>
          <table:table-cell table:style-name="Tableau3.E1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A2" office:value-type="string">
            <text:p text:style-name="P2"/>
          </table:table-cell>
          <table:table-cell table:style-name="Tableau3.A2" office:value-type="string">
            <text:p text:style-name="P2"/>
          </table:table-cell>
          <table:table-cell table:style-name="Tableau3.A2" office:value-type="string">
            <text:p text:style-name="P2">-<text:span text:style-name="T5">11</text:span></text:p>
          </table:table-cell>
          <table:table-cell table:style-name="Tableau3.E2" office:value-type="string">
            <text:p text:style-name="P3">2</text:p>
          </table:table-cell>
        </table:table-row>
        <table:table-row>
          <table:table-cell table:style-name="Tableau3.A2" office:value-type="string">
            <text:p text:style-name="P2">-<text:span text:style-name="T5">9</text:span></text:p>
          </table:table-cell>
          <table:table-cell table:style-name="Tableau3.A2" office:value-type="string">
            <text:p text:style-name="P2">-<text:span text:style-name="T5">1</text:span></text:p>
          </table:table-cell>
          <table:table-cell table:style-name="Tableau3.A2" office:value-type="string">
            <text:p text:style-name="P3">12</text:p>
          </table:table-cell>
          <table:table-cell table:style-name="Tableau3.A2" office:value-type="string">
            <text:p text:style-name="P2"/>
          </table:table-cell>
          <table:table-cell table:style-name="Tableau3.E2" office:value-type="string">
            <text:p text:style-name="P3">3</text:p>
          </table:table-cell>
        </table:table-row>
        <table:table-row>
          <table:table-cell table:style-name="Tableau3.A2" office:value-type="string">
            <text:p text:style-name="P2">-<text:span text:style-name="T5">3</text:span></text:p>
          </table:table-cell>
          <table:table-cell table:style-name="Tableau3.A2" office:value-type="string">
            <text:p text:style-name="P2"/>
          </table:table-cell>
          <table:table-cell table:style-name="Tableau3.A2" office:value-type="string">
            <text:p text:style-name="P2">-<text:span text:style-name="T5">12</text:span></text:p>
          </table:table-cell>
          <table:table-cell table:style-name="Tableau3.A2" office:value-type="string">
            <text:p text:style-name="P2"/>
          </table:table-cell>
          <table:table-cell table:style-name="Tableau3.E2" office:value-type="string">
            <text:p text:style-name="P3">9</text:p>
          </table:table-cell>
        </table:table-row>
        <table:table-row>
          <table:table-cell table:style-name="Tableau3.A2" office:value-type="string">
            <text:p text:style-name="P2">-<text:span text:style-name="T5">2</text:span></text:p>
          </table:table-cell>
          <table:table-cell table:style-name="Tableau3.A2" office:value-type="string">
            <text:p text:style-name="P3">11</text:p>
          </table:table-cell>
          <table:table-cell table:style-name="Tableau3.A2" office:value-type="string">
            <text:p text:style-name="P2">-<text:span text:style-name="T5">6</text:span></text:p>
          </table:table-cell>
          <table:table-cell table:style-name="Tableau3.A2" office:value-type="string">
            <text:p text:style-name="P3">7</text:p>
          </table:table-cell>
          <table:table-cell table:style-name="Tableau3.E2" office:value-type="string">
            <text:p text:style-name="P2"/>
          </table:table-cell>
        </table:table-row>
      </table:table>
      <text:p text:style-name="P13"/>
      <text:p text:style-name="P9">Exercice 7 :</text:p>
      <text:p text:style-name="P14">Calcule en regroupant les termes de même signe :</text:p>
      <text:p text:style-name="P14">A= 15+ 3-6+2-7</text:p>
      <text:p text:style-name="P14">B=-8+4-5-6+11</text:p>
      <text:p text:style-name="P14">C=(+10)-(-4)+(-1)+(+5)-(+9)</text:p>
      <text:p text:style-name="P14">D=(-15)-(+14)+(+30)+(-15)-(-20)</text:p>
      <text:p text:style-name="P9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8:34:21.293000000</meta:creation-date>
    <dc:date>2020-10-30T22:04:05.018000000</dc:date>
    <meta:editing-duration>PT8M29S</meta:editing-duration>
    <meta:editing-cycles>1</meta:editing-cycles>
    <meta:document-statistic meta:table-count="3" meta:image-count="2" meta:object-count="0" meta:page-count="3" meta:paragraph-count="57" meta:word-count="278" meta:character-count="1860" meta:non-whitespace-character-count="1471"/>
    <meta:generator>LibreOffice/6.2.3.2$Windows_X86_64 LibreOffice_project/aecc05fe267cc68dde00352a451aa867b3b546ac</meta:generator>
  </office:meta>
</office:document-meta>
</file>