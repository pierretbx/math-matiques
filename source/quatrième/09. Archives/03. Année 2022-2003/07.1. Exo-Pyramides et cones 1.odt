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1420000017D1F66BE14320F2FFD.png" manifest:media-type="image/png"/>
  <manifest:file-entry manifest:full-path="Pictures/100000000000029D000001FF8F74251AD67ACB19.png" manifest:media-type="image/png"/>
  <manifest:file-entry manifest:full-path="Pictures/10000000000001DF0000016ACB8C13176040D632.png" manifest:media-type="image/png"/>
  <manifest:file-entry manifest:full-path="Pictures/10000000000002B3000002C2C802B8685204C3D0.png" manifest:media-type="image/png"/>
  <manifest:file-entry manifest:full-path="Pictures/100000000000011C0000011A46B96BDB7A887053.png" manifest:media-type="image/png"/>
  <manifest:file-entry manifest:full-path="Pictures/100000000000015C000001285B4034F6800F6239.png" manifest:media-type="image/png"/>
  <manifest:file-entry manifest:full-path="Pictures/100000000000017000000158FC85EA15F3DA0719.png" manifest:media-type="image/png"/>
  <manifest:file-entry manifest:full-path="Pictures/10000000000001A200000154BA4496C67DFAA5E8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8.996cm"/>
    </style:style>
    <style:style style:name="Tableau2.B" style:family="table-column">
      <style:table-column-properties style:column-width="2.011cm"/>
    </style:style>
    <style:style style:name="Tableau2.C" style:family="table-column">
      <style:table-column-properties style:column-width="1.984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667cm" style:rel-column-width="2184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OpenDyslexic"/>
    </style:style>
    <style:style style:name="P2" style:family="paragraph" style:parent-style-name="Table_20_Contents">
      <style:text-properties style:font-name="OpenDyslexic" officeooo:rsid="001b3dbe" officeooo:paragraph-rsid="001b3dbe"/>
    </style:style>
    <style:style style:name="P3" style:family="paragraph" style:parent-style-name="Table_20_Contents">
      <style:text-properties style:font-name="OpenDyslexic" officeooo:rsid="001d176f" officeooo:paragraph-rsid="001d176f"/>
    </style:style>
    <style:style style:name="P4" style:family="paragraph" style:parent-style-name="Table_20_Contents">
      <style:paragraph-properties fo:text-align="center" style:justify-single-word="false"/>
      <style:text-properties style:font-name="OpenDyslexic" officeooo:rsid="001d176f" officeooo:paragraph-rsid="001d176f"/>
    </style:style>
    <style:style style:name="P5" style:family="paragraph" style:parent-style-name="Standard">
      <style:text-properties style:font-name="OpenDyslexic"/>
    </style:style>
    <style:style style:name="P6" style:family="paragraph" style:parent-style-name="Standard">
      <style:text-properties style:font-name="OpenDyslexic" style:text-underline-style="solid" style:text-underline-width="auto" style:text-underline-color="font-color" officeooo:rsid="001b3dbe" officeooo:paragraph-rsid="001b3dbe"/>
    </style:style>
    <style:style style:name="P7" style:family="paragraph" style:parent-style-name="Standard">
      <style:text-properties style:font-name="OpenDyslexic" style:text-underline-style="solid" style:text-underline-width="auto" style:text-underline-color="font-color" officeooo:rsid="001d176f" officeooo:paragraph-rsid="001d176f"/>
    </style:style>
    <style:style style:name="P8" style:family="paragraph" style:parent-style-name="Standard">
      <style:text-properties style:font-name="OpenDyslexic" style:text-underline-style="solid" style:text-underline-width="auto" style:text-underline-color="font-color" officeooo:rsid="001eb471" officeooo:paragraph-rsid="001eb471"/>
    </style:style>
    <style:style style:name="P9" style:family="paragraph" style:parent-style-name="Standard">
      <style:text-properties style:font-name="OpenDyslexic" style:text-underline-style="solid" style:text-underline-width="auto" style:text-underline-color="font-color" officeooo:rsid="00208476" officeooo:paragraph-rsid="00208476"/>
    </style:style>
    <style:style style:name="P10" style:family="paragraph" style:parent-style-name="Standard">
      <style:text-properties style:font-name="OpenDyslexic" style:text-underline-style="solid" style:text-underline-width="auto" style:text-underline-color="font-color" officeooo:rsid="0022f62a" officeooo:paragraph-rsid="0022f62a"/>
    </style:style>
    <style:style style:name="P11" style:family="paragraph" style:parent-style-name="Standard">
      <style:text-properties style:font-name="OpenDyslexic" style:text-underline-style="none" officeooo:rsid="001b3dbe" officeooo:paragraph-rsid="001b3dbe"/>
    </style:style>
    <style:style style:name="P12" style:family="paragraph" style:parent-style-name="Standard">
      <style:text-properties style:font-name="OpenDyslexic" style:text-underline-style="none" officeooo:rsid="001d176f" officeooo:paragraph-rsid="001d176f"/>
    </style:style>
    <style:style style:name="P13" style:family="paragraph" style:parent-style-name="Standard">
      <style:text-properties style:font-name="OpenDyslexic" style:text-underline-style="none" officeooo:rsid="001eb471" officeooo:paragraph-rsid="001eb471"/>
    </style:style>
    <style:style style:name="P14" style:family="paragraph" style:parent-style-name="Standard">
      <style:text-properties style:font-name="OpenDyslexic" style:text-underline-style="none" officeooo:rsid="00208476" officeooo:paragraph-rsid="00208476"/>
    </style:style>
    <style:style style:name="P15" style:family="paragraph" style:parent-style-name="Standard">
      <style:text-properties style:font-name="OpenDyslexic" style:text-underline-style="none" officeooo:rsid="00212058" officeooo:paragraph-rsid="00212058"/>
    </style:style>
    <style:style style:name="P16" style:family="paragraph" style:parent-style-name="Standard">
      <style:text-properties style:font-name="OpenDyslexic" style:text-underline-style="none" officeooo:rsid="0022f62a" officeooo:paragraph-rsid="0022f62a"/>
    </style:style>
    <style:style style:name="P17" style:family="paragraph" style:parent-style-name="Table_20_Contents">
      <style:text-properties style:font-name="OpenDyslexic"/>
    </style:style>
    <style:style style:name="P18" style:family="paragraph" style:parent-style-name="Table_20_Contents">
      <style:paragraph-properties fo:text-align="center" style:justify-single-word="false"/>
      <style:text-properties style:font-name="OpenDyslexic"/>
    </style:style>
    <style:style style:name="P19" style:family="paragraph" style:parent-style-name="Table_20_Contents">
      <style:paragraph-properties fo:text-align="center" style:justify-single-word="false"/>
      <style:text-properties style:font-name="OpenDyslexic" officeooo:rsid="002ab222" officeooo:paragraph-rsid="002ab222"/>
    </style:style>
    <style:style style:name="P20" style:family="paragraph" style:parent-style-name="Standard">
      <style:text-properties style:text-position="0% 100%" style:font-name="OpenDyslexic" style:text-underline-style="none" officeooo:rsid="0022f62a" officeooo:paragraph-rsid="0022f62a"/>
    </style:style>
    <style:style style:name="P21" style:family="paragraph" style:parent-style-name="Standard">
      <style:text-properties style:text-position="0% 100%" style:font-name="OpenDyslexic" style:text-underline-style="none" officeooo:rsid="0023aec0" officeooo:paragraph-rsid="0023aec0"/>
    </style:style>
    <style:style style:name="P22" style:family="paragraph" style:parent-style-name="Standard">
      <style:text-properties style:text-position="0% 100%" style:font-name="OpenDyslexic" style:text-underline-style="none" officeooo:rsid="0026734d" officeooo:paragraph-rsid="0026734d"/>
    </style:style>
    <style:style style:name="P23" style:family="paragraph" style:parent-style-name="Standard">
      <style:text-properties style:text-position="0% 100%" style:font-name="OpenDyslexic" style:text-underline-style="none" officeooo:rsid="0026d43a" officeooo:paragraph-rsid="0026d43a"/>
    </style:style>
    <style:style style:name="P24" style:family="paragraph" style:parent-style-name="Standard">
      <style:text-properties style:text-position="0% 100%" style:font-name="OpenDyslexic" style:text-underline-style="none" officeooo:rsid="002835c6" officeooo:paragraph-rsid="002835c6"/>
    </style:style>
    <style:style style:name="P25" style:family="paragraph" style:parent-style-name="Standard">
      <style:text-properties style:text-position="0% 100%" style:font-name="OpenDyslexic" style:text-underline-style="none" officeooo:rsid="002a9b54" officeooo:paragraph-rsid="002a9b54"/>
    </style:style>
    <style:style style:name="P26" style:family="paragraph" style:parent-style-name="Standard">
      <style:text-properties style:text-position="0% 100%" style:font-name="OpenDyslexic" style:text-underline-style="none" officeooo:rsid="002ab222" officeooo:paragraph-rsid="002ab222"/>
    </style:style>
    <style:style style:name="P27" style:family="paragraph" style:parent-style-name="Standard">
      <style:text-properties style:text-position="0% 100%" style:font-name="OpenDyslexic" style:text-underline-style="solid" style:text-underline-width="auto" style:text-underline-color="font-color" officeooo:rsid="0022f62a" officeooo:paragraph-rsid="0022f62a"/>
    </style:style>
    <style:style style:name="P28" style:family="paragraph" style:parent-style-name="Standard">
      <style:text-properties style:text-position="0% 100%" style:font-name="OpenDyslexic" style:text-underline-style="solid" style:text-underline-width="auto" style:text-underline-color="font-color" officeooo:rsid="0026734d" officeooo:paragraph-rsid="0026734d"/>
    </style:style>
    <style:style style:name="P29" style:family="paragraph" style:parent-style-name="Standard">
      <style:text-properties style:text-position="0% 100%" style:font-name="OpenDyslexic" style:text-underline-style="solid" style:text-underline-width="auto" style:text-underline-color="font-color" officeooo:rsid="0026d43a" officeooo:paragraph-rsid="0026d43a"/>
    </style:style>
    <style:style style:name="P30" style:family="paragraph" style:parent-style-name="Standard">
      <style:text-properties style:text-position="0% 100%" style:font-name="OpenDyslexic" style:text-underline-style="solid" style:text-underline-width="auto" style:text-underline-color="font-color" officeooo:rsid="002835c6" officeooo:paragraph-rsid="002835c6"/>
    </style:style>
    <style:style style:name="P31" style:family="paragraph" style:parent-style-name="Standard">
      <style:text-properties style:text-position="0% 100%" style:font-name="OpenDyslexic" style:text-underline-style="solid" style:text-underline-width="auto" style:text-underline-color="font-color" officeooo:rsid="0028a190" officeooo:paragraph-rsid="0028a190"/>
    </style:style>
    <style:style style:name="P32" style:family="paragraph" style:parent-style-name="Standard">
      <style:text-properties style:text-position="0% 100%" style:font-name="OpenDyslexic" style:text-underline-style="solid" style:text-underline-width="auto" style:text-underline-color="font-color" officeooo:rsid="00293274" officeooo:paragraph-rsid="00293274"/>
    </style:style>
    <style:style style:name="T1" style:family="text">
      <style:text-properties officeooo:rsid="00212058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text-underline-style="none"/>
    </style:style>
    <style:style style:name="T4" style:family="text">
      <style:text-properties style:text-position="super 58%" style:text-underline-style="none" officeooo:rsid="00293274"/>
    </style:style>
    <style:style style:name="T5" style:family="text">
      <style:text-properties style:text-position="0% 100%"/>
    </style:style>
    <style:style style:name="T6" style:family="text">
      <style:text-properties style:text-position="0% 100%" style:text-underline-style="none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293274"/>
    </style:style>
    <style:style style:name="T9" style:family="text">
      <style:text-properties officeooo:rsid="002ab22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>Collège J.Brel <text:s text:c="72"/>4ème</text:p>
            <text:p text:style-name="P2">Exercices <text:s text:c="17"/>Chapitre 7 : Pyramides et Cônes</text:p>
          </table:table-cell>
        </table:table-row>
      </table:table>
      <text:p text:style-name="P5"/>
      <text:p text:style-name="P5"/>
      <text:p text:style-name="P6">Exercice 1 :</text:p>
      <text:p text:style-name="P11">Nomme chaque solide représenté ci-dessous.</text:p>
      <text:p text:style-name="P7"><draw:frame draw:style-name="fr1" draw:name="Image1" text:anchor-type="paragraph" svg:width="16.411cm" svg:height="12.534cm" draw:z-index="0"><draw:image xlink:href="Pictures/100000000000029D000001FF8F74251AD67ACB19.png" xlink:type="simple" xlink:show="embed" xlink:actuate="onLoad" loext:mime-type="image/png"/></draw:frame><draw:frame draw:style-name="fr2" draw:name="Image2" text:anchor-type="paragraph" svg:x="4.082cm" svg:y="12.771cm" svg:width="9.844cm" svg:height="10.056cm" draw:z-index="1"><draw:image xlink:href="Pictures/10000000000002B3000002C2C802B8685204C3D0.png" xlink:type="simple" xlink:show="embed" xlink:actuate="onLoad" loext:mime-type="image/png"/></draw:frame>Exercice 2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Recopie et complète le tableau ci-dessous :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B" table:number-columns-repeated="2"/>
        <table:table-row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4">1</text:p>
          </table:table-cell>
          <table:table-cell table:style-name="Tableau2.A1" office:value-type="string">
            <text:p text:style-name="P4">2</text:p>
          </table:table-cell>
          <table:table-cell table:style-name="Tableau2.A1" office:value-type="string">
            <text:p text:style-name="P4">3</text:p>
          </table:table-cell>
          <table:table-cell table:style-name="Tableau2.E1" office:value-type="string">
            <text:p text:style-name="P4">4</text:p>
          </table:table-cell>
        </table:table-row>
        <table:table-row>
          <table:table-cell table:style-name="Tableau2.A2" office:value-type="string">
            <text:p text:style-name="P3">Sommet</text:p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E2" office:value-type="string">
            <text:p text:style-name="P1"/>
          </table:table-cell>
        </table:table-row>
        <table:table-row>
          <table:table-cell table:style-name="Tableau2.A2" office:value-type="string">
            <text:p text:style-name="P3">Nature de la base</text:p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E2" office:value-type="string">
            <text:p text:style-name="P1"/>
          </table:table-cell>
        </table:table-row>
        <table:table-row>
          <table:table-cell table:style-name="Tableau2.A2" office:value-type="string">
            <text:p text:style-name="P3">Nom de la base</text:p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E2" office:value-type="string">
            <text:p text:style-name="P1"/>
          </table:table-cell>
        </table:table-row>
        <table:table-row>
          <table:table-cell table:style-name="Tableau2.A2" office:value-type="string">
            <text:p text:style-name="P3">Hauteur</text:p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E2" office:value-type="string">
            <text:p text:style-name="P1"/>
          </table:table-cell>
        </table:table-row>
        <table:table-row>
          <table:table-cell table:style-name="Tableau2.A2" office:value-type="string">
            <text:p text:style-name="P3">Nombre d’arêtes</text:p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E2" office:value-type="string">
            <text:p text:style-name="P1"/>
          </table:table-cell>
        </table:table-row>
        <table:table-row>
          <table:table-cell table:style-name="Tableau2.A2" office:value-type="string">
            <text:p text:style-name="P3">Nombre de faces</text:p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E2" office:value-type="string">
            <text:p text:style-name="P1"/>
          </table:table-cell>
        </table:table-row>
      </table:table>
      <text:p text:style-name="P12"/>
      <text:p text:style-name="P7">Exercice 3 :</text:p>
      <text:p text:style-name="P12">Un cône de révolution de hauteur 8,2 cm a pour base un disque de rayon 3,5 cm.</text:p>
      <text:p text:style-name="P12"/>
      <text:p text:style-name="P12">À main levée, dessine une représentation de ce cône de révolution en perspective cavalière puis code ton dessin.</text:p>
      <text:p text:style-name="P12"/>
      <text:p text:style-name="P7">Exercice 4 :</text:p>
      <text:p text:style-name="P12">SABCD est une pyramide régulière à base carrée telle que SA=7,3 cm et AB= 5cm.</text:p>
      <text:p text:style-name="P12"><draw:frame draw:style-name="fr1" draw:name="Image3" text:anchor-type="paragraph" svg:width="7.31cm" svg:height="7.671cm" draw:z-index="2"><draw:image xlink:href="Pictures/10000000000001420000017D1F66BE14320F2FFD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a. Nomme le sommet et la base de cette pyramide.</text:p>
      <text:p text:style-name="P13">b. Que représente le segment [SH] pour la pyramide ? Justifie.</text:p>
      <text:p text:style-name="P13"><text:soft-page-break/>c. Indique, en centimètres, la longueur de chacune des arêtes de cette pyramide. Justifie.</text:p>
      <text:p text:style-name="P13">d. Quelle est la nature du triangle ADC ? Justifie. Construis-le en vraie grandeur.</text:p>
      <text:p text:style-name="P13">e. Quelle est la nature du triangle SAB ? Justifie. Construis-le en vraie grandeur.</text:p>
      <text:p text:style-name="P13"/>
      <text:p text:style-name="P8">Exercice 5 :</text:p>
      <text:p text:style-name="P13">Une pyramide régulière de hauteur 7 cm a pour base un carré de côté 5 cm.</text:p>
      <text:p text:style-name="P13"/>
      <text:p text:style-name="P13">a. A main levée, dessine une représentation de cette pyramide en perspective cavalière puis code ton dessin.</text:p>
      <text:p text:style-name="P13">b. Construis à la règle une représentation en perspective cavalière de cette pyramide.</text:p>
      <text:p text:style-name="P13"/>
      <text:p text:style-name="P8">Exercice 6 :</text:p>
      <text:p text:style-name="P14">Un tétraèdre régulier est une pyramide dont toutes ses faces sont des triangles équilatéraux.</text:p>
      <text:p text:style-name="P14">Trace le patron d’un tétraèdre régulier d’arête 5,5 cm.</text:p>
      <text:p text:style-name="P14"/>
      <text:p text:style-name="P9">Exercice 7 :</text:p>
      <text:p text:style-name="P14">Pour calculer la mesure de l’angle du développement d’un cône, on utilise la formule : <draw:frame draw:style-name="fr3" draw:name="Objet1" text:anchor-type="as-char" svg:y="-0.891cm" svg:width="2.413cm" svg:height="1.54cm" draw:z-index="3"><draw:object xlink:href="./Object 1" xlink:type="simple" xlink:show="embed" xlink:actuate="onLoad"/><draw:image xlink:href="./ObjectReplacements/Object 1" xlink:type="simple" xlink:show="embed" xlink:actuate="onLoad"/></draw:frame><text:s/><text:span text:style-name="T1">où R est le rayon du disque de base et g la longueur de la génératrice du cône.</text:span></text:p>
      <text:p text:style-name="P14"/>
      <text:p text:style-name="P15">a. Calcule la mesure de l’angle du développement du cône représenté ci-contre où SN=6,5 cm et AN=2,6 cm.</text:p>
      <text:p text:style-name="P15"/>
      <text:p text:style-name="P15">b. Trace le patron de ce cône.</text:p>
      <text:p text:style-name="P15"/>
      <text:p text:style-name="P10">Exercice 8 :</text:p>
      <text:p text:style-name="P16">Complète :</text:p>
      <text:p text:style-name="P16"><text:soft-page-break/>a. 5,4 m= ….… cm <text:s text:c="7"/>b. 3 263 m= …….. km <text:s text:c="4"/>c. 14,7 m²= …….. cm²</text:p>
      <text:p text:style-name="P16"/>
      <text:p text:style-name="P16">d. 254 320 m² = …….. hm² <text:s text:c="4"/>e. 5,68L=….. mL <text:s text:c="6"/>f. 230 000 cm<text:span text:style-name="T2">3</text:span>=……<text:span text:style-name="T5">.m</text:span><text:span text:style-name="T2">3</text:span></text:p>
      <text:p text:style-name="P14"/>
      <text:p text:style-name="P16">g. 504,2 cL=………..L <text:s text:c="10"/>h. 6,3 dm³<text:span text:style-name="T5"> = ……...m</text:span><text:span text:style-name="T2">3</text:span><text:span text:style-name="T5"> <text:s text:c="4"/>i. 5 362 dm³ = …….cm</text:span><text:span text:style-name="T2">3</text:span></text:p>
      <text:p text:style-name="P20"/>
      <text:p text:style-name="P16"><text:span text:style-name="T5">j. 0,07 m³ = ….. dm³ <text:s text:c="9"/>k. 2 500 cm³ = …….. L <text:s text:c="3"/>l. 9,1 cL= …………. cm³</text:span></text:p>
      <text:p text:style-name="P20"/>
      <text:p text:style-name="P27">Exercice 9 :</text:p>
      <text:p text:style-name="P10"><text:span text:style-name="T6">a. Calcule le volume d’une pyramide SABCD, de hauteur 6,3 cm et de base rectangulaire ABCD telle que AB=4,2 cm et BC=3,5 cm. Donne le résultat en cm³ puis en mm³.</text:span></text:p>
      <text:p text:style-name="P20"/>
      <text:p text:style-name="P20">b. Calcule le volume d’une pyramide MATH, de base ATH rectangle isocèle en A, de hauteur [MA] et telle que AT=3 cm et MA= 4 cm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8"><text:soft-page-break/>Exercice 10 :</text:p>
      <text:p text:style-name="P22">Pour construire la pyramide de Khéops, les égyptiens ont utilisé un volume d’environ 2 643 000m<text:span text:style-name="T2">3</text:span> de pierres. La hauteur de la pyramide est de 146m. Calcule le côté du carré constituant la base de la pyramide. Arrondis ton résultat au mètre.</text:p>
      <text:p text:style-name="P22"/>
      <text:p text:style-name="P28">Exercice 11 :<text:span text:style-name="T7"> Extrait du brevet</text:span></text:p>
      <text:p text:style-name="P28"><text:span text:style-name="T7">La société Truc fabrique des enseignes publicitaires composées de deux cônes de révolution de même diamètre 24 cm et de même hauteur 40 cm.</text:span></text:p>
      <text:p text:style-name="P28"><text:span text:style-name="T7"/></text:p>
      <text:p text:style-name="P28"><text:span text:style-name="T7">a. Calculer le volume d’une enseigne. En donner la valeur exacte puis la valeur arrondie au dm³</text:span><text:span text:style-name="T7">.</text:span></text:p>
      <text:p text:style-name="P28"><text:span text:style-name="T7"/></text:p>
      <text:p text:style-name="P28"><text:span text:style-name="T7">b. Pour le transport, chaque enseigne est rangée dans un étui en carton ayant la forme d’un cylindre le plus petit possible et ayant la même base que les cônes.</text:span></text:p>
      <text:p text:style-name="P28"><text:span text:style-name="T7">Calculer le volume de cet étui en négligeant l’épaisseur du carton. En donner la valeur exacte en cm³</text:span><text:span text:style-name="T7"> puis la valeur arrondie au dm³</text:span><text:span text:style-name="T7">.</text:span></text:p>
      <text:p text:style-name="P28"><draw:frame draw:style-name="fr1" draw:name="Image4" text:anchor-type="paragraph" svg:width="11.88cm" svg:height="8.978cm" draw:z-index="4"><draw:image xlink:href="Pictures/10000000000001DF0000016ACB8C13176040D632.png" xlink:type="simple" xlink:show="embed" xlink:actuate="onLoad" loext:mime-type="image/png"/></draw:frame><text:span text:style-name="T7"/></text:p>
      <text:p text:style-name="P22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9"><text:soft-page-break/>Exercice 12 :</text:p>
      <text:p text:style-name="P29"><draw:frame draw:style-name="fr1" draw:name="Image5" text:anchor-type="paragraph" svg:width="7.514cm" svg:height="7.461cm" draw:z-index="5"><draw:image xlink:href="Pictures/100000000000011C0000011A46B96BDB7A887053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3">a. Calcule le volume de cette pyramide, arrondi au cm³.</text:p>
      <text:p text:style-name="P23">b. Calcule les longueurs AH,DG et AG au millimètres près.</text:p>
      <text:p text:style-name="P24">c. Calcule la mesure, arrondie au degré, de l’angle <draw:frame draw:style-name="fr4" draw:name="Objet2" text:anchor-type="as-char" svg:y="-0.527cm" svg:width="1.215cm" svg:height="0.739cm" draw:z-index="6"><draw:object xlink:href="./Object 2" xlink:type="simple" xlink:show="embed" xlink:actuate="onLoad"/><draw:image xlink:href="./ObjectReplacements/Object 2" xlink:type="simple" xlink:show="embed" xlink:actuate="onLoad"/></draw:frame>.</text:p>
      <text:p text:style-name="P24">d. Construis un patron de cette pyramide.</text:p>
      <text:p text:style-name="P24"/>
      <text:p text:style-name="P30">Exercice 13 :<text:span text:style-name="T7"> Extrait du brevet</text:span></text:p>
      <text:p text:style-name="P24"><draw:frame draw:style-name="fr2" draw:name="Image6" text:anchor-type="paragraph" svg:x="0.06cm" svg:y="0.185cm" svg:width="9.208cm" svg:height="7.832cm" draw:z-index="7"><draw:image xlink:href="Pictures/100000000000015C000001285B4034F6800F6239.png" xlink:type="simple" xlink:show="embed" xlink:actuate="onLoad" loext:mime-type="image/png"/></draw:frame>La pyramide régulière à base carrée SABCD ci-dessous a une base de 50 cm² et une arête [SA] de 13 cm.</text:p>
      <text:p text:style-name="P24"/>
      <text:p text:style-name="P24">a. Calculer la valeur exacte de AB puis démontrer que : AC=10cm.</text:p>
      <text:p text:style-name="P24"/>
      <text:p text:style-name="P24">b. Soit H le centre de ABCD. On admet que (SH) est perpendiculaire à (AC). Démontrer que SH=12cm puis calculer le volume de SABCD.</text:p>
      <text:p text:style-name="P24"/>
      <text:p text:style-name="P30"/>
      <text:p text:style-name="P30"/>
      <text:p text:style-name="P30"/>
      <text:p text:style-name="P30"><text:soft-page-break/>Exercice 14 :</text:p>
      <text:p text:style-name="P31"><draw:frame draw:style-name="fr2" draw:name="Image7" text:anchor-type="paragraph" svg:x="0.113cm" svg:y="0.039cm" svg:width="9.737cm" svg:height="9.102cm" draw:z-index="8"><draw:image xlink:href="Pictures/100000000000017000000158FC85EA15F3DA0719.png" xlink:type="simple" xlink:show="embed" xlink:actuate="onLoad" loext:mime-type="image/png"/></draw:frame><text:span text:style-name="T7">La figure ci-dessous représente un cône de révolution (C) de hauteur SO=20 cm et de base le cercle de rayon OA=15 cm.</text:span></text:p>
      <text:p text:style-name="P31"><text:span text:style-name="T7"/></text:p>
      <text:p text:style-name="P31"><text:span text:style-name="T7">a. Calculer en cm³ le volume de (C), on donnera la valeur exacte sous la forme </text:span><text:span text:style-name="T7"><draw:frame draw:style-name="fr4" draw:name="Objet3" text:anchor-type="as-char" svg:y="-0.527cm" svg:width="0.855cm" svg:height="0.739cm" draw:z-index="9"><draw:object xlink:href="./Object 3" xlink:type="simple" xlink:show="embed" xlink:actuate="onLoad"/><draw:image xlink:href="./ObjectReplacements/Object 3" xlink:type="simple" xlink:show="embed" xlink:actuate="onLoad"/></draw:frame></text:span><text:span text:style-name="T7">, k étant un nombre entier.</text:span></text:p>
      <text:p text:style-name="P31"><text:span text:style-name="T7"/></text:p>
      <text:p text:style-name="P31"><text:span text:style-name="T7">b. Montrer que SA=25 cm.</text:span></text:p>
      <text:p text:style-name="P31"><text:span text:style-name="T7"/></text:p>
      <text:p text:style-name="P31"><text:span text:style-name="T7">c. L’aire latérale d’un </text:span><text:span text:style-name="T8">cône de révolution est donnée par la formule </text:span><text:span text:style-name="T8"><draw:frame draw:style-name="fr4" draw:name="Objet4" text:anchor-type="as-char" svg:y="-0.527cm" svg:width="2.175cm" svg:height="0.739cm" draw:z-index="10"><draw:object xlink:href="./Object 4" xlink:type="simple" xlink:show="embed" xlink:actuate="onLoad"/><draw:image xlink:href="./ObjectReplacements/Object 4" xlink:type="simple" xlink:show="embed" xlink:actuate="onLoad"/></draw:frame></text:span><text:span text:style-name="T8">. (R désignant le rayon du cercle de base). Calculer en cm²</text:span><text:span text:style-name="T8"> l’aire latérale de (C).</text:span></text:p>
      <text:p text:style-name="P32"><text:span text:style-name="T8">O</text:span><text:span text:style-name="T7">n donnera une valeur exacte sous la forme </text:span><text:span text:style-name="T7"><draw:frame draw:style-name="fr4" draw:name="Objet5" text:anchor-type="as-char" svg:y="-0.527cm" svg:width="0.845cm" svg:height="0.739cm" draw:z-index="11"><draw:object xlink:href="./Object 5" xlink:type="simple" xlink:show="embed" xlink:actuate="onLoad"/><draw:image xlink:href="./ObjectReplacements/Object 5" xlink:type="simple" xlink:show="embed" xlink:actuate="onLoad"/></draw:frame></text:span><text:span text:style-name="T7">( n étant un nombre entier) puis une valeur approchée à </text:span><text:span text:style-name="T7"><draw:frame draw:style-name="fr4" draw:name="Objet6" text:anchor-type="as-char" svg:y="-0.57cm" svg:width="1.058cm" svg:height="0.781cm" draw:z-index="12"><draw:object xlink:href="./Object 6" xlink:type="simple" xlink:show="embed" xlink:actuate="onLoad"/><draw:image xlink:href="./ObjectReplacements/Object 6" xlink:type="simple" xlink:show="embed" xlink:actuate="onLoad"/></draw:frame></text:span><text:span text:style-name="T7">près.</text:span></text:p>
      <text:p text:style-name="P30"><text:span text:style-name="T7"/></text:p>
      <text:p text:style-name="P32">Exercice 15 :</text:p>
      <text:p text:style-name="P25"><draw:frame draw:style-name="fr2" draw:name="Image8" text:anchor-type="paragraph" svg:x="-0.39cm" svg:y="0.265cm" svg:width="11.06cm" svg:height="8.996cm" draw:z-index="13"><draw:image xlink:href="Pictures/10000000000001A200000154BA4496C67DFAA5E8.png" xlink:type="simple" xlink:show="embed" xlink:actuate="onLoad" loext:mime-type="image/png"/></draw:frame>a. Nomme une génératrice de ce cône. Calcule la valeur exacte de la circonférence du grand cercle ayant pour rayon la longueur de cette génératrice et pour centre le point S.</text:p>
      <text:p text:style-name="P25"/>
      <text:p text:style-name="P25">b. Détermine la valeur exacte de la circonférence du cercle de base.</text:p>
      <text:p text:style-name="P25"/>
      <text:p text:style-name="P25"><text:soft-page-break/>c. Quelle est la valeur exacte de la longueur de l’arc de cercle <draw:frame draw:style-name="fr4" draw:name="Objet7" text:anchor-type="as-char" svg:y="-0.527cm" svg:width="0.855cm" svg:height="0.739cm" draw:z-index="14"><draw:object xlink:href="./Object 7" xlink:type="simple" xlink:show="embed" xlink:actuate="onLoad"/><draw:image xlink:href="./ObjectReplacements/Object 7" xlink:type="simple" xlink:show="embed" xlink:actuate="onLoad"/></draw:frame> ? Justifie.</text:p>
      <text:p text:style-name="P25"/>
      <text:p text:style-name="P25">d. On admet qu’il y a proportionnalité <text:span text:style-name="T9">entre la mesure de l’angle au centre </text:span><text:span text:style-name="T9"><draw:frame draw:style-name="fr4" draw:name="Objet8" text:anchor-type="as-char" svg:y="-0.527cm" svg:width="1.797cm" svg:height="0.739cm" draw:z-index="15"><draw:object xlink:href="./Object 8" xlink:type="simple" xlink:show="embed" xlink:actuate="onLoad"/><draw:image xlink:href="./ObjectReplacements/Object 8" xlink:type="simple" xlink:show="embed" xlink:actuate="onLoad"/></draw:frame></text:span><text:span text:style-name="T9">et la longueur de l’arc AB qui l’intercepte. Calcule </text:span><text:span text:style-name="T9"><draw:frame draw:style-name="fr4" draw:name="Objet9" text:anchor-type="as-char" svg:y="-0.215cm" svg:width="0.522cm" svg:height="0.242cm" draw:z-index="16"><draw:object xlink:href="./Object 9" xlink:type="simple" xlink:show="embed" xlink:actuate="onLoad"/><draw:image xlink:href="./ObjectReplacements/Object 9" xlink:type="simple" xlink:show="embed" xlink:actuate="onLoad"/></draw:frame></text:span><text:span text:style-name="T9">en utilisant le tableau suivant :</text:span></text:p>
      <table:table table:name="Tableau3" table:style-name="Tableau3">
        <table:table-column table:style-name="Tableau3.A" table:number-columns-repeated="3"/>
        <table:table-row>
          <table:table-cell table:style-name="Tableau3.A1" office:value-type="string">
            <text:p text:style-name="P1"/>
          </table:table-cell>
          <table:table-cell table:style-name="Tableau3.A1" office:value-type="string">
            <text:p text:style-name="P19">Longueur</text:p>
          </table:table-cell>
          <table:table-cell table:style-name="Tableau3.C1" office:value-type="string">
            <text:p text:style-name="P19">Mesure de l’angle</text:p>
          </table:table-cell>
        </table:table-row>
        <table:table-row>
          <table:table-cell table:style-name="Tableau3.A2" office:value-type="string">
            <text:p text:style-name="P19">Grand cercle </text:p>
          </table:table-cell>
          <table:table-cell table:style-name="Tableau3.A2" office:value-type="string">
            <text:p text:style-name="P18"/>
          </table:table-cell>
          <table:table-cell table:style-name="Tableau3.C2" office:value-type="string">
            <text:p text:style-name="P19">360°</text:p>
          </table:table-cell>
        </table:table-row>
        <table:table-row>
          <table:table-cell table:style-name="Tableau3.A2" office:value-type="string">
            <text:p text:style-name="P19">Arc de cercle </text:p>
          </table:table-cell>
          <table:table-cell table:style-name="Tableau3.A2" office:value-type="string">
            <text:p text:style-name="P18"/>
          </table:table-cell>
          <table:table-cell table:style-name="Tableau3.C2" office:value-type="string">
            <text:p text:style-name="P18"><draw:frame draw:style-name="fr4" draw:name="Objet10" text:anchor-type="as-char" svg:y="-0.215cm" svg:width="0.522cm" svg:height="0.242cm" draw:z-index="17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</table:table-row>
      </table:table>
      <text:p text:style-name="P26">e. à partir des résultats précédents, construis en vraie grandeur le patron de ce cô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3T18:17:26.381000000</meta:creation-date>
    <dc:date>2021-02-05T10:59:04.789000000</dc:date>
    <meta:editing-duration>PT1H9M20S</meta:editing-duration>
    <meta:editing-cycles>3</meta:editing-cycles>
    <meta:generator>LibreOffice/6.2.3.2$Windows_X86_64 LibreOffice_project/aecc05fe267cc68dde00352a451aa867b3b546ac</meta:generator>
    <meta:document-statistic meta:table-count="3" meta:image-count="8" meta:object-count="10" meta:page-count="8" meta:paragraph-count="80" meta:word-count="917" meta:character-count="4868" meta:non-whitespace-character-count="3914"/>
  </office:meta>
</office:document-meta>
</file>

<file path=Object 1/content.xml><?xml version="1.0" encoding="utf-8"?>
<math xmlns="http://www.w3.org/1998/Math/MathML" display="block">
  <semantics>
    <mrow>
      <mi>â</mi>
      <mo stretchy="false">=</mo>
      <mfrac>
        <mrow>
          <mn>360</mn>
          <mo stretchy="false">×</mo>
          <mi>R</mi>
        </mrow>
        <mi>g</mi>
      </mfrac>
    </mrow>
    <annotation encoding="StarMath 5.0">â = 360 times R over g</annotation>
  </semantics>
</math>
</file>

<file path=Object 10/content.xml><?xml version="1.0" encoding="utf-8"?>
<math xmlns="http://www.w3.org/1998/Math/MathML" display="block">
  <semantics>
    <mi>α</mi>
    <annotation encoding="StarMath 5.0">%alpha</annotation>
  </semantics>
</math>
</file>

<file path=Object 2/content.xml><?xml version="1.0" encoding="utf-8"?>
<math xmlns="http://www.w3.org/1998/Math/MathML" display="block">
  <semantics>
    <mover accent="true">
      <mi mathvariant="italic">AHD</mi>
      <mo stretchy="true">^</mo>
    </mover>
    <annotation encoding="StarMath 5.0">widehat {AHD} </annotation>
  </semantics>
</math>
</file>

<file path=Object 3/content.xml><?xml version="1.0" encoding="utf-8"?>
<math xmlns="http://www.w3.org/1998/Math/MathML" display="block">
  <semantics>
    <mrow>
      <mi>k</mi>
      <mi>π</mi>
    </mrow>
    <annotation encoding="StarMath 5.0">k %pi</annotation>
  </semantics>
</math>
</file>

<file path=Object 4/content.xml><?xml version="1.0" encoding="utf-8"?>
<math xmlns="http://www.w3.org/1998/Math/MathML" display="block">
  <semantics>
    <mrow>
      <mi>π</mi>
      <mo stretchy="false">×</mo>
      <mi>R</mi>
      <mo stretchy="false">×</mo>
      <mi mathvariant="italic">SA</mi>
    </mrow>
    <annotation encoding="StarMath 5.0">%pi times R times SA</annotation>
  </semantics>
</math>
</file>

<file path=Object 5/content.xml><?xml version="1.0" encoding="utf-8"?>
<math xmlns="http://www.w3.org/1998/Math/MathML" display="block">
  <semantics>
    <mrow>
      <mi>n</mi>
      <mi>π</mi>
    </mrow>
    <annotation encoding="StarMath 5.0">n %pi</annotation>
  </semantics>
</math>
</file>

<file path=Object 6/content.xml><?xml version="1.0" encoding="utf-8"?>
<math xmlns="http://www.w3.org/1998/Math/MathML" display="block">
  <semantics>
    <msup>
      <mn>10</mn>
      <mrow>
        <mo stretchy="false">−</mo>
        <mn>1</mn>
      </mrow>
    </msup>
    <annotation encoding="StarMath 5.0">10^{ -1 }</annotation>
  </semantics>
</math>
</file>

<file path=Object 7/content.xml><?xml version="1.0" encoding="utf-8"?>
<math xmlns="http://www.w3.org/1998/Math/MathML" display="block">
  <semantics>
    <mover accent="true">
      <mi mathvariant="italic">AB</mi>
      <mo stretchy="false">˘</mo>
    </mover>
    <annotation encoding="StarMath 5.0">breve AB </annotation>
  </semantics>
</math>
</file>

<file path=Object 8/content.xml><?xml version="1.0" encoding="utf-8"?>
<math xmlns="http://www.w3.org/1998/Math/MathML" display="block">
  <semantics>
    <mrow>
      <mi>α</mi>
      <mo stretchy="false">=</mo>
      <mover accent="true">
        <mi mathvariant="italic">BSA</mi>
        <mo stretchy="true">^</mo>
      </mover>
    </mrow>
    <annotation encoding="StarMath 5.0">%alpha = widehat {BSA} </annotation>
  </semantics>
</math>
</file>

<file path=Object 9/content.xml><?xml version="1.0" encoding="utf-8"?>
<math xmlns="http://www.w3.org/1998/Math/MathML" display="block">
  <semantics>
    <mi>α</mi>
    <annotation encoding="StarMath 5.0">%alpha</annotation>
  </semantics>
</math>
</file>