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0BB546962FE23CDEBBE.png" manifest:media-type="image/png"/>
  <manifest:file-entry manifest:full-path="Pictures/100002010000032600000058BDC75155A91C48B1.png" manifest:media-type="image/png"/>
  <manifest:file-entry manifest:full-path="Pictures/100002010000010B000000EBFC63800D175C0D2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OpenDyslexic" officeooo:rsid="0011ef64" officeooo:paragraph-rsid="0011ef64"/>
    </style:style>
    <style:style style:name="P2" style:family="paragraph" style:parent-style-name="Standard">
      <style:text-properties officeooo:paragraph-rsid="0011ef64"/>
    </style:style>
    <style:style style:name="P3" style:family="paragraph" style:parent-style-name="Standard">
      <style:text-properties style:font-name="OpenDyslexic" style:text-underline-style="none" officeooo:rsid="0014c6e9" officeooo:paragraph-rsid="0014c6e9"/>
    </style:style>
    <style:style style:name="P4" style:family="paragraph" style:parent-style-name="Standard">
      <style:text-properties style:font-name="OpenDyslexic" fo:font-size="11pt" style:font-size-asian="11pt" style:font-size-complex="11pt"/>
    </style:style>
    <style:style style:name="P5" style:family="paragraph" style:parent-style-name="Standard">
      <style:text-properties style:font-name="OpenDyslexic" fo:font-size="11pt" style:text-underline-style="solid" style:text-underline-width="auto" style:text-underline-color="font-color" officeooo:rsid="0011ef64" officeooo:paragraph-rsid="0011ef64" style:font-size-asian="11pt" style:font-size-complex="11pt"/>
    </style:style>
    <style:style style:name="P6" style:family="paragraph" style:parent-style-name="Standard">
      <style:text-properties style:font-name="OpenDyslexic" fo:font-size="11pt" style:text-underline-style="solid" style:text-underline-width="auto" style:text-underline-color="font-color" officeooo:rsid="0012d62c" officeooo:paragraph-rsid="0012d62c" style:font-size-asian="11pt" style:font-size-complex="11pt"/>
    </style:style>
    <style:style style:name="P7" style:family="paragraph" style:parent-style-name="Standard">
      <style:text-properties style:font-name="OpenDyslexic" fo:font-size="11pt" style:text-underline-style="solid" style:text-underline-width="auto" style:text-underline-color="font-color" officeooo:rsid="0012d62c" officeooo:paragraph-rsid="001a3cdd" style:font-size-asian="11pt" style:font-size-complex="11pt"/>
    </style:style>
    <style:style style:name="P8" style:family="paragraph" style:parent-style-name="Standard">
      <style:text-properties style:font-name="OpenDyslexic" fo:font-size="11pt" style:text-underline-style="none" officeooo:rsid="0011ef64" officeooo:paragraph-rsid="0011ef64" style:font-size-asian="11pt" style:font-size-complex="11pt"/>
    </style:style>
    <style:style style:name="P9" style:family="paragraph" style:parent-style-name="Standard">
      <style:text-properties style:font-name="OpenDyslexic" fo:font-size="11pt" style:text-underline-style="none" officeooo:rsid="0012d62c" officeooo:paragraph-rsid="0012d62c" style:font-size-asian="11pt" style:font-size-complex="11pt"/>
    </style:style>
    <style:style style:name="P10" style:family="paragraph" style:parent-style-name="Standard">
      <style:text-properties style:font-name="OpenDyslexic" fo:font-size="11pt" style:text-underline-style="none" officeooo:rsid="0012d62c" officeooo:paragraph-rsid="001a3cdd" style:font-size-asian="11pt" style:font-size-complex="11pt"/>
    </style:style>
    <style:style style:name="P11" style:family="paragraph" style:parent-style-name="Standard">
      <style:text-properties style:font-name="OpenDyslexic" fo:font-size="11pt" style:text-underline-style="none" officeooo:rsid="001d5827" officeooo:paragraph-rsid="0012d62c" style:font-size-asian="11pt" style:font-size-complex="11pt"/>
    </style:style>
    <style:style style:name="P12" style:family="paragraph" style:parent-style-name="Standard">
      <style:text-properties style:font-name="OpenDyslexic" fo:font-size="11pt" style:text-underline-style="none" officeooo:rsid="0014c6e9" officeooo:paragraph-rsid="0014c6e9" style:font-size-asian="11pt" style:font-size-complex="11pt"/>
    </style:style>
    <style:style style:name="P13" style:family="paragraph" style:parent-style-name="Standard">
      <style:text-properties officeooo:paragraph-rsid="0012d62c"/>
    </style:style>
    <style:style style:name="P14" style:family="paragraph" style:parent-style-name="Standard">
      <style:text-properties officeooo:paragraph-rsid="001a3cdd"/>
    </style:style>
    <style:style style:name="P15" style:family="paragraph" style:parent-style-name="Table_20_Contents">
      <style:text-properties officeooo:paragraph-rsid="0011ef64"/>
    </style:style>
    <style:style style:name="P16" style:family="paragraph" style:parent-style-name="Table_20_Contents">
      <style:text-properties style:font-name="OpenDyslexic" fo:font-size="11pt" style:font-size-asian="11pt" style:font-size-complex="11pt"/>
    </style:style>
    <style:style style:name="P17" style:family="paragraph" style:parent-style-name="Table_20_Contents">
      <style:text-properties style:font-name="OpenDyslexic" fo:font-size="11pt" officeooo:rsid="001a3cdd" officeooo:paragraph-rsid="001a3cdd" style:font-size-asian="11pt" style:font-size-complex="11pt"/>
    </style:style>
    <style:style style:name="P18" style:family="paragraph" style:parent-style-name="Table_20_Contents">
      <style:text-properties style:font-name="OpenDyslexic" fo:font-size="11pt" officeooo:paragraph-rsid="001a3cdd" style:font-size-asian="11pt" style:font-size-complex="11pt"/>
    </style:style>
    <style:style style:name="T1" style:family="text">
      <style:text-properties officeooo:rsid="0014c6e9"/>
    </style:style>
    <style:style style:name="T2" style:family="text">
      <style:text-properties officeooo:rsid="001a3cdd"/>
    </style:style>
    <style:style style:name="T3" style:family="text">
      <style:text-properties style:font-name="OpenDyslexic" officeooo:rsid="0011ef64"/>
    </style:style>
    <style:style style:name="T4" style:family="text">
      <style:text-properties style:font-name="OpenDyslexic" officeooo:rsid="001a3cdd"/>
    </style:style>
    <style:style style:name="T5" style:family="text">
      <style:text-properties style:font-name="OpenDyslexic" fo:font-size="11pt" style:text-underline-style="solid" style:text-underline-width="auto" style:text-underline-color="font-color" officeooo:rsid="0012d62c" style:font-size-asian="11pt" style:font-size-complex="11pt"/>
    </style:style>
    <style:style style:name="T6" style:family="text">
      <style:text-properties style:font-name="OpenDyslexic" fo:font-size="11pt" style:text-underline-style="solid" style:text-underline-width="auto" style:text-underline-color="font-color" officeooo:rsid="0011ef64" style:font-size-asian="11pt" style:font-size-complex="11pt"/>
    </style:style>
    <style:style style:name="T7" style:family="text">
      <style:text-properties style:font-name="OpenDyslexic" fo:font-size="11pt" style:text-underline-style="none" officeooo:rsid="001a3cdd" style:font-size-asian="11pt" style:font-size-complex="11pt"/>
    </style:style>
    <style:style style:name="T8" style:family="text">
      <style:text-properties style:font-name="OpenDyslexic" fo:font-size="11pt" style:text-underline-style="none" officeooo:rsid="0012d62c" style:font-size-asian="11pt" style:font-size-complex="11pt"/>
    </style:style>
    <style:style style:name="T9" style:family="text">
      <style:text-properties style:font-name="OpenDyslexic" fo:font-size="11pt" style:text-underline-style="none" officeooo:rsid="001ad123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officeooo:rsid="001ad1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556cm, 0.413cm, 5.65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41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609cm, 0.305cm, 0.404cm, 0.5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5"><text:span text:style-name="T3">Collège C.</text:span><text:span text:style-name="T4">DULLIN</text:span><text:span text:style-name="T3"> <text:s text:c="61"/>6ème</text:span></text:p>
            <text:p text:style-name="P1">Devoir <text:s text:c="27"/>Triangles et quadrilatères</text:p>
          </table:table-cell>
        </table:table-row>
      </table:table>
      <text:p text:style-name="P4"><draw:frame draw:style-name="fr3" draw:name="Image5" text:anchor-type="paragraph" svg:x="2.753cm" svg:y="0.131cm" svg:width="14.266cm" svg:height="3.898cm" draw:z-index="2"><draw:image xlink:href="Pictures/10000000000002AC000000BB546962FE23CDEBBE.png" xlink:type="simple" xlink:show="embed" xlink:actuate="onLoad" loext:mime-type="image/png"/></draw:frame></text:p>
      <text:p text:style-name="P14"><text:span text:style-name="T5">Exercice 1 :</text:span></text:p>
      <text:p text:style-name="P10"/>
      <text:p text:style-name="P10"/>
      <text:p text:style-name="P10"/>
      <text:p text:style-name="P10"/>
      <text:p text:style-name="P10"><text:span text:style-name="T2">1.</text:span> Quelle est la nature du triangle GHI ? Justifier </text:p>
      <text:p text:style-name="P10"><draw:frame draw:style-name="fr3" draw:name="Image6" text:anchor-type="paragraph" svg:x="-0.452cm" svg:y="0.183cm" svg:width="18.669cm" svg:height="1.856cm" draw:z-index="3"><draw:image xlink:href="Pictures/100002010000032600000058BDC75155A91C48B1.png" xlink:type="simple" xlink:show="embed" xlink:actuate="onLoad" loext:mime-type="image/png"/></draw:frame><text:span text:style-name="T2">2.</text:span> Quelle est la nature du triangle EDF ? Justifier</text:p>
      <text:p text:style-name="P10"><draw:frame draw:style-name="fr3" draw:name="Image7" text:anchor-type="paragraph" svg:x="-0.452cm" svg:y="0.183cm" svg:width="18.669cm" svg:height="1.856cm" draw:z-index="4"><draw:image xlink:href="Pictures/100002010000032600000058BDC75155A91C48B1.png" xlink:type="simple" xlink:show="embed" xlink:actuate="onLoad" loext:mime-type="image/png"/></draw:frame><text:span text:style-name="T2">3.</text:span> Quelle est la nature du triangle JLK ? Justifier</text:p>
      <text:p text:style-name="P7"><draw:frame draw:style-name="fr3" draw:name="Image8" text:anchor-type="paragraph" svg:x="-0.45cm" svg:y="0.265cm" svg:width="18.669cm" svg:height="1.856cm" draw:z-index="5"><draw:image xlink:href="Pictures/100002010000032600000058BDC75155A91C48B1.png" xlink:type="simple" xlink:show="embed" xlink:actuate="onLoad" loext:mime-type="image/png"/></draw:frame></text:p>
      <text:p text:style-name="P5">Exercice <text:span text:style-name="T2">2</text:span> :</text:p>
      <text:p text:style-name="P8">1. Construire un triangle ABC tel que AB=4cm, AC=3cm et BC=3,5cm.</text:p>
      <text:p text:style-name="P8">2. Construire un triangle DEF équilatéral tel que DE=4cm.</text:p>
      <text:p text:style-name="P8">3. Construire un triangle GHI rectangle en H tel que GH=4cm et GI=5cm.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7">1.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au2.A1" office:value-type="string">
            <text:p text:style-name="P17">2.</text:p>
          </table:table-cell>
          <table:table-cell table:style-name="Tableau2.C1" office:value-type="string">
            <text:p text:style-name="P17">3.</text:p>
          </table:table-cell>
        </table:table-row>
      </table:table>
      <text:p text:style-name="P2"><text:soft-page-break/><text:span text:style-name="T6">Exercice 3 :</text:span></text:p>
      <text:p text:style-name="P13"><draw:frame draw:style-name="fr4" draw:name="Image1" text:anchor-type="paragraph" svg:x="-1.039cm" svg:y="0.021cm" svg:width="5.205cm" svg:height="4.41cm" draw:z-index="0"><draw:image xlink:href="Pictures/100002010000010B000000EBFC63800D175C0D21.png" xlink:type="simple" xlink:show="embed" xlink:actuate="onLoad" loext:mime-type="image/png"/></draw:frame><text:span text:style-name="T7">1</text:span><text:span text:style-name="T8">. Quel est le côté opposé </text:span><text:span text:style-name="T9">à</text:span><text:span text:style-name="T8"> [BC] dans le quadrilatère ABCD ?</text:span></text:p>
      <text:p text:style-name="P13"><draw:frame draw:style-name="fr1" draw:name="Image2" text:anchor-type="paragraph" svg:x="4.339cm" svg:y="0.243cm" svg:width="13.231cm" svg:height="1.506cm" draw:z-index="7"><draw:image xlink:href="Pictures/100002010000032600000058BDC75155A91C48B1.png" xlink:type="simple" xlink:show="embed" xlink:actuate="onLoad" loext:mime-type="image/png"/></draw:frame><text:span text:style-name="T8"/></text:p>
      <text:p text:style-name="P8"><text:span text:style-name="T2">2.Quels sont les côtés consécutifs au segment [AD] dans le quadrilatère ABCD ?</text:span></text:p>
      <text:p text:style-name="P9"><draw:frame draw:style-name="fr2" draw:name="Image3" text:anchor-type="paragraph" svg:x="-0.54cm" svg:y="0.347cm" svg:width="18.669cm" svg:height="1.506cm" draw:z-index="1"><draw:image xlink:href="Pictures/100002010000032600000058BDC75155A91C48B1.png" xlink:type="simple" xlink:show="embed" xlink:actuate="onLoad" loext:mime-type="image/png"/></draw:frame><draw:frame draw:style-name="fr2" draw:name="Image4" text:anchor-type="paragraph" svg:x="-0.452cm" svg:y="2.711cm" svg:width="18.669cm" svg:height="1.506cm" draw:z-index="6"><draw:image xlink:href="Pictures/100002010000032600000058BDC75155A91C48B1.png" xlink:type="simple" xlink:show="embed" xlink:actuate="onLoad" loext:mime-type="image/png"/></draw:frame><text:span text:style-name="T2">3.</text:span> Quelles sont les diagonales du quadrilatère ABCD ?</text:p>
      <text:p text:style-name="P6">Exercice 4 :</text:p>
      <text:p text:style-name="P11">Dans chaque cas, trace une figure à main levée puis réalise la figure en vraie grandeur.</text:p>
      <text:p text:style-name="P13"><text:span text:style-name="T8">1. Construire un rectangle EFGH tel que EF=4cm et FG=2cm</text:span></text:p>
      <text:p text:style-name="P13"><text:span text:style-name="T8">2. Construire un losange IJKL tel que JL=3cm et IJ=4CM</text:span></text:p>
      <text:p text:style-name="P13"><text:span text:style-name="T8">3. Construire un carré MNOP tel que MN=3cm</text:span>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17">1.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au3.A1" office:value-type="string">
            <text:p text:style-name="P17">2.</text:p>
          </table:table-cell>
          <table:table-cell table:style-name="Tableau3.C1" office:value-type="string">
            <text:p text:style-name="P17">3.</text:p>
          </table:table-cell>
        </table:table-row>
      </table:table>
      <text:p text:style-name="P6">Exercice 5 :</text:p>
      <text:p text:style-name="P9">1. <text:span text:style-name="T1">Je suis un quadrilatère ayant 4 angles droits, mes côtés opposés sont de la même longueur. Je suis ……………….</text:span></text:p>
      <text:p text:style-name="P12">2. Je suis un quadrilatère, mes quatre côtés sont égaux cependant je n’ai pas d’angle droit. Je suis……………….</text:p>
      <text:p text:style-name="P3"><text:span text:style-name="T10">3. Je suis un quadrilatère, mes quatre côtés sont égaux et j’ai quatre angles droits. Je suis ………………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8T10:27:24.946000000</meta:creation-date>
    <dc:date>2022-01-26T08:51:34.005000000</dc:date>
    <meta:editing-duration>PT5M17S</meta:editing-duration>
    <meta:editing-cycles>2</meta:editing-cycles>
    <meta:generator>LibreOffice/6.3.6.2$Windows_X86_64 LibreOffice_project/2196df99b074d8a661f4036fca8fa0cbfa33a497</meta:generator>
    <meta:print-date>2022-01-26T08:51:02.311000000</meta:print-date>
    <meta:document-statistic meta:table-count="3" meta:image-count="8" meta:object-count="0" meta:page-count="2" meta:paragraph-count="29" meta:word-count="226" meta:character-count="1308" meta:non-whitespace-character-count="1022"/>
  </office:meta>
</office:document-meta>
</file>