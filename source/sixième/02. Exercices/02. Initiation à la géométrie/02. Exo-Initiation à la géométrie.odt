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E4000000D09139D41429D1BFED.png" manifest:media-type="image/png"/>
  <manifest:file-entry manifest:full-path="Pictures/100000000000028B000001802CFFB7D48E541415.png" manifest:media-type="image/png"/>
  <manifest:file-entry manifest:full-path="Pictures/100000000000025A0000015F8C3238B4A71BE04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eda4d" officeooo:paragraph-rsid="001eda4d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20cf5b" officeooo:paragraph-rsid="0020cf5b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223deb" officeooo:paragraph-rsid="00223deb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223deb" officeooo:paragraph-rsid="0022e478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223deb" officeooo:paragraph-rsid="00237d06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24742e" officeooo:paragraph-rsid="0024742e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24742e" officeooo:paragraph-rsid="0026ea18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26382d" officeooo:paragraph-rsid="0026382d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26ea18" officeooo:paragraph-rsid="0026ea18"/>
    </style:style>
    <style:style style:name="P11" style:family="paragraph" style:parent-style-name="Standard">
      <style:text-properties style:font-name="OpenDyslexic" style:text-underline-style="none" officeooo:rsid="001eda4d" officeooo:paragraph-rsid="001eda4d"/>
    </style:style>
    <style:style style:name="P12" style:family="paragraph" style:parent-style-name="Standard">
      <style:text-properties style:font-name="OpenDyslexic" style:text-underline-style="none" officeooo:rsid="00223deb" officeooo:paragraph-rsid="00223deb"/>
    </style:style>
    <style:style style:name="P13" style:family="paragraph" style:parent-style-name="Standard">
      <style:text-properties style:font-name="OpenDyslexic" officeooo:paragraph-rsid="00223deb"/>
    </style:style>
    <style:style style:name="P14" style:family="paragraph" style:parent-style-name="Table_20_Contents">
      <style:text-properties style:font-name="OpenDyslexic" officeooo:rsid="000692c1" officeooo:paragraph-rsid="001eda4d"/>
    </style:style>
    <style:style style:name="T1" style:family="text">
      <style:text-properties officeooo:rsid="000d6c80"/>
    </style:style>
    <style:style style:name="T2" style:family="text">
      <style:text-properties officeooo:rsid="001eda4d"/>
    </style:style>
    <style:style style:name="T3" style:family="text">
      <style:text-properties style:text-underline-style="solid" style:text-underline-width="auto" style:text-underline-color="font-color" officeooo:rsid="001eda4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da4d"/>
    </style:style>
    <style:style style:name="T6" style:family="text">
      <style:text-properties style:text-underline-style="none" officeooo:rsid="0022e478"/>
    </style:style>
    <style:style style:name="T7" style:family="text">
      <style:text-properties officeooo:rsid="0020cf5b"/>
    </style:style>
    <style:style style:name="T8" style:family="text">
      <style:text-properties style:text-position="sub 58%" style:text-underline-style="none" officeooo:rsid="0022e478"/>
    </style:style>
    <style:style style:name="T9" style:family="text">
      <style:text-properties style:text-position="0% 100%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style:text-underline-style="none" officeooo:rsid="0022e478"/>
    </style:style>
    <style:style style:name="T12" style:family="text">
      <style:text-properties style:text-position="0% 100%" style:text-underline-style="none" officeooo:rsid="00237d06"/>
    </style:style>
    <style:style style:name="T13" style:family="text">
      <style:text-properties style:text-position="0% 100%" style:text-underline-style="none" officeooo:rsid="0024742e"/>
    </style:style>
    <style:style style:name="T14" style:family="text">
      <style:text-properties style:text-position="0% 100%" style:text-underline-style="none" officeooo:rsid="0026382d"/>
    </style:style>
    <style:style style:name="T15" style:family="text">
      <style:text-properties style:text-position="0% 100%" style:text-underline-style="none" officeooo:rsid="0026ea18"/>
    </style:style>
    <style:style style:name="T16" style:family="text">
      <style:text-properties style:text-position="0% 100%" officeooo:rsid="00237d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solid"/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ollège <text:span text:style-name="T1">Amiral Lejeune</text:span> <text:s text:c="60"/><text:span text:style-name="T1">6 </text:span>ème<text:line-break/><text:span text:style-name="T2">Exercices </text:span><text:s text:c="17"/>Chapitre <text:span text:style-name="T1">2</text:span> :<text:span text:style-name="T1">Introduction à la</text:span> <text:span text:style-name="T1">Géométrie</text:span></text:p>
          </table:table-cell>
        </table:table-row>
      </table:table>
      <text:p text:style-name="P13"><text:line-break/></text:p>
      <text:section text:style-name="Sect1" text:name="Section1">
        <text:p text:style-name="P13"><text:span text:style-name="T3">Exercice 1 :<text:line-break/></text:span><text:span text:style-name="T5">Place trois points non alignés R,I et Z.<text:line-break/>Trace : </text:span></text:p>
        <text:p text:style-name="P1"><text:span text:style-name="T5">- en rouge, la droite (RI) ;</text:span></text:p>
        <text:p text:style-name="P1"><text:span text:style-name="T5">- en bleu, le segment (RZ) ;</text:span></text:p>
        <text:p text:style-name="P1"><text:span text:style-name="T5">- en vert, la demi-droite (IZ).</text:span></text:p>
        <text:p text:style-name="P1"><text:span text:style-name="T5"/></text:p>
        <text:p text:style-name="P2">Exercice 2 :</text:p>
        <text:p text:style-name="P2"><text:span text:style-name="T4">Trace une droite (d).</text:span></text:p>
        <text:p text:style-name="P2"><text:span text:style-name="T4">a. Place deux points S et A sur cette droite.</text:span></text:p>
        <text:p text:style-name="P2"><text:span text:style-name="T4">b. Donne deux autres façons de nommer la droite (d).</text:span></text:p>
        <text:p text:style-name="P2"><text:span text:style-name="T4">c. Placer un point C qui n’appartient pas à la droite (d).</text:span></text:p>
        <text:p text:style-name="P2"><text:span text:style-name="T4">d. Le point A appartient-il à la droite (SC) ?</text:span></text:p>
        <text:p text:style-name="P2"><text:span text:style-name="T4"/></text:p>
        <text:p text:style-name="P2">Exercice 3 :</text:p>
        <text:p text:style-name="P11">1) Placer trois points A,B et C non alignés. Tracer la droite (AC), le segment [BC] et la demi-droite [BA).</text:p>
        <text:p text:style-name="P11">2) Placer des points E, F, G et H tels que :</text:p>
        <text:p text:style-name="P11"><text:s text:c="6"/><draw:frame draw:style-name="fr3" draw:name="Objet1" text:anchor-type="as-char" svg:y="-0.527cm" svg:width="1.759cm" svg:height="0.739cm" draw:z-index="1"><draw:object xlink:href="./Object 1" xlink:type="simple" xlink:show="embed" xlink:actuate="onLoad"/><draw:image xlink:href="./ObjectReplacements/Object 1" xlink:type="simple" xlink:show="embed" xlink:actuate="onLoad"/></draw:frame>, <draw:frame draw:style-name="fr3" draw:name="Objet2" text:anchor-type="as-char" svg:y="-0.527cm" svg:width="1.69cm" svg:height="0.739cm" draw:z-index="2"><draw:object xlink:href="./Object 2" xlink:type="simple" xlink:show="embed" xlink:actuate="onLoad"/><draw:image xlink:href="./ObjectReplacements/Object 2" xlink:type="simple" xlink:show="embed" xlink:actuate="onLoad"/></draw:frame>, <text:span text:style-name="T7">G appartient à [BA) et H appartient à [AB).</text:span></text:p>
      </text:section>
      <text:p text:style-name="P11"/>
      <text:p text:style-name="P3">Exercice 4 :</text:p>
      <text:p text:style-name="P3"><draw:frame draw:style-name="fr1" draw:name="Image1" text:anchor-type="paragraph" svg:width="12.806cm" svg:height="5.503cm" draw:z-index="0"><draw:image xlink:href="Pictures/10000000000001E4000000D09139D41429D1BFED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4">a. Après avoir observé la figure, complète les pointillés avec le symbole « appartient » ou « n’appartient pas ».</text:span></text:p>
      <text:p text:style-name="P4"><text:span text:style-name="T4">- G …. [AU] <text:s text:c="22"/>- A … [GU] <text:s text:c="23"/>- S … [RG]<text:line-break/>- G …. (AU) <text:s text:c="22"/>- U … (AG) <text:s text:c="23"/>- S … (RG)<text:line-break/>b. Quels sont les points alignés ? Fais deux phrases<text:line-break/>c. Comment peux tu définir le point G ?</text:span></text:p>
      <text:p text:style-name="P4"><text:soft-page-break/>Exercice 5 :</text:p>
      <text:p text:style-name="P12">1) Placer trois points non alignés E, F et G.</text:p>
      <text:p text:style-name="P12">Tracer le segment [EF] en bleu, la demi-droite [FG) en rouge et la droite (EG) en vert.</text:p>
      <text:p text:style-name="P12">2) Placer un point A appartenant au segment [EF].</text:p>
      <text:p text:style-name="P12">3) Placer un point B appartenant à la demi-droite [FG) et n’appartenant pas au segment [FG].</text:p>
      <text:p text:style-name="P12">4) Placer un point C appartenant à la droite (EG) et n’appartenant pas à la demi-droite [EG).</text:p>
      <text:p text:style-name="P12"/>
      <text:p text:style-name="P4"><draw:frame draw:style-name="fr2" draw:name="Image2" text:anchor-type="paragraph" svg:x="-0.291cm" svg:y="1.323cm" svg:width="17cm" svg:height="10.028cm" draw:z-index="3"><draw:image xlink:href="Pictures/100000000000028B000001802CFFB7D48E541415.png" xlink:type="simple" xlink:show="embed" xlink:actuate="onLoad" loext:mime-type="image/png"/></draw:frame>Exercice 6 :<text:line-break/><text:span text:style-name="T6">a. Quel est le point d’intersection des droites …</text:span></text:p>
      <text:p text:style-name="P5"><text:span text:style-name="T6">- (d</text:span><text:span text:style-name="T8">1</text:span><text:span text:style-name="T11">) et (d</text:span><text:span text:style-name="T8">2</text:span><text:span text:style-name="T11">) ? <text:s text:c="9"/>- (d</text:span><text:span text:style-name="T8">2</text:span><text:span text:style-name="T11">) et (d</text:span><text:span text:style-name="T8">3</text:span><text:span text:style-name="T11">) ? <text:s text:c="6"/>-(d</text:span><text:span text:style-name="T8">3</text:span><text:span text:style-name="T11">) et (d</text:span><text:span text:style-name="T8">4</text:span><text:span text:style-name="T11">) ?</text:span></text:p>
      <text:p text:style-name="P6"><text:span text:style-name="T11">b. Complète chaque phrase.</text:span></text:p>
      <text:p text:style-name="P6"><text:span text:style-name="T11">- </text:span><text:span text:style-name="T12">N est le point d’intersection des droites ….</text:span></text:p>
      <text:p text:style-name="P6"><text:span text:style-name="T12">- E est le point d’intersection des droites ….</text:span></text:p>
      <text:p text:style-name="P6"><text:span text:style-name="T12">- S est le point d’intersection des droites ….</text:span></text:p>
      <text:p text:style-name="P6"><text:span text:style-name="T12"/></text:p>
      <text:p text:style-name="P6"><draw:frame draw:style-name="fr2" draw:name="Image3" text:anchor-type="paragraph" svg:x="0.113cm" svg:y="1.005cm" svg:width="15.928cm" svg:height="9.287cm" draw:z-index="4"><draw:image xlink:href="Pictures/100000000000025A0000015F8C3238B4A71BE044.png" xlink:type="simple" xlink:show="embed" xlink:actuate="onLoad" loext:mime-type="image/png"/></draw:frame><text:soft-page-break/><text:span text:style-name="T16">Exercice 7 :</text:span><text:span text:style-name="T11"> <text:line-break/></text:span><text:span text:style-name="T13">a. E est le point d’intersection des droites (HG) et (DF). Construis-le.</text:span></text:p>
      <text:p text:style-name="P7"><text:span text:style-name="T10">b. A est le point d’intersection des droites (HD) et (GF). Construis-le.</text:span></text:p>
      <text:p text:style-name="P8"><text:span text:style-name="T10">c. U est le point d’intersection des droites (GD) et (HF). Construis-le.<text:line-break/><text:line-break/></text:span></text:p>
      <text:section text:style-name="Sect1" text:name="Section2">
        <text:p text:style-name="P8"><text:span text:style-name="T9">Exercice 8 :<text:line-break/></text:span><text:span text:style-name="T10">1) Tracer un segment [AB] </text:span><text:span text:style-name="T14">de longueur 8,2 cm.</text:span></text:p>
        <text:p text:style-name="P9"><text:span text:style-name="T10">2) Placer son milieu C. Coder la figure.</text:span></text:p>
        <text:p text:style-name="P9"><text:span text:style-name="T10">3) Quelles égalités de longueurs peut-on écrire ?</text:span></text:p>
        <text:p text:style-name="P9"><text:span text:style-name="T10">4) Quelle est la longueur du segment [CB] ?</text:span></text:p>
        <text:p text:style-name="P9"><text:span text:style-name="T10"/></text:p>
        <text:p text:style-name="P9"><text:span text:style-name="T9">Exercice 9 :<text:line-break/></text:span><text:span text:style-name="T10">1) Tracer un segment [TP] de longueur 11,7 cm. Placer sur ce segment le point I situé à 5,8 cm du point T.</text:span></text:p>
        <text:p text:style-name="P9"><text:span text:style-name="T10">2) a) Le point I semble-t-il être au milieu du segment [TP] ?</text:span></text:p>
        <text:p text:style-name="P9"><text:span text:style-name="T10">b) Le point I est-il le milieu du segment [TP] ? Justifier la réponse.</text:span></text:p>
        <text:p text:style-name="P9"><text:span text:style-name="T10"/></text:p>
        <text:p text:style-name="P9"><text:span text:style-name="T9">Exercice 10 :<text:line-break/></text:span><text:span text:style-name="T10">1) Tracer un segment [IL] de longueur 8,1 cm. Placer sur ce segment le point D à 2,7 cm du point I et le point O à 2,7 cm du point L.</text:span></text:p>
        <text:p text:style-name="P9"><text:span text:style-name="T10">2) Calculer la longueur DO. Coder la figure.</text:span></text:p>
        <text:p text:style-name="P10"><text:span text:style-name="T10">3) Citer des milieux. Justifier chaque répons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8:11:00.456000000</meta:creation-date>
    <dc:date>2020-09-13T20:26:43.814000000</dc:date>
    <meta:editing-duration>PT1M24S</meta:editing-duration>
    <meta:editing-cycles>1</meta:editing-cycles>
    <meta:document-statistic meta:table-count="1" meta:image-count="3" meta:object-count="2" meta:page-count="3" meta:paragraph-count="44" meta:word-count="514" meta:character-count="2708" meta:non-whitespace-character-count="2044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i>E</mi>
      <mo stretchy="false">∈</mo>
      <mrow>
        <mo fence="true" stretchy="false">(</mo>
        <mrow>
          <mi mathvariant="italic">AC</mi>
        </mrow>
        <mo fence="true" stretchy="false">)</mo>
      </mrow>
    </mrow>
    <annotation encoding="StarMath 5.0">E in ( AC )</annotation>
  </semantics>
</math>
</file>

<file path=Object 2/content.xml><?xml version="1.0" encoding="utf-8"?>
<math xmlns="http://www.w3.org/1998/Math/MathML" display="block">
  <semantics>
    <mrow>
      <mi>F</mi>
      <mo stretchy="false">∈</mo>
      <mrow>
        <mo fence="true" stretchy="false">[</mo>
        <mrow>
          <mi mathvariant="italic">BC</mi>
        </mrow>
        <mo fence="true" stretchy="false">]</mo>
      </mrow>
    </mrow>
    <annotation encoding="StarMath 5.0">F in  [ BC ]</annotation>
  </semantics>
</math>
</file>