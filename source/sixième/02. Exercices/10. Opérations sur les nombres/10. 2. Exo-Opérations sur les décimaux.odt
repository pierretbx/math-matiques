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," svg:font-family="'Ope,'"/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51cm" style:rel-column-width="1638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51cm" style:rel-column-width="16383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OpenDyslexic"/>
    </style:style>
    <style:style style:name="P2" style:family="paragraph" style:parent-style-name="Standard">
      <style:text-properties style:font-name="OpenDyslexic" style:text-underline-style="solid" style:text-underline-width="auto" style:text-underline-color="font-color" officeooo:rsid="001805fa" officeooo:paragraph-rsid="001805fa"/>
    </style:style>
    <style:style style:name="P3" style:family="paragraph" style:parent-style-name="Standard">
      <style:text-properties style:font-name="OpenDyslexic" style:text-underline-style="solid" style:text-underline-width="auto" style:text-underline-color="font-color" officeooo:rsid="0018838b" officeooo:paragraph-rsid="0018838b"/>
    </style:style>
    <style:style style:name="P4" style:family="paragraph" style:parent-style-name="Standard">
      <style:text-properties style:font-name="OpenDyslexic" style:text-underline-style="solid" style:text-underline-width="auto" style:text-underline-color="font-color" officeooo:rsid="00194f53" officeooo:paragraph-rsid="00194f53"/>
    </style:style>
    <style:style style:name="P5" style:family="paragraph" style:parent-style-name="Standard">
      <style:text-properties style:font-name="OpenDyslexic" style:text-underline-style="none" officeooo:rsid="001805fa" officeooo:paragraph-rsid="001805fa"/>
    </style:style>
    <style:style style:name="P6" style:family="paragraph" style:parent-style-name="Standard">
      <style:text-properties style:font-name="OpenDyslexic" style:text-underline-style="none" officeooo:rsid="0018838b" officeooo:paragraph-rsid="0018838b"/>
    </style:style>
    <style:style style:name="P7" style:family="paragraph" style:parent-style-name="Standard">
      <style:text-properties style:font-name="OpenDyslexic" style:text-underline-style="none" officeooo:rsid="00194f53" officeooo:paragraph-rsid="00194f53"/>
    </style:style>
    <style:style style:name="P8" style:family="paragraph" style:parent-style-name="Standard" style:list-style-name="L1">
      <style:text-properties style:font-name="OpenDyslexic" style:text-underline-style="none" officeooo:rsid="00194f53" officeooo:paragraph-rsid="00194f53"/>
    </style:style>
    <style:style style:name="P9" style:family="paragraph" style:parent-style-name="Standard">
      <style:text-properties style:font-name="OpenDyslexic" style:text-underline-style="none" officeooo:rsid="001b108d" officeooo:paragraph-rsid="001b108d"/>
    </style:style>
    <style:style style:name="P10" style:family="paragraph" style:parent-style-name="Standard">
      <style:text-properties officeooo:paragraph-rsid="00194f53"/>
    </style:style>
    <style:style style:name="P11" style:family="paragraph" style:parent-style-name="Table_20_Contents">
      <style:text-properties style:font-name="OpenDyslexic"/>
    </style:style>
    <style:style style:name="P12" style:family="paragraph" style:parent-style-name="Table_20_Contents">
      <style:text-properties style:font-name="OpenDyslexic" officeooo:rsid="001805fa" officeooo:paragraph-rsid="001805fa"/>
    </style:style>
    <style:style style:name="P13" style:family="paragraph" style:parent-style-name="Table_20_Contents">
      <style:paragraph-properties fo:text-align="center" style:justify-single-word="false"/>
      <style:text-properties style:font-name="OpenDyslexic" officeooo:rsid="0018838b" officeooo:paragraph-rsid="0018838b"/>
    </style:style>
    <style:style style:name="P14" style:family="paragraph" style:parent-style-name="Table_20_Contents">
      <style:paragraph-properties fo:text-align="center" style:justify-single-word="false"/>
      <style:text-properties style:font-name="OpenDyslexic" officeooo:rsid="0018838b" officeooo:paragraph-rsid="00194f53"/>
    </style:style>
    <style:style style:name="P15" style:family="paragraph" style:parent-style-name="Table_20_Contents">
      <style:text-properties style:font-name="OpenDyslexic" officeooo:paragraph-rsid="00194f53"/>
    </style:style>
    <style:style style:name="P16" style:family="paragraph" style:parent-style-name="Table_20_Contents">
      <style:paragraph-properties fo:text-align="center" style:justify-single-word="false"/>
      <style:text-properties style:font-name="OpenDyslexic" officeooo:rsid="00194f53" officeooo:paragraph-rsid="00194f53"/>
    </style:style>
    <style:style style:name="T1" style:family="text">
      <style:text-properties officeooo:rsid="0018838b"/>
    </style:style>
    <style:style style:name="T2" style:family="text">
      <style:text-properties officeooo:rsid="001b108d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2">Collège A.Lejeune <text:s text:c="65"/>6ème</text:p>
            <text:p text:style-name="P12">Exercices suites <text:s text:c="12"/>Chapitre : Les nombres décimaux fin</text:p>
          </table:table-cell>
        </table:table-row>
      </table:table>
      <text:p text:style-name="P1"/>
      <text:p text:style-name="P1"/>
      <text:p text:style-name="P2">Exercice 11 :</text:p>
      <text:p text:style-name="P5">Calcule les produits suivants.</text:p>
      <text:p text:style-name="P5">a.<draw:frame draw:style-name="fr1" draw:name="Objet1" text:anchor-type="as-char" svg:y="-0.527cm" svg:width="2.575cm" svg:height="0.739cm" draw:z-index="0"><draw:object xlink:href="./Object 1" xlink:type="simple" xlink:show="embed" xlink:actuate="onLoad"/><draw:image xlink:href="./ObjectReplacements/Object 1" xlink:type="simple" xlink:show="embed" xlink:actuate="onLoad"/></draw:frame> <text:s text:c="3"/>b. <draw:frame draw:style-name="fr1" draw:name="Objet2" text:anchor-type="as-char" svg:y="-0.527cm" svg:width="3.002cm" svg:height="0.739cm" draw:z-index="1"><draw:object xlink:href="./Object 2" xlink:type="simple" xlink:show="embed" xlink:actuate="onLoad"/><draw:image xlink:href="./ObjectReplacements/Object 2" xlink:type="simple" xlink:show="embed" xlink:actuate="onLoad"/></draw:frame>c. <draw:frame draw:style-name="fr1" draw:name="Objet3" text:anchor-type="as-char" svg:y="-0.527cm" svg:width="2.568cm" svg:height="0.739cm" draw:z-index="2"><draw:object xlink:href="./Object 3" xlink:type="simple" xlink:show="embed" xlink:actuate="onLoad"/><draw:image xlink:href="./ObjectReplacements/Object 3" xlink:type="simple" xlink:show="embed" xlink:actuate="onLoad"/></draw:frame><text:s/>d. <draw:frame draw:style-name="fr1" draw:name="Objet4" text:anchor-type="as-char" svg:y="-0.527cm" svg:width="2.706cm" svg:height="0.73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5"/>
      <text:p text:style-name="P2">Exercice 12 :</text:p>
      <text:p text:style-name="P5">Pose et effectue les multiplications suivantes.</text:p>
      <text:p text:style-name="P5">a.<draw:frame draw:style-name="fr1" draw:name="Objet5" text:anchor-type="as-char" svg:y="-0.527cm" svg:width="2.491cm" svg:height="0.739cm" draw:z-index="4"><draw:object xlink:href="./Object 5" xlink:type="simple" xlink:show="embed" xlink:actuate="onLoad"/><draw:image xlink:href="./ObjectReplacements/Object 5" xlink:type="simple" xlink:show="embed" xlink:actuate="onLoad"/></draw:frame> <text:s/>b. <draw:frame draw:style-name="fr1" draw:name="Objet6" text:anchor-type="as-char" svg:y="-0.527cm" svg:width="2.268cm" svg:height="0.739cm" draw:z-index="5"><draw:object xlink:href="./Object 6" xlink:type="simple" xlink:show="embed" xlink:actuate="onLoad"/><draw:image xlink:href="./ObjectReplacements/Object 6" xlink:type="simple" xlink:show="embed" xlink:actuate="onLoad"/></draw:frame><text:s text:c="2"/><text:span text:style-name="T1">c. </text:span><text:span text:style-name="T1"><draw:frame draw:style-name="fr1" draw:name="Objet7" text:anchor-type="as-char" svg:y="-0.527cm" svg:width="2.23cm" svg:height="0.739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"><text:s text:c="2"/>d.</text:span><text:span text:style-name="T1"><draw:frame draw:style-name="fr1" draw:name="Objet8" text:anchor-type="as-char" svg:y="-0.527cm" svg:width="2.464cm" svg:height="0.739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5"/>
      <text:p text:style-name="P3">Exercice 13 :</text:p>
      <text:p text:style-name="P6">Lors du calcul du quotient de 355 par 13, la calculatrice affiche : 27,30769231. Sans calculatrice donne une valeur approchée au millième des quotients suivants.</text:p>
      <text:p text:style-name="P6">a. <draw:frame draw:style-name="fr1" draw:name="Objet9" text:anchor-type="as-char" svg:y="-0.527cm" svg:width="2.753cm" svg:height="0.739cm" draw:z-index="8"><draw:object xlink:href="./Object 9" xlink:type="simple" xlink:show="embed" xlink:actuate="onLoad"/><draw:image xlink:href="./ObjectReplacements/Object 9" xlink:type="simple" xlink:show="embed" xlink:actuate="onLoad"/></draw:frame><text:s text:c="16"/>b. <draw:frame draw:style-name="fr1" draw:name="Objet10" text:anchor-type="as-char" svg:y="-0.527cm" svg:width="2.753cm" svg:height="0.739cm" draw:z-index="9"><draw:object xlink:href="./Object 10" xlink:type="simple" xlink:show="embed" xlink:actuate="onLoad"/><draw:image xlink:href="./ObjectReplacements/Object 10" xlink:type="simple" xlink:show="embed" xlink:actuate="onLoad"/></draw:frame><text:s text:c="7"/>c. <draw:frame draw:style-name="fr1" draw:name="Objet11" text:anchor-type="as-char" svg:y="-0.527cm" svg:width="2.956cm" svg:height="0.739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6"/>
      <text:p text:style-name="P3">Exercice 14 :</text:p>
      <text:p text:style-name="P6">Complète le tableau ci-dessous en t’aidant des trois calculs suivants.</text:p>
      <text:p text:style-name="P6">a.<draw:frame draw:style-name="fr1" draw:name="Objet12" text:anchor-type="as-char" svg:y="-0.527cm" svg:width="4.113cm" svg:height="0.739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6">b. <draw:frame draw:style-name="fr1" draw:name="Objet13" text:anchor-type="as-char" svg:y="-0.527cm" svg:width="3.87cm" svg:height="0.739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6">c. <draw:frame draw:style-name="fr1" draw:name="Objet14" text:anchor-type="as-char" svg:y="-0.527cm" svg:width="4.113cm" svg:height="0.739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6"/>
      <table:table table:name="Tableau2" table:style-name="Tableau2">
        <table:table-column table:style-name="Tableau2.A" table:number-columns-repeated="4"/>
        <table:table-row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3">Arrondi à l’unité près</text:p>
          </table:table-cell>
          <table:table-cell table:style-name="Tableau2.A1" office:value-type="string">
            <text:p text:style-name="P13">Arrondi au dixième près</text:p>
          </table:table-cell>
          <table:table-cell table:style-name="Tableau2.D1" office:value-type="string">
            <text:p text:style-name="P13">Arrondi au centième près</text:p>
          </table:table-cell>
        </table:table-row>
        <table:table-row>
          <table:table-cell table:style-name="Tableau2.A2" office:value-type="string">
            <text:p text:style-name="P13">A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D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3">B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D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3">C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D2" office:value-type="string">
            <text:p text:style-name="P11"/>
          </table:table-cell>
        </table:table-row>
      </table:table>
      <text:p text:style-name="P6"/>
      <text:p text:style-name="P6"/>
      <text:p text:style-name="P6"/>
      <text:p text:style-name="P6"/>
      <text:p text:style-name="P3"><text:soft-page-break/>Exercice 15 :</text:p>
      <text:p text:style-name="P7">Effectue les divisions suivantes jusqu’au millième.</text:p>
      <text:p text:style-name="P7">a. <draw:frame draw:style-name="fr1" draw:name="Objet15" text:anchor-type="as-char" svg:y="-0.527cm" svg:width="1.369cm" svg:height="0.739cm" draw:z-index="14"><draw:object xlink:href="./Object 15" xlink:type="simple" xlink:show="embed" xlink:actuate="onLoad"/><draw:image xlink:href="./ObjectReplacements/Object 15" xlink:type="simple" xlink:show="embed" xlink:actuate="onLoad"/></draw:frame><text:s text:c="3"/>b. <draw:frame draw:style-name="fr1" draw:name="Objet16" text:anchor-type="as-char" svg:y="-0.527cm" svg:width="1.563cm" svg:height="0.739cm" draw:z-index="15"><draw:object xlink:href="./Object 16" xlink:type="simple" xlink:show="embed" xlink:actuate="onLoad"/><draw:image xlink:href="./ObjectReplacements/Object 16" xlink:type="simple" xlink:show="embed" xlink:actuate="onLoad"/></draw:frame><text:s text:c="2"/>c. <draw:frame draw:style-name="fr1" draw:name="Objet17" text:anchor-type="as-char" svg:y="-0.527cm" svg:width="1.312cm" svg:height="0.739cm" draw:z-index="16"><draw:object xlink:href="./Object 17" xlink:type="simple" xlink:show="embed" xlink:actuate="onLoad"/><draw:image xlink:href="./ObjectReplacements/Object 17" xlink:type="simple" xlink:show="embed" xlink:actuate="onLoad"/></draw:frame><text:s text:c="2"/>d. <draw:frame draw:style-name="fr1" draw:name="Objet18" text:anchor-type="as-char" svg:y="-0.527cm" svg:width="1.561cm" svg:height="0.739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7"/>
      <text:p text:style-name="P7">b. En utilisant les résultats précédents, complète <text:s/>le tableau ci-dessous.</text:p>
      <text:p text:style-name="P7"/>
      <table:table table:name="Tableau3" table:style-name="Tableau3">
        <table:table-column table:style-name="Tableau3.A" table:number-columns-repeated="4"/>
        <table:table-row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4">Arrondi à l’unité près</text:p>
          </table:table-cell>
          <table:table-cell table:style-name="Tableau3.A1" office:value-type="string">
            <text:p text:style-name="P14">Arrondi au dixième près</text:p>
          </table:table-cell>
          <table:table-cell table:style-name="Tableau3.D1" office:value-type="string">
            <text:p text:style-name="P14">Arrondi au centième près</text:p>
          </table:table-cell>
        </table:table-row>
        <table:table-row>
          <table:table-cell table:style-name="Tableau3.A2" office:value-type="string">
            <text:p text:style-name="P14">A</text:p>
          </table:table-cell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15"/>
          </table:table-cell>
          <table:table-cell table:style-name="Tableau3.D2" office:value-type="string">
            <text:p text:style-name="P15"/>
          </table:table-cell>
        </table:table-row>
        <table:table-row>
          <table:table-cell table:style-name="Tableau3.A2" office:value-type="string">
            <text:p text:style-name="P14">B</text:p>
          </table:table-cell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15"/>
          </table:table-cell>
          <table:table-cell table:style-name="Tableau3.D2" office:value-type="string">
            <text:p text:style-name="P15"/>
          </table:table-cell>
        </table:table-row>
        <table:table-row>
          <table:table-cell table:style-name="Tableau3.A2" office:value-type="string">
            <text:p text:style-name="P14">C</text:p>
          </table:table-cell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15"/>
          </table:table-cell>
          <table:table-cell table:style-name="Tableau3.D2" office:value-type="string">
            <text:p text:style-name="P15"/>
          </table:table-cell>
        </table:table-row>
        <table:table-row>
          <table:table-cell table:style-name="Tableau3.A2" office:value-type="string">
            <text:p text:style-name="P16">D</text:p>
          </table:table-cell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15"/>
          </table:table-cell>
          <table:table-cell table:style-name="Tableau3.D2" office:value-type="string">
            <text:p text:style-name="P15"/>
          </table:table-cell>
        </table:table-row>
      </table:table>
      <text:p text:style-name="P10"/>
      <text:p text:style-name="P10"/>
      <text:p text:style-name="P4">Exercice 16 :</text:p>
      <text:p text:style-name="P7">Voici différentes distances.</text:p>
      <text:p text:style-name="P7">A=45km, B=450mm, C=4500 cm, D=45 dam, E=0,45dm, F=0,045hm.</text:p>
      <text:p text:style-name="P7"/>
      <text:p text:style-name="P7">Range-les de la plus courte à la plus longue.</text:p>
      <text:p text:style-name="P7"/>
      <text:p text:style-name="P4">Exercice 17 :</text:p>
      <text:p text:style-name="P7">Le boursier est l’insecte le plus fort du monde. Il est capable de soulever 1 141 fois sa propre masse !</text:p>
      <text:p text:style-name="P7">a. Quelle masse porterait un enfant pesant 42kg, s’il était aussi fort que le boursier ?</text:p>
      <text:p text:style-name="P7">b. Combien d’éléphants de 5 tonnes pourrait-il ainsi soulever ?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Exercice 18 :</text:p>
      <text:p text:style-name="P7">Pour faire une salade de fruits, Capucine a besoin de :</text:p>
      <text:list xml:id="list1262070702" text:style-name="L1">
        <text:list-item>
          <text:p text:style-name="P8">0,5 kg de pommes ;</text:p>
        </text:list-item>
        <text:list-item>
          <text:p text:style-name="P8">750g de poires</text:p>
        </text:list-item>
        <text:list-item>
          <text:p text:style-name="P8">300g d’oranges</text:p>
        </text:list-item>
        <text:list-item>
          <text:p text:style-name="P8">0,4 kg de bananes</text:p>
        </text:list-item>
        <text:list-item>
          <text:p text:style-name="P8">1 citron</text:p>
        </text:list-item>
      </text:list>
      <text:p text:style-name="P7">Quand elle pèse le tout, elle obtient 2kg. Combien pèse le citron ?</text:p>
      <text:p text:style-name="P7"/>
      <text:p text:style-name="P4">Exercice 19 :</text:p>
      <text:p text:style-name="P7">Une tarte est faite à partir de 500g de farine, 50cL d’eau qui pèsent 0,5 kg, 30dg de sel, 2 œufs (1 œuf pèse 1 dag), 3 cuillères de crème <text:span text:style-name="T2">fraîche</text:span> (<text:span text:style-name="T2">1 cuillerée de crème fraîche pèse 2,5 dag). Après cuisson, cette tarte pèse 900g.</text:span></text:p>
      <text:p text:style-name="P9">Quelle masse a été perdue ?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," svg:font-family="'Ope,'"/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7T22:06:55.861000000</meta:creation-date>
    <dc:date>2021-05-17T22:44:43.882000000</dc:date>
    <meta:editing-duration>PT1M34S</meta:editing-duration>
    <meta:editing-cycles>1</meta:editing-cycles>
    <meta:document-statistic meta:table-count="3" meta:image-count="0" meta:object-count="18" meta:page-count="3" meta:paragraph-count="52" meta:word-count="311" meta:character-count="1777" meta:non-whitespace-character-count="1401"/>
    <meta:generator>LibreOffice/6.2.3.2$Windows_X86_64 LibreOffice_project/aecc05fe267cc68dde00352a451aa867b3b546ac</meta:generator>
  </office:meta>
</office:document-meta>
</file>

<file path=Object 1/content.xml><?xml version="1.0" encoding="utf-8"?>
<math xmlns="http://www.w3.org/1998/Math/MathML" display="block">
  <semantics>
    <mrow>
      <mrow>
        <mn>52</mn>
        <mo stretchy="false">×</mo>
        <mn>0</mn>
      </mrow>
      <mrow>
        <mn>,8</mn>
        <mo stretchy="false">=</mo>
        <mn>..</mn>
      </mrow>
      <mi>.</mi>
    </mrow>
    <annotation encoding="StarMath 5.0">52 times 0,8 =...</annotation>
  </semantics>
</math>
</file>

<file path=Object 10/content.xml><?xml version="1.0" encoding="utf-8"?>
<math xmlns="http://www.w3.org/1998/Math/MathML" display="block">
  <semantics>
    <mrow>
      <mn>35</mn>
      <mrow>
        <mrow>
          <mn>,5</mn>
          <mo stretchy="false">÷</mo>
          <mn>13</mn>
        </mrow>
        <mo stretchy="false">≈</mo>
        <mn>...</mn>
      </mrow>
    </mrow>
    <annotation encoding="StarMath 5.0">35,5 div 13  approx ... </annotation>
  </semantics>
</math>
</file>

<file path=Object 11/content.xml><?xml version="1.0" encoding="utf-8"?>
<math xmlns="http://www.w3.org/1998/Math/MathML" display="block">
  <semantics>
    <mrow>
      <mn>3</mn>
      <mrow>
        <mrow>
          <mn>550</mn>
          <mo stretchy="false">÷</mo>
          <mn>13</mn>
        </mrow>
        <mo stretchy="false">≈</mo>
        <mn>..</mn>
      </mrow>
      <mi>.</mi>
    </mrow>
    <annotation encoding="StarMath 5.0">3 550 div 13 approx ...</annotation>
  </semantics>
</math>
</file>

<file path=Object 12/content.xml><?xml version="1.0" encoding="utf-8"?>
<math xmlns="http://www.w3.org/1998/Math/MathML" display="block">
  <semantics>
    <mrow>
      <mrow>
        <mrow>
          <mn>741</mn>
          <mo stretchy="false">÷</mo>
          <mn>35</mn>
        </mrow>
        <mo stretchy="false">≈</mo>
        <mn>21</mn>
      </mrow>
      <mn>,171</mn>
      <mn>..</mn>
      <mi>.</mi>
    </mrow>
    <annotation encoding="StarMath 5.0">741 div 35 approx 21,171...</annotation>
  </semantics>
</math>
</file>

<file path=Object 13/content.xml><?xml version="1.0" encoding="utf-8"?>
<math xmlns="http://www.w3.org/1998/Math/MathML" display="block">
  <semantics>
    <mrow>
      <mn>12</mn>
      <mrow>
        <mrow>
          <mn>,4</mn>
          <mo stretchy="false">÷</mo>
          <mn>6</mn>
        </mrow>
        <mo stretchy="false">≈</mo>
        <mn>2</mn>
      </mrow>
      <mn>,066</mn>
      <mn>..</mn>
      <mi>.</mi>
    </mrow>
    <annotation encoding="StarMath 5.0">12,4 div 6 approx 2,066...</annotation>
  </semantics>
</math>
</file>

<file path=Object 14/content.xml><?xml version="1.0" encoding="utf-8"?>
<math xmlns="http://www.w3.org/1998/Math/MathML" display="block">
  <semantics>
    <mrow>
      <mn>42</mn>
      <mrow>
        <mrow>
          <mn>,1</mn>
          <mo stretchy="false">÷</mo>
          <mn>3</mn>
        </mrow>
        <mo stretchy="false">≈</mo>
        <mn>14</mn>
      </mrow>
      <mn>,033</mn>
      <mn>..</mn>
      <mi>.</mi>
    </mrow>
    <annotation encoding="StarMath 5.0">42,1 div 3 approx 14,033...</annotation>
  </semantics>
</math>
</file>

<file path=Object 15/content.xml><?xml version="1.0" encoding="utf-8"?>
<math xmlns="http://www.w3.org/1998/Math/MathML" display="block">
  <semantics>
    <mrow>
      <mn>85</mn>
      <mo stretchy="false">÷</mo>
      <mn>6</mn>
    </mrow>
    <annotation encoding="StarMath 5.0">85 div 6</annotation>
  </semantics>
</math>
</file>

<file path=Object 16/content.xml><?xml version="1.0" encoding="utf-8"?>
<math xmlns="http://www.w3.org/1998/Math/MathML" display="block">
  <semantics>
    <mrow>
      <mn>10</mn>
      <mo stretchy="false">÷</mo>
      <mn>11</mn>
    </mrow>
    <annotation encoding="StarMath 5.0">10 div 11</annotation>
  </semantics>
</math>
</file>

<file path=Object 17/content.xml><?xml version="1.0" encoding="utf-8"?>
<math xmlns="http://www.w3.org/1998/Math/MathML" display="block">
  <semantics>
    <mrow>
      <mn>12</mn>
      <mo stretchy="false">÷</mo>
      <mn>7</mn>
    </mrow>
    <annotation encoding="StarMath 5.0">12 div 7</annotation>
  </semantics>
</math>
</file>

<file path=Object 18/content.xml><?xml version="1.0" encoding="utf-8"?>
<math xmlns="http://www.w3.org/1998/Math/MathML" display="block">
  <semantics>
    <mrow>
      <mn>51</mn>
      <mo stretchy="false">÷</mo>
      <mn>21</mn>
    </mrow>
    <annotation encoding="StarMath 5.0">51 div 21</annotation>
  </semantics>
</math>
</file>

<file path=Object 2/content.xml><?xml version="1.0" encoding="utf-8"?>
<math xmlns="http://www.w3.org/1998/Math/MathML" display="block">
  <semantics>
    <mrow>
      <mn>1</mn>
      <mrow>
        <mn>,7</mn>
        <mo stretchy="false">×</mo>
        <mn>0</mn>
      </mrow>
      <mrow>
        <mn>,09</mn>
        <mo stretchy="false">=</mo>
        <mn>..</mn>
      </mrow>
      <mi>.</mi>
    </mrow>
    <annotation encoding="StarMath 5.0">1,7 times 0,09=...</annotation>
  </semantics>
</math>
</file>

<file path=Object 3/content.xml><?xml version="1.0" encoding="utf-8"?>
<math xmlns="http://www.w3.org/1998/Math/MathML" display="block">
  <semantics>
    <mrow>
      <mn>0</mn>
      <mrow>
        <mrow>
          <mn>,41</mn>
          <mo stretchy="false">×</mo>
          <mn>5</mn>
        </mrow>
        <mo stretchy="false">=</mo>
        <mn>..</mn>
      </mrow>
      <mi>.</mi>
    </mrow>
    <annotation encoding="StarMath 5.0">0,41 times 5 = ...</annotation>
  </semantics>
</math>
</file>

<file path=Object 4/content.xml><?xml version="1.0" encoding="utf-8"?>
<math xmlns="http://www.w3.org/1998/Math/MathML" display="block">
  <semantics>
    <mrow>
      <mn>1</mn>
      <mrow>
        <mn>,3</mn>
        <mo stretchy="false">×</mo>
        <mn>7</mn>
      </mrow>
      <mrow>
        <mn>,5</mn>
        <mo stretchy="false">=</mo>
        <mn>..</mn>
      </mrow>
      <mi>.</mi>
    </mrow>
    <annotation encoding="StarMath 5.0">1,3 times 7,5 =...</annotation>
  </semantics>
</math>
</file>

<file path=Object 5/content.xml><?xml version="1.0" encoding="utf-8"?>
<math xmlns="http://www.w3.org/1998/Math/MathML" display="block">
  <semantics>
    <mrow>
      <mn>2</mn>
      <mrow>
        <mn>,05</mn>
        <mo stretchy="false">×</mo>
        <mn>4</mn>
      </mrow>
      <mn>,15</mn>
    </mrow>
    <annotation encoding="StarMath 5.0">2,05 times 4,15</annotation>
  </semantics>
</math>
</file>

<file path=Object 6/content.xml><?xml version="1.0" encoding="utf-8"?>
<math xmlns="http://www.w3.org/1998/Math/MathML" display="block">
  <semantics>
    <mrow>
      <mn>4</mn>
      <mrow>
        <mn>,78</mn>
        <mo stretchy="false">×</mo>
        <mn>8</mn>
      </mrow>
      <mn>,7</mn>
    </mrow>
    <annotation encoding="StarMath 5.0">4,78 times 8,7</annotation>
  </semantics>
</math>
</file>

<file path=Object 7/content.xml><?xml version="1.0" encoding="utf-8"?>
<math xmlns="http://www.w3.org/1998/Math/MathML" display="block">
  <semantics>
    <mrow>
      <mn>6</mn>
      <mrow>
        <mn>,2</mn>
        <mo stretchy="false">×</mo>
        <mn>5</mn>
      </mrow>
      <mn>,97</mn>
    </mrow>
    <annotation encoding="StarMath 5.0">6,2 times 5,97</annotation>
  </semantics>
</math>
</file>

<file path=Object 8/content.xml><?xml version="1.0" encoding="utf-8"?>
<math xmlns="http://www.w3.org/1998/Math/MathML" display="block">
  <semantics>
    <mrow>
      <mn>7</mn>
      <mrow>
        <mn>,65</mn>
        <mo stretchy="false">×</mo>
        <mn>1</mn>
      </mrow>
      <mn>,32</mn>
    </mrow>
    <annotation encoding="StarMath 5.0">7,65 times 1,32</annotation>
  </semantics>
</math>
</file>

<file path=Object 9/content.xml><?xml version="1.0" encoding="utf-8"?>
<math xmlns="http://www.w3.org/1998/Math/MathML" display="block">
  <semantics>
    <mrow>
      <mn>3</mn>
      <mrow>
        <mrow>
          <mn>,55</mn>
          <mo stretchy="false">÷</mo>
          <mn>13</mn>
        </mrow>
        <mo stretchy="false">≈</mo>
        <mn>...</mn>
      </mrow>
    </mrow>
    <annotation encoding="StarMath 5.0">3,55 div 13  approx ... </annotation>
  </semantics>
</math>
</file>