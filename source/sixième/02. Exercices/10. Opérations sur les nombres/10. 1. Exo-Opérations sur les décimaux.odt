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06000000C080931B50EEADF4D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8e3fc" officeooo:paragraph-rsid="0018e3fc"/>
    </style:style>
    <style:style style:name="P2" style:family="paragraph" style:parent-style-name="Table_20_Contents" style:list-style-name="L1">
      <style:text-properties style:font-name="OpenDyslexic"/>
    </style:style>
    <style:style style:name="P3" style:family="paragraph" style:parent-style-name="Standard">
      <style:text-properties style:font-name="OpenDyslexic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8e3fc" officeooo:paragraph-rsid="0018e3fc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9ee88" officeooo:paragraph-rsid="0019ee88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bc683" officeooo:paragraph-rsid="001bc683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d8db7" officeooo:paragraph-rsid="001d8db7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e8caa" officeooo:paragraph-rsid="001e8caa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fd151" officeooo:paragraph-rsid="001fd151"/>
    </style:style>
    <style:style style:name="P10" style:family="paragraph" style:parent-style-name="Standard">
      <style:text-properties style:font-name="OpenDyslexic" style:text-underline-style="none" officeooo:rsid="0019ee88" officeooo:paragraph-rsid="0019ee88"/>
    </style:style>
    <style:style style:name="P11" style:family="paragraph" style:parent-style-name="Standard">
      <style:text-properties style:font-name="OpenDyslexic" style:text-underline-style="none" officeooo:rsid="001bc683" officeooo:paragraph-rsid="001bc683"/>
    </style:style>
    <style:style style:name="P12" style:family="paragraph" style:parent-style-name="Standard">
      <style:text-properties style:font-name="OpenDyslexic" style:text-underline-style="none" officeooo:rsid="001d8db7" officeooo:paragraph-rsid="001d8db7"/>
    </style:style>
    <style:style style:name="P13" style:family="paragraph" style:parent-style-name="Standard">
      <style:text-properties style:font-name="OpenDyslexic" style:text-underline-style="none" officeooo:rsid="001e8caa" officeooo:paragraph-rsid="001e8caa"/>
    </style:style>
    <style:style style:name="P14" style:family="paragraph" style:parent-style-name="Standard">
      <style:text-properties style:font-name="OpenDyslexic" style:text-underline-style="none" officeooo:rsid="001fd151" officeooo:paragraph-rsid="001fd151"/>
    </style:style>
    <style:style style:name="T1" style:family="text">
      <style:text-properties style:text-underline-style="none"/>
    </style:style>
    <style:style style:name="T2" style:family="text">
      <style:text-properties officeooo:rsid="001d8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 Lejeune <text:s text:c="65"/>6ème</text:p>
            <text:p text:style-name="P1">Exercices <text:s text:c="18"/>Chapitre 10 : Les nombres décimaux</text:p>
          </table:table-cell>
        </table:table-row>
      </table:table>
      <text:p text:style-name="P3"/>
      <text:p text:style-name="P3"/>
      <text:p text:style-name="P4">Exercice 1 :</text:p>
      <text:p text:style-name="P10">Sans effectuer les opérations, donner un ordre de grandeur de leur résultat.</text:p>
      <text:p text:style-name="P10">a) 12,9 + 432,75+ 2,85 <text:s text:c="5"/>b) 652,3+47,93 <text:s text:c="6"/>c) 409,7+53,42+5,962</text:p>
      <text:p text:style-name="P10"/>
      <text:p text:style-name="P10">d) 8 294-507 <text:s text:c="10"/>e) 57,84-38,16 <text:s text:c="9"/>f) 4753,172+2 129,0514-695,128</text:p>
      <text:p text:style-name="P10"/>
      <text:p text:style-name="P5">Exercice 2 :</text:p>
      <text:p text:style-name="P10"><draw:frame draw:style-name="fr1" draw:name="Image1" text:anchor-type="paragraph" svg:x="12.069cm" svg:y="2.558cm" svg:width="6.932cm" svg:height="5.08cm" draw:z-index="0"><draw:image xlink:href="Pictures/1000000000000106000000C080931B50EEADF4D0.jpg" xlink:type="simple" xlink:show="embed" xlink:actuate="onLoad" loext:mime-type="image/jpeg"/></draw:frame>Merlin revient enchanté du marché magique. Il a acheté de la poudre de crapaud pour 2,07€, de la poudre de perlimpinpin pour 3,75€, de la poudre d’étoile pour 19,35€, de la poudre aux yeux pour 8,89€ et de la poudre d’escampette pour 11,09€.</text:p>
      <text:p text:style-name="P10"/>
      <text:p text:style-name="P10">Évaluer sa dépense en utilisant des ordres de grandeur.</text:p>
      <text:p text:style-name="P10"/>
      <text:p text:style-name="P10"/>
      <text:p text:style-name="P10"/>
      <text:p text:style-name="P5">Exercice 3 :</text:p>
      <text:p text:style-name="P10">Anouk fait les boutiques avec sa copine. Elle repère un jean à 68,35€ et un pull vert et rose à 22,46€. Son amie craque pour un pantalon noir à 42,40€ et un tee-shirt à 9,79€.</text:p>
      <text:p text:style-name="P10">1) Utiliser des ordres de grandeur pour évaluer rapidement la dépense envisagée par chacune.</text:p>
      <text:p text:style-name="P10">2) Elles ont emporté au total 150 € pour toutes les deux. Pourront-elles tout acheter ?</text:p>
      <text:p text:style-name="P10"/>
      <text:p text:style-name="P5">Exercice 4 :</text:p>
      <text:p text:style-name="P5"><text:span text:style-name="T1">En utilisant des ordres de grandeur, montrer que Thomas se trompe quand il écrit sur sa copie :</text:span></text:p>
      <text:p text:style-name="P5"><text:soft-page-break/><text:span text:style-name="T1">a) 385,82+52,37+98,651+0,795=5 376,636</text:span></text:p>
      <text:p text:style-name="P5"><text:span text:style-name="T1"/></text:p>
      <text:p text:style-name="P5"><text:span text:style-name="T1">b) 6 953,6201 – 401,2587= 2941,3614</text:span></text:p>
      <text:p text:style-name="P5"><text:span text:style-name="T1"/></text:p>
      <text:p text:style-name="P5">Exercice 5 :</text:p>
      <text:p text:style-name="P11">Constantin a utilisé correctement sa calculatrice, mais a oublié la virgule en recopiant le résultat.</text:p>
      <text:p text:style-name="P11">Il a écrit : 3,182 + 3,1 + 0,92 + 0,965= 8 167.</text:p>
      <text:p text:style-name="P11">Recopier ce calcul et placer correctement la virgule en utilisant des ordres de grandeur.</text:p>
      <text:p text:style-name="P11"/>
      <text:p text:style-name="P6">Exercice 6 :</text:p>
      <text:p text:style-name="P11">Pour chaque calcul, poser et effectuer l’opération.</text:p>
      <text:p text:style-name="P11">a) 568+ 1 021 ; <text:s text:c="4"/>b) 4,42 + 23,4 ; <text:s text:c="5"/>c) 4,21+ 42,1+ 421 ; <text:s/></text:p>
      <text:p text:style-name="P11">d) 54,3+31,45+1,05 ;</text:p>
      <text:p text:style-name="P11"/>
      <text:p text:style-name="P6">Exercice 7 :</text:p>
      <text:p text:style-name="P11">Calculer chacune des sommes suivantes en posant l’opération :</text:p>
      <text:p text:style-name="P11">a) 9,42+ 308,7 ; <text:s text:c="8"/>b) 7,53+56,4+ 38,95 ; <text:s text:c="4"/>c) 72,6+39,45+1,8 ;</text:p>
      <text:p text:style-name="P11"/>
      <text:p text:style-name="P6">Exercice 8 :</text:p>
      <text:p text:style-name="P11">Pour chaque calcul, poser et effectuer l’opération.</text:p>
      <text:p text:style-name="P11">a) 26,37-4,25 ; <text:s text:c="2"/><text:span text:style-name="T2">b) 84,52-23,45 ; <text:s text:c="3"/>c) 82,36-47,28 ; <text:s text:c="3"/>d) 51,723-14,39</text:span></text:p>
      <text:p text:style-name="P11"/>
      <text:p text:style-name="P7">Exercice 9 :</text:p>
      <text:p text:style-name="P12">Recopie chaque problème en supprimant les données inutiles pour le résoudre.</text:p>
      <text:p text:style-name="P12"/>
      <text:p text:style-name="P12">a. Victor part se promener en vélo à 14h00. Il roule pendant 5,2 km et s’arrête 30 minutes pour réparer sa roue. Il roule encore 3,5 km et arrive chez son ami à 15h10 min. Combien de kilomètres a-t-il parcourus ?</text:p>
      <text:p text:style-name="P12"/>
      <text:p text:style-name="P12"/>
      <text:p text:style-name="P12"/>
      <text:p text:style-name="P12"><text:soft-page-break/>b. Vincent habite à 200m de la boulangerie. Il achète une baguette à 0,85€ et trois gâteaux à 2,25€ pièce. Il a 13,84€ dans son porte-monnaie. Combien paie-t-il ?</text:p>
      <text:p text:style-name="P12"/>
      <text:p text:style-name="P7">Exercice 10 :</text:p>
      <text:p text:style-name="P13">Jules va faire des courses au supermarché. Voici les calculs effectués par la caissière.</text:p>
      <table:table table:name="Tableau2" table:style-name="Tableau2">
        <table:table-column table:style-name="Tableau2.A"/>
        <table:table-row>
          <table:table-cell table:style-name="Tableau2.A1" office:value-type="string">
            <text:list xml:id="list3991861285" text:style-name="L1">
              <text:list-item>
                <text:p text:style-name="P2"><draw:frame draw:style-name="fr2" draw:name="Objet1" text:anchor-type="as-char" svg:y="-0.527cm" svg:width="3.104cm" svg:height="0.739cm" draw:z-index="1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  <text:list-item>
                <text:p text:style-name="P2"><draw:frame draw:style-name="fr2" draw:name="Objet2" text:anchor-type="as-char" svg:y="-0.527cm" svg:width="3.163cm" svg:height="0.739cm" draw:z-index="2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  <text:list-item>
                <text:p text:style-name="P2"><draw:frame draw:style-name="fr2" draw:name="Objet3" text:anchor-type="as-char" svg:y="-0.527cm" svg:width="3.57cm" svg:height="0.739cm" draw:z-index="3"><draw:object xlink:href="./Object 3" xlink:type="simple" xlink:show="embed" xlink:actuate="onLoad"/><draw:image xlink:href="./ObjectReplacements/Object 3" xlink:type="simple" xlink:show="embed" xlink:actuate="onLoad"/></draw:frame></text:p>
              </text:list-item>
              <text:list-item>
                <text:p text:style-name="P2"><draw:frame draw:style-name="fr2" draw:name="Objet4" text:anchor-type="as-char" svg:y="-0.527cm" svg:width="6.548cm" svg:height="0.739cm" draw:z-index="4"><draw:object xlink:href="./Object 4" xlink:type="simple" xlink:show="embed" xlink:actuate="onLoad"/><draw:image xlink:href="./ObjectReplacements/Object 4" xlink:type="simple" xlink:show="embed" xlink:actuate="onLoad"/></draw:frame></text:p>
              </text:list-item>
              <text:list-item>
                <text:p text:style-name="P2"><draw:frame draw:style-name="fr2" draw:name="Objet5" text:anchor-type="as-char" svg:y="-0.527cm" svg:width="3.667cm" svg:height="0.739cm" draw:z-index="5"><draw:object xlink:href="./Object 5" xlink:type="simple" xlink:show="embed" xlink:actuate="onLoad"/><draw:image xlink:href="./ObjectReplacements/Object 5" xlink:type="simple" xlink:show="embed" xlink:actuate="onLoad"/></draw:frame></text:p>
              </text:list-item>
            </text:list>
          </table:table-cell>
        </table:table-row>
      </table:table>
      <text:p text:style-name="P13">Recopie puis complète le texte.</text:p>
      <text:p text:style-name="P13"/>
      <text:p text:style-name="P13">Il achète deux paquets de madeleines à ……… l’un, 1,650 kg de pommes à …….. le kg, ……. packs de six bouteilles de jus de fruits à 2,65€ le pack et une tablette de chocolat à …….. Il paye avec un billet de …… On lui rend …. centimes.</text:p>
      <text:p text:style-name="P13"/>
      <text:p text:style-name="P8">Exercice 11 :</text:p>
      <text:p text:style-name="P13">a) <draw:frame draw:style-name="fr2" draw:name="Objet6" text:anchor-type="as-char" svg:y="-0.527cm" svg:width="2.314cm" svg:height="0.739cm" draw:z-index="6"><draw:object xlink:href="./Object 6" xlink:type="simple" xlink:show="embed" xlink:actuate="onLoad"/><draw:image xlink:href="./ObjectReplacements/Object 6" xlink:type="simple" xlink:show="embed" xlink:actuate="onLoad"/></draw:frame><text:s text:c="3"/>b) <draw:frame draw:style-name="fr2" draw:name="Objet7" text:anchor-type="as-char" svg:y="-0.527cm" svg:width="2.775cm" svg:height="0.739cm" draw:z-index="7"><draw:object xlink:href="./Object 7" xlink:type="simple" xlink:show="embed" xlink:actuate="onLoad"/><draw:image xlink:href="./ObjectReplacements/Object 7" xlink:type="simple" xlink:show="embed" xlink:actuate="onLoad"/></draw:frame><text:s text:c="3"/>c) <draw:frame draw:style-name="fr2" draw:name="Objet8" text:anchor-type="as-char" svg:y="-0.527cm" svg:width="2.865cm" svg:height="0.739cm" draw:z-index="8"><draw:object xlink:href="./Object 8" xlink:type="simple" xlink:show="embed" xlink:actuate="onLoad"/><draw:image xlink:href="./ObjectReplacements/Object 8" xlink:type="simple" xlink:show="embed" xlink:actuate="onLoad"/></draw:frame><text:s text:c="2"/>d) <draw:frame draw:style-name="fr2" draw:name="Objet9" text:anchor-type="as-char" svg:y="-0.527cm" svg:width="2.055cm" svg:height="0.739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3">e) <draw:frame draw:style-name="fr2" draw:name="Objet10" text:anchor-type="as-char" svg:y="-0.527cm" svg:width="2.33cm" svg:height="0.739cm" draw:z-index="10"><draw:object xlink:href="./Object 10" xlink:type="simple" xlink:show="embed" xlink:actuate="onLoad"/><draw:image xlink:href="./ObjectReplacements/Object 10" xlink:type="simple" xlink:show="embed" xlink:actuate="onLoad"/></draw:frame><text:s text:c="3"/>f) <draw:frame draw:style-name="fr2" draw:name="Objet11" text:anchor-type="as-char" svg:y="-0.527cm" svg:width="2.604cm" svg:height="0.739cm" draw:z-index="11"><draw:object xlink:href="./Object 11" xlink:type="simple" xlink:show="embed" xlink:actuate="onLoad"/><draw:image xlink:href="./ObjectReplacements/Object 11" xlink:type="simple" xlink:show="embed" xlink:actuate="onLoad"/></draw:frame><text:s text:c="5"/>g) <draw:frame draw:style-name="fr2" draw:name="Objet12" text:anchor-type="as-char" svg:y="-0.527cm" svg:width="2.798cm" svg:height="0.739cm" draw:z-index="12"><draw:object xlink:href="./Object 12" xlink:type="simple" xlink:show="embed" xlink:actuate="onLoad"/><draw:image xlink:href="./ObjectReplacements/Object 12" xlink:type="simple" xlink:show="embed" xlink:actuate="onLoad"/></draw:frame><text:s text:c="3"/>h)<draw:frame draw:style-name="fr2" draw:name="Objet13" text:anchor-type="as-char" svg:y="-0.527cm" svg:width="3.071cm" svg:height="0.739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>i) <draw:frame draw:style-name="fr2" draw:name="Objet14" text:anchor-type="as-char" svg:y="-0.527cm" svg:width="3.344cm" svg:height="0.739cm" draw:z-index="14"><draw:object xlink:href="./Object 14" xlink:type="simple" xlink:show="embed" xlink:actuate="onLoad"/><draw:image xlink:href="./ObjectReplacements/Object 14" xlink:type="simple" xlink:show="embed" xlink:actuate="onLoad"/></draw:frame><text:s text:c="2"/>j) <draw:frame draw:style-name="fr2" draw:name="Objet15" text:anchor-type="as-char" svg:y="-0.527cm" svg:width="2.187cm" svg:height="0.739cm" draw:z-index="15"><draw:object xlink:href="./Object 15" xlink:type="simple" xlink:show="embed" xlink:actuate="onLoad"/><draw:image xlink:href="./ObjectReplacements/Object 15" xlink:type="simple" xlink:show="embed" xlink:actuate="onLoad"/></draw:frame><text:s text:c="3"/>k) <draw:frame draw:style-name="fr2" draw:name="Objet16" text:anchor-type="as-char" svg:y="-0.527cm" svg:width="2.462cm" svg:height="0.739cm" draw:z-index="16"><draw:object xlink:href="./Object 16" xlink:type="simple" xlink:show="embed" xlink:actuate="onLoad"/><draw:image xlink:href="./ObjectReplacements/Object 16" xlink:type="simple" xlink:show="embed" xlink:actuate="onLoad"/></draw:frame><text:s text:c="3"/>l) <draw:frame draw:style-name="fr2" draw:name="Objet17" text:anchor-type="as-char" svg:y="-0.527cm" svg:width="2.736cm" svg:height="0.739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m) <draw:frame draw:style-name="fr2" draw:name="Objet18" text:anchor-type="as-char" svg:y="-0.527cm" svg:width="3.321cm" svg:height="0.739cm" draw:z-index="18"><draw:object xlink:href="./Object 18" xlink:type="simple" xlink:show="embed" xlink:actuate="onLoad"/><draw:image xlink:href="./ObjectReplacements/Object 18" xlink:type="simple" xlink:show="embed" xlink:actuate="onLoad"/></draw:frame><text:s text:c="2"/>n) <draw:frame draw:style-name="fr2" draw:name="Objet19" text:anchor-type="as-char" svg:y="-0.527cm" svg:width="3.597cm" svg:height="0.739cm" draw:z-index="19"><draw:object xlink:href="./Object 19" xlink:type="simple" xlink:show="embed" xlink:actuate="onLoad"/><draw:image xlink:href="./ObjectReplacements/Object 19" xlink:type="simple" xlink:show="embed" xlink:actuate="onLoad"/></draw:frame><text:s/>o) <draw:frame draw:style-name="fr2" draw:name="Objet20" text:anchor-type="as-char" svg:y="-0.527cm" svg:width="3.147cm" svg:height="0.739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/>
      <text:p text:style-name="P9">Exercice 12 :</text:p>
      <text:p text:style-name="P14">Recopier et compléter les égalités suivantes :</text:p>
      <text:p text:style-name="P14">a) <draw:frame draw:style-name="fr2" draw:name="Objet21" text:anchor-type="as-char" svg:y="-0.527cm" svg:width="3.235cm" svg:height="0.739cm" draw:z-index="21"><draw:object xlink:href="./Object 21" xlink:type="simple" xlink:show="embed" xlink:actuate="onLoad"/><draw:image xlink:href="./ObjectReplacements/Object 21" xlink:type="simple" xlink:show="embed" xlink:actuate="onLoad"/></draw:frame><text:s text:c="4"/>b) <draw:frame draw:style-name="fr2" draw:name="Objet22" text:anchor-type="as-char" svg:y="-0.527cm" svg:width="3.2cm" svg:height="0.739cm" draw:z-index="22"><draw:object xlink:href="./Object 22" xlink:type="simple" xlink:show="embed" xlink:actuate="onLoad"/><draw:image xlink:href="./ObjectReplacements/Object 22" xlink:type="simple" xlink:show="embed" xlink:actuate="onLoad"/></draw:frame><text:s text:c="4"/>c) <draw:frame draw:style-name="fr2" draw:name="Objet23" text:anchor-type="as-char" svg:y="-0.527cm" svg:width="2.753cm" svg:height="0.739cm" draw:z-index="23"><draw:object xlink:href="./Object 23" xlink:type="simple" xlink:show="embed" xlink:actuate="onLoad"/><draw:image xlink:href="./ObjectReplacements/Object 23" xlink:type="simple" xlink:show="embed" xlink:actuate="onLoad"/></draw:frame><text:s text:c="2"/></text:p>
      <text:p text:style-name="P14">d)<draw:frame draw:style-name="fr2" draw:name="Objet24" text:anchor-type="as-char" svg:y="-0.527cm" svg:width="3.244cm" svg:height="0.739cm" draw:z-index="24"><draw:object xlink:href="./Object 24" xlink:type="simple" xlink:show="embed" xlink:actuate="onLoad"/><draw:image xlink:href="./ObjectReplacements/Object 24" xlink:type="simple" xlink:show="embed" xlink:actuate="onLoad"/></draw:frame> <text:s text:c="3"/>e) <draw:frame draw:style-name="fr2" draw:name="Objet25" text:anchor-type="as-char" svg:y="-0.527cm" svg:width="3.316cm" svg:height="0.739cm" draw:z-index="25"><draw:object xlink:href="./Object 25" xlink:type="simple" xlink:show="embed" xlink:actuate="onLoad"/><draw:image xlink:href="./ObjectReplacements/Object 25" xlink:type="simple" xlink:show="embed" xlink:actuate="onLoad"/></draw:frame><text:s text:c="3"/>f) <draw:frame draw:style-name="fr2" draw:name="Objet26" text:anchor-type="as-char" svg:y="-0.527cm" svg:width="3.406cm" svg:height="0.739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14">g) <draw:frame draw:style-name="fr2" draw:name="Objet27" text:anchor-type="as-char" svg:y="-0.527cm" svg:width="3.702cm" svg:height="0.739cm" draw:z-index="27"><draw:object xlink:href="./Object 27" xlink:type="simple" xlink:show="embed" xlink:actuate="onLoad"/><draw:image xlink:href="./ObjectReplacements/Object 27" xlink:type="simple" xlink:show="embed" xlink:actuate="onLoad"/></draw:frame><text:s text:c="3"/>h) <draw:frame draw:style-name="fr2" draw:name="Objet28" text:anchor-type="as-char" svg:y="-0.527cm" svg:width="3.311cm" svg:height="0.739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09:04:54.016000000</meta:creation-date>
    <dc:date>2021-04-01T10:04:37.807000000</dc:date>
    <meta:editing-duration>PT4M51S</meta:editing-duration>
    <meta:editing-cycles>1</meta:editing-cycles>
    <meta:document-statistic meta:table-count="2" meta:image-count="1" meta:object-count="28" meta:page-count="3" meta:paragraph-count="54" meta:word-count="508" meta:character-count="2932" meta:non-whitespace-character-count="2278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row>
        <mn>3</mn>
        <mo stretchy="false">×</mo>
        <mn>2</mn>
      </mrow>
      <mrow>
        <mn>,65</mn>
        <mo stretchy="false">=</mo>
        <mn>7</mn>
      </mrow>
      <mn>,95</mn>
    </mrow>
    <annotation encoding="StarMath 5.0">3 times 2,65 = 7,95</annotation>
  </semantics>
</math>
</file>

<file path=Object 10/content.xml><?xml version="1.0" encoding="utf-8"?>
<math xmlns="http://www.w3.org/1998/Math/MathML" display="block">
  <semantics>
    <mrow>
      <mn>2</mn>
      <mrow>
        <mn>,34</mn>
        <mo stretchy="false">×</mo>
        <mn>100</mn>
      </mrow>
    </mrow>
    <annotation encoding="StarMath 5.0">2,34 times 100</annotation>
  </semantics>
</math>
</file>

<file path=Object 11/content.xml><?xml version="1.0" encoding="utf-8"?>
<math xmlns="http://www.w3.org/1998/Math/MathML" display="block">
  <semantics>
    <mrow>
      <mn>2</mn>
      <mrow>
        <mn>,34</mn>
        <mo stretchy="false">×</mo>
        <mn>1000</mn>
      </mrow>
    </mrow>
    <annotation encoding="StarMath 5.0">2,34 times 1000</annotation>
  </semantics>
</math>
</file>

<file path=Object 12/content.xml><?xml version="1.0" encoding="utf-8"?>
<math xmlns="http://www.w3.org/1998/Math/MathML" display="block">
  <semantics>
    <mrow>
      <mn>4</mn>
      <mn>563</mn>
      <mrow>
        <mn>,1</mn>
        <mo stretchy="false">×</mo>
        <mn>0</mn>
      </mrow>
      <mn>,1</mn>
    </mrow>
    <annotation encoding="StarMath 5.0">4 563,1 times 0,1</annotation>
  </semantics>
</math>
</file>

<file path=Object 13/content.xml><?xml version="1.0" encoding="utf-8"?>
<math xmlns="http://www.w3.org/1998/Math/MathML" display="block">
  <semantics>
    <mrow>
      <mn>4</mn>
      <mn>563</mn>
      <mrow>
        <mn>,1</mn>
        <mo stretchy="false">×</mo>
        <mn>0</mn>
      </mrow>
      <mn>,01</mn>
    </mrow>
    <annotation encoding="StarMath 5.0">4 563,1 times 0,01</annotation>
  </semantics>
</math>
</file>

<file path=Object 14/content.xml><?xml version="1.0" encoding="utf-8"?>
<math xmlns="http://www.w3.org/1998/Math/MathML" display="block">
  <semantics>
    <mrow>
      <mn>4</mn>
      <mn>563</mn>
      <mrow>
        <mn>,1</mn>
        <mo stretchy="false">×</mo>
        <mn>0</mn>
      </mrow>
      <mn>,001</mn>
    </mrow>
    <annotation encoding="StarMath 5.0">4 563,1 times 0,001</annotation>
  </semantics>
</math>
</file>

<file path=Object 15/content.xml><?xml version="1.0" encoding="utf-8"?>
<math xmlns="http://www.w3.org/1998/Math/MathML" display="block">
  <semantics>
    <mrow>
      <mn>75</mn>
      <mrow>
        <mn>,1</mn>
        <mo stretchy="false">×</mo>
        <mn>0</mn>
      </mrow>
      <mn>,1</mn>
    </mrow>
    <annotation encoding="StarMath 5.0">75,1 times 0,1</annotation>
  </semantics>
</math>
</file>

<file path=Object 16/content.xml><?xml version="1.0" encoding="utf-8"?>
<math xmlns="http://www.w3.org/1998/Math/MathML" display="block">
  <semantics>
    <mrow>
      <mn>75</mn>
      <mrow>
        <mn>,1</mn>
        <mo stretchy="false">×</mo>
        <mn>0</mn>
      </mrow>
      <mn>,01</mn>
    </mrow>
    <annotation encoding="StarMath 5.0">75,1 times 0,01</annotation>
  </semantics>
</math>
</file>

<file path=Object 17/content.xml><?xml version="1.0" encoding="utf-8"?>
<math xmlns="http://www.w3.org/1998/Math/MathML" display="block">
  <semantics>
    <mrow>
      <mn>75</mn>
      <mrow>
        <mn>,1</mn>
        <mo stretchy="false">×</mo>
        <mn>0</mn>
      </mrow>
      <mn>,001</mn>
    </mrow>
    <annotation encoding="StarMath 5.0">75,1 times 0,001</annotation>
  </semantics>
</math>
</file>

<file path=Object 18/content.xml><?xml version="1.0" encoding="utf-8"?>
<math xmlns="http://www.w3.org/1998/Math/MathML" display="block">
  <semantics>
    <mrow>
      <mn>146</mn>
      <mrow>
        <mn>,704</mn>
        <mo stretchy="false">×</mo>
        <mn>0</mn>
      </mrow>
      <mn>,01</mn>
    </mrow>
    <annotation encoding="StarMath 5.0">146,704 times 0,01</annotation>
  </semantics>
</math>
</file>

<file path=Object 19/content.xml><?xml version="1.0" encoding="utf-8"?>
<math xmlns="http://www.w3.org/1998/Math/MathML" display="block">
  <semantics>
    <mrow>
      <mn>146</mn>
      <mrow>
        <mn>,704</mn>
        <mo stretchy="false">×</mo>
        <mn>0</mn>
      </mrow>
      <mn>,001</mn>
    </mrow>
    <annotation encoding="StarMath 5.0">146,704 times 0,001</annotation>
  </semantics>
</math>
</file>

<file path=Object 2/content.xml><?xml version="1.0" encoding="utf-8"?>
<math xmlns="http://www.w3.org/1998/Math/MathML" display="block">
  <semantics>
    <mrow>
      <mrow>
        <mn>2</mn>
        <mo stretchy="false">×</mo>
        <mn>3</mn>
      </mrow>
      <mrow>
        <mn>,42</mn>
        <mo stretchy="false">=</mo>
        <mn>6</mn>
      </mrow>
      <mn>,84</mn>
    </mrow>
    <annotation encoding="StarMath 5.0">2 times 3,42 = 6,84</annotation>
  </semantics>
</math>
</file>

<file path=Object 20/content.xml><?xml version="1.0" encoding="utf-8"?>
<math xmlns="http://www.w3.org/1998/Math/MathML" display="block">
  <semantics>
    <mrow>
      <mn>146</mn>
      <mrow>
        <mn>,704</mn>
        <mo stretchy="false">×</mo>
        <mn>100</mn>
      </mrow>
    </mrow>
    <annotation encoding="StarMath 5.0">146,704 times 100</annotation>
  </semantics>
</math>
</file>

<file path=Object 21/content.xml><?xml version="1.0" encoding="utf-8"?>
<math xmlns="http://www.w3.org/1998/Math/MathML" display="block">
  <semantics>
    <mrow>
      <mn>7</mn>
      <mrow>
        <mrow>
          <mn>,54</mn>
          <mo stretchy="false">×</mo>
          <mn>...</mn>
        </mrow>
        <mo stretchy="false">=</mo>
        <mn>75</mn>
      </mrow>
      <mn>,4</mn>
    </mrow>
    <annotation encoding="StarMath 5.0">7,54 times ...=75,4</annotation>
  </semantics>
</math>
</file>

<file path=Object 22/content.xml><?xml version="1.0" encoding="utf-8"?>
<math xmlns="http://www.w3.org/1998/Math/MathML" display="block">
  <semantics>
    <mrow>
      <mn>18</mn>
      <mrow>
        <mrow>
          <mn>,5</mn>
          <mo stretchy="false">×</mo>
          <mn>...</mn>
        </mrow>
        <mo stretchy="false">=</mo>
        <mn>1</mn>
      </mrow>
      <mn>,85</mn>
    </mrow>
    <annotation encoding="StarMath 5.0">18,5 times ...=1,85</annotation>
  </semantics>
</math>
</file>

<file path=Object 23/content.xml><?xml version="1.0" encoding="utf-8"?>
<math xmlns="http://www.w3.org/1998/Math/MathML" display="block">
  <semantics>
    <mrow>
      <mn>0</mn>
      <mrow>
        <mrow>
          <mn>,72</mn>
          <mo stretchy="false">×</mo>
          <mn>...</mn>
        </mrow>
        <mo stretchy="false">=</mo>
        <mn>72</mn>
      </mrow>
    </mrow>
    <annotation encoding="StarMath 5.0">0,72 times ...=72</annotation>
  </semantics>
</math>
</file>

<file path=Object 24/content.xml><?xml version="1.0" encoding="utf-8"?>
<math xmlns="http://www.w3.org/1998/Math/MathML" display="block">
  <semantics>
    <mrow>
      <mrow>
        <mn>...</mn>
        <mo stretchy="false">×</mo>
        <mn>12</mn>
      </mrow>
      <mrow>
        <mn>,7</mn>
        <mo stretchy="false">=</mo>
        <mn>1270</mn>
      </mrow>
    </mrow>
    <annotation encoding="StarMath 5.0">... times 12,7= 1270</annotation>
  </semantics>
</math>
</file>

<file path=Object 25/content.xml><?xml version="1.0" encoding="utf-8"?>
<math xmlns="http://www.w3.org/1998/Math/MathML" display="block">
  <semantics>
    <mrow>
      <mrow>
        <mrow>
          <mn>703</mn>
          <mo stretchy="false">×</mo>
          <mn>...</mn>
        </mrow>
        <mo stretchy="false">=</mo>
        <mn>0</mn>
      </mrow>
      <mn>,703</mn>
    </mrow>
    <annotation encoding="StarMath 5.0">703 times ...=0,703</annotation>
  </semantics>
</math>
</file>

<file path=Object 26/content.xml><?xml version="1.0" encoding="utf-8"?>
<math xmlns="http://www.w3.org/1998/Math/MathML" display="block">
  <semantics>
    <mrow>
      <mrow>
        <mrow>
          <mn>984</mn>
          <mo stretchy="false">×</mo>
          <mn>...</mn>
        </mrow>
        <mo stretchy="false">=</mo>
        <mn>0</mn>
      </mrow>
      <mn>,984</mn>
    </mrow>
    <annotation encoding="StarMath 5.0">984 times ...=0,984</annotation>
  </semantics>
</math>
</file>

<file path=Object 27/content.xml><?xml version="1.0" encoding="utf-8"?>
<math xmlns="http://www.w3.org/1998/Math/MathML" display="block">
  <semantics>
    <mrow>
      <mn>1</mn>
      <mrow>
        <mrow>
          <mn>,052</mn>
          <mo stretchy="false">×</mo>
          <mn>...</mn>
        </mrow>
        <mo stretchy="false">=</mo>
        <mn>105</mn>
      </mrow>
      <mn>,2</mn>
    </mrow>
    <annotation encoding="StarMath 5.0">1,052 times ...=105,2</annotation>
  </semantics>
</math>
</file>

<file path=Object 28/content.xml><?xml version="1.0" encoding="utf-8"?>
<math xmlns="http://www.w3.org/1998/Math/MathML" display="block">
  <semantics>
    <mrow>
      <mn>0</mn>
      <mrow>
        <mn>,84</mn>
        <mo stretchy="false">=</mo>
        <mrow>
          <mn>...</mn>
          <mo stretchy="false">×</mo>
          <mn>0</mn>
        </mrow>
      </mrow>
      <mn>,84</mn>
    </mrow>
    <annotation encoding="StarMath 5.0">0,84 = ... times 0,84</annotation>
  </semantics>
</math>
</file>

<file path=Object 3/content.xml><?xml version="1.0" encoding="utf-8"?>
<math xmlns="http://www.w3.org/1998/Math/MathML" display="block">
  <semantics>
    <mrow>
      <mn>1</mn>
      <mrow>
        <mn>,65</mn>
        <mo stretchy="false">×</mo>
        <mn>2</mn>
      </mrow>
      <mrow>
        <mn>,4</mn>
        <mo stretchy="false">=</mo>
        <mn>3</mn>
      </mrow>
      <mn>,96</mn>
    </mrow>
    <annotation encoding="StarMath 5.0">1,65 times 2,4 = 3,96</annotation>
  </semantics>
</math>
</file>

<file path=Object 4/content.xml><?xml version="1.0" encoding="utf-8"?>
<math xmlns="http://www.w3.org/1998/Math/MathML" display="block">
  <semantics>
    <mrow>
      <mn>6</mn>
      <mrow>
        <mn>,84</mn>
        <mo stretchy="false">+</mo>
        <mn>3</mn>
      </mrow>
      <mrow>
        <mn>,96</mn>
        <mo stretchy="false">+</mo>
        <mn>1</mn>
      </mrow>
      <mrow>
        <mn>,17</mn>
        <mo stretchy="false">+</mo>
        <mn>7</mn>
      </mrow>
      <mrow>
        <mn>,95</mn>
        <mo stretchy="false">=</mo>
        <mn>19</mn>
      </mrow>
      <mn>,92</mn>
    </mrow>
    <annotation encoding="StarMath 5.0">6,84+3,96+1,17+7,95=19,92</annotation>
  </semantics>
</math>
</file>

<file path=Object 5/content.xml><?xml version="1.0" encoding="utf-8"?>
<math xmlns="http://www.w3.org/1998/Math/MathML" display="block">
  <semantics>
    <mrow>
      <mrow>
        <mn>20</mn>
        <mo stretchy="false">−</mo>
        <mn>19</mn>
      </mrow>
      <mrow>
        <mn>,92</mn>
        <mo stretchy="false">=</mo>
        <mn>0</mn>
      </mrow>
      <mn>,08</mn>
    </mrow>
    <annotation encoding="StarMath 5.0">20-19,92=0,08</annotation>
  </semantics>
</math>
</file>

<file path=Object 6/content.xml><?xml version="1.0" encoding="utf-8"?>
<math xmlns="http://www.w3.org/1998/Math/MathML" display="block">
  <semantics>
    <mrow>
      <mn>3</mn>
      <mrow>
        <mn>,245</mn>
        <mo stretchy="false">×</mo>
        <mn>10</mn>
      </mrow>
    </mrow>
    <annotation encoding="StarMath 5.0">3,245 times 10</annotation>
  </semantics>
</math>
</file>

<file path=Object 7/content.xml><?xml version="1.0" encoding="utf-8"?>
<math xmlns="http://www.w3.org/1998/Math/MathML" display="block">
  <semantics>
    <mrow>
      <mn>3</mn>
      <mrow>
        <mn>,245</mn>
        <mo stretchy="false">×</mo>
        <mn>100</mn>
      </mrow>
      <mi>;</mi>
    </mrow>
    <annotation encoding="StarMath 5.0">3,245 times 100;</annotation>
  </semantics>
</math>
</file>

<file path=Object 8/content.xml><?xml version="1.0" encoding="utf-8"?>
<math xmlns="http://www.w3.org/1998/Math/MathML" display="block">
  <semantics>
    <mrow>
      <mn>3</mn>
      <mrow>
        <mn>,245</mn>
        <mo stretchy="false">×</mo>
        <mn>1000</mn>
      </mrow>
    </mrow>
    <annotation encoding="StarMath 5.0">3,245 times 1000</annotation>
  </semantics>
</math>
</file>

<file path=Object 9/content.xml><?xml version="1.0" encoding="utf-8"?>
<math xmlns="http://www.w3.org/1998/Math/MathML" display="block">
  <semantics>
    <mrow>
      <mn>2</mn>
      <mrow>
        <mn>,34</mn>
        <mo stretchy="false">×</mo>
        <mn>10</mn>
      </mrow>
    </mrow>
    <annotation encoding="StarMath 5.0">2,34 times 10</annotation>
  </semantics>
</math>
</file>