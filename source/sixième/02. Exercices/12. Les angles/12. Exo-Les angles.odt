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25000001D900F6AAAA7FCA0FC3.png" manifest:media-type="image/png"/>
  <manifest:file-entry manifest:full-path="Pictures/10000201000004A50000018A8220A5A5188754CC.png" manifest:media-type="image/png"/>
  <manifest:file-entry manifest:full-path="Pictures/1000020100000169000000C8032F0E374DF0A1A5.png" manifest:media-type="image/png"/>
  <manifest:file-entry manifest:full-path="Pictures/100002010000047E00000112726712376DEC20C5.png" manifest:media-type="image/png"/>
  <manifest:file-entry manifest:full-path="Pictures/100002010000031A0000013715E19031291CA9D0.png" manifest:media-type="image/png"/>
  <manifest:file-entry manifest:full-path="Pictures/10000201000004E100000335D8C63B62CAB46E2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Dyslexic"/>
    </style:style>
    <style:style style:name="P2" style:family="paragraph" style:parent-style-name="Table_20_Contents">
      <style:text-properties style:font-name="OpenDyslexic" officeooo:rsid="000314f3" officeooo:paragraph-rsid="000314f3"/>
    </style:style>
    <style:style style:name="P3" style:family="paragraph" style:parent-style-name="Table_20_Contents">
      <style:paragraph-properties fo:text-align="center" style:justify-single-word="false"/>
      <style:text-properties style:font-name="OpenDyslexic" officeooo:rsid="00032432" officeooo:paragraph-rsid="00032432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314f3" officeooo:paragraph-rsid="000314f3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32432" officeooo:paragraph-rsid="00032432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35728" officeooo:paragraph-rsid="00035728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3e0a6" officeooo:paragraph-rsid="0003e0a6"/>
    </style:style>
    <style:style style:name="P8" style:family="paragraph" style:parent-style-name="Standard">
      <style:text-properties style:font-name="OpenDyslexic" style:text-underline-style="none" officeooo:rsid="000314f3" officeooo:paragraph-rsid="000314f3"/>
    </style:style>
    <style:style style:name="P9" style:family="paragraph" style:parent-style-name="Standard">
      <style:text-properties style:font-name="OpenDyslexic" style:text-underline-style="none" officeooo:rsid="00032432" officeooo:paragraph-rsid="00032432"/>
    </style:style>
    <style:style style:name="P10" style:family="paragraph" style:parent-style-name="Standard">
      <style:text-properties style:font-name="OpenDyslexic" style:text-underline-style="none" officeooo:rsid="00035728" officeooo:paragraph-rsid="00035728"/>
    </style:style>
    <style:style style:name="P11" style:family="paragraph" style:parent-style-name="Standard">
      <style:text-properties style:font-name="OpenDyslexic" style:text-underline-style="none" officeooo:rsid="0003e0a6" officeooo:paragraph-rsid="0003e0a6"/>
    </style:style>
    <style:style style:name="T1" style:family="text">
      <style:text-properties officeooo:rsid="000357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Collège A.Lejeune <text:s text:c="66"/>6ème</text:p>
            <text:p text:style-name="P2">Exercices <text:s text:c="32"/>Les angles</text:p>
          </table:table-cell>
        </table:table-row>
      </table:table>
      <text:p text:style-name="Standard"/>
      <text:p text:style-name="P4">Exercice 1 :</text:p>
      <text:p text:style-name="P8"><draw:frame draw:style-name="fr1" draw:name="Image1" text:anchor-type="paragraph" svg:x="-0.206cm" svg:y="0.94cm" svg:width="17cm" svg:height="9.989cm" draw:z-index="0"><draw:image xlink:href="Pictures/1000020100000325000001D900F6AAAA7FCA0FC3.png" xlink:type="simple" xlink:show="embed" xlink:actuate="onLoad" loext:mime-type="image/png"/></draw:frame>Utilise les figures pour compléter les figures suivantes</text:p>
      <text:p text:style-name="P8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3">Angle</text:p>
          </table:table-cell>
          <table:table-cell table:style-name="Tableau2.A1" office:value-type="string">
            <text:p text:style-name="P3">Nom</text:p>
          </table:table-cell>
          <table:table-cell table:style-name="Tableau2.A1" office:value-type="string">
            <text:p text:style-name="P3">Sommet</text:p>
          </table:table-cell>
          <table:table-cell table:style-name="Tableau2.D1" office:value-type="string">
            <text:p text:style-name="P3">Cotées</text:p>
          </table:table-cell>
        </table:table-row>
        <table:table-row>
          <table:table-cell table:style-name="Tableau2.A2" office:value-type="string">
            <text:p text:style-name="P3">1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2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3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4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5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6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ercice 2 :</text:p>
      <text:p text:style-name="P9"><draw:frame draw:style-name="fr2" draw:name="Image2" text:anchor-type="paragraph" svg:width="9.551cm" svg:height="5.292cm" draw:z-index="1"><draw:image xlink:href="Pictures/1000020100000169000000C8032F0E374DF0A1A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omme les angles tracés :</text:p>
      <text:p text:style-name="P9">a) de sommet E :</text:p>
      <text:p text:style-name="P9">…………………………………………………………………………..</text:p>
      <text:p text:style-name="P9">b) dont un côté est [LE) :</text:p>
      <text:p text:style-name="P9">…………………………………………………………………………..</text:p>
      <text:p text:style-name="P9">c) <text:span text:style-name="T1">dont les côtés sont [IE) et [IP) :</text:span></text:p>
      <text:p text:style-name="P9">……………………………………………………………………………</text:p>
      <text:p text:style-name="P10">d) qui ont un côté commun avec l’angle <draw:frame draw:style-name="fr4" draw:name="Objet1" text:anchor-type="as-char" svg:y="-0.527cm" svg:width="1.065cm" svg:height="0.739cm" draw:z-index="2"><draw:object xlink:href="./Object 1" xlink:type="simple" xlink:show="embed" xlink:actuate="onLoad"/><draw:image xlink:href="./ObjectReplacements/Object 1" xlink:type="simple" xlink:show="embed" xlink:actuate="onLoad"/><svg:desc>EML</svg:desc></draw:frame> :</text:p>
      <text:p text:style-name="P10">……………………………………………………………………………</text:p>
      <text:p text:style-name="P6">Exercice 3 :</text:p>
      <text:p text:style-name="P10">Marque les angles aigus avec un arc rouge, les angles obtus avec un arc bleu et les angles droites avec un carré vert.</text:p>
      <text:p text:style-name="P10"><draw:frame draw:style-name="fr1" draw:name="Image3" text:anchor-type="paragraph" svg:x="-0.295cm" svg:y="0.882cm" svg:width="17cm" svg:height="4.05cm" draw:z-index="3"><draw:image xlink:href="Pictures/100002010000047E00000112726712376DEC20C5.png" xlink:type="simple" xlink:show="embed" xlink:actuate="onLoad" loext:mime-type="image/png"/></draw:frame></text:p>
      <text:p text:style-name="P10"/>
      <text:p text:style-name="P6">Exercice 4 :</text:p>
      <text:p text:style-name="P10">Pour chaque cas, donne la nature de l’angle (aigu, obtus, plat, droit)</text:p>
      <text:p text:style-name="P10"/>
      <text:p text:style-name="P10"/>
      <text:p text:style-name="P10"/>
      <text:p text:style-name="P10"/>
      <text:p text:style-name="P7"><draw:frame draw:style-name="fr3" draw:name="Image4" text:anchor-type="paragraph" svg:width="17cm" svg:height="6.657cm" draw:z-index="4"><draw:image xlink:href="Pictures/100002010000031A0000013715E19031291CA9D0.png" xlink:type="simple" xlink:show="embed" xlink:actuate="onLoad" loext:mime-type="image/png"/></draw:frame><text:soft-page-break/>Exercice 5 :</text:p>
      <text:p text:style-name="P11">Sans utiliser d’instrument de géométrie, associe chaque angle à sa mesure.</text:p>
      <text:p text:style-name="P11"><draw:frame draw:style-name="fr1" draw:name="Image5" text:anchor-type="paragraph" svg:x="-2cm" svg:y="0.998cm" svg:width="20.951cm" svg:height="6.696cm" draw:z-index="5"><draw:image xlink:href="Pictures/10000201000004A50000018A8220A5A5188754CC.png" xlink:type="simple" xlink:show="embed" xlink:actuate="onLoad" loext:mime-type="image/png"/></draw:frame></text:p>
      <text:p text:style-name="P11"/>
      <text:p text:style-name="P7">Exercice 6 :</text:p>
      <text:p text:style-name="P11"><draw:frame draw:style-name="fr2" draw:name="Image6" text:anchor-type="paragraph" svg:width="20.001cm" svg:height="13.266cm" draw:z-index="6"><draw:image xlink:href="Pictures/10000201000004E100000335D8C63B62CAB46E2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16:17:25.025000000</meta:creation-date>
    <dc:date>2021-06-14T16:55:54.825000000</dc:date>
    <meta:editing-duration>PT7M48S</meta:editing-duration>
    <meta:editing-cycles>1</meta:editing-cycles>
    <meta:document-statistic meta:table-count="2" meta:image-count="6" meta:object-count="1" meta:page-count="4" meta:paragraph-count="31" meta:word-count="127" meta:character-count="819" meta:non-whitespace-character-count="624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over accent="true">
      <mtext>EML</mtext>
      <mo stretchy="true">^</mo>
    </mover>
    <annotation encoding="StarMath 5.0"> widehat {"EML"}</annotation>
  </semantics>
</math>
</file>