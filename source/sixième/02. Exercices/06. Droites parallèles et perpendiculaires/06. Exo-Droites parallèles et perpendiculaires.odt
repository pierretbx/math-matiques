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5100000116F0443E9954B8C330.png" manifest:media-type="image/png"/>
  <manifest:file-entry manifest:full-path="Pictures/10000000000001050000009F6196B6565238E649.png" manifest:media-type="image/png"/>
  <manifest:file-entry manifest:full-path="Pictures/1000000000000161000000A33DEC6B2941870BB3.png" manifest:media-type="image/png"/>
  <manifest:file-entry manifest:full-path="Pictures/1000000000000170000000D210CFD3DE4A177B6E.png" manifest:media-type="image/png"/>
  <manifest:file-entry manifest:full-path="Pictures/1000000000000144000000CA159507B3A8E3D118.png" manifest:media-type="image/png"/>
  <manifest:file-entry manifest:full-path="Pictures/100000000000015F0000018430B0E3643E3E83D9.png" manifest:media-type="image/png"/>
  <manifest:file-entry manifest:full-path="Pictures/100000000000013C000000A53AC4650A12D50AE3.png" manifest:media-type="image/png"/>
  <manifest:file-entry manifest:full-path="Pictures/100000000000026F000001ADE3326AAE51502B22.png" manifest:media-type="image/png"/>
  <manifest:file-entry manifest:full-path="Pictures/1000000000000144000000B94C97A602BC164693.png" manifest:media-type="image/png"/>
  <manifest:file-entry manifest:full-path="Pictures/10000000000001950000010A9074EF7E5ABC4978.png" manifest:media-type="image/png"/>
  <manifest:file-entry manifest:full-path="Pictures/100000000000010B000000BCF2B96AA996572226.png" manifest:media-type="image/png"/>
  <manifest:file-entry manifest:full-path="Pictures/100000000000014C000000E4C2361002B43010A3.png" manifest:media-type="image/png"/>
  <manifest:file-entry manifest:full-path="Pictures/100000000000019F00000101F543449132B6961C.png" manifest:media-type="image/png"/>
  <manifest:file-entry manifest:full-path="Pictures/100000000000029800000153337C4EFD51F689C1.png" manifest:media-type="image/png"/>
  <manifest:file-entry manifest:full-path="Pictures/10000000000001400000016363924032371A785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04c100" officeooo:paragraph-rsid="0004c100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4cbe0" officeooo:paragraph-rsid="0004cbe0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53e8e" officeooo:paragraph-rsid="00053e8e"/>
    </style:style>
    <style:style style:name="P5" style:family="paragraph" style:parent-style-name="Standard">
      <style:text-properties style:font-name="OpenDyslexic" style:text-underline-style="none" officeooo:rsid="0004c100" officeooo:paragraph-rsid="0004c100"/>
    </style:style>
    <style:style style:name="P6" style:family="paragraph" style:parent-style-name="Standard">
      <style:text-properties style:font-name="OpenDyslexic" style:text-underline-style="none" officeooo:rsid="0004cbe0" officeooo:paragraph-rsid="0004cbe0"/>
    </style:style>
    <style:style style:name="P7" style:family="paragraph" style:parent-style-name="Standard">
      <style:text-properties style:font-name="OpenDyslexic" style:text-underline-style="none" officeooo:rsid="0004cbe0" officeooo:paragraph-rsid="00053e8e"/>
    </style:style>
    <style:style style:name="P8" style:family="paragraph" style:parent-style-name="Standard">
      <style:text-properties style:font-name="OpenDyslexic" style:text-underline-style="none" officeooo:rsid="00053e8e" officeooo:paragraph-rsid="00053e8e"/>
    </style:style>
    <style:style style:name="P9" style:family="paragraph" style:parent-style-name="Table_20_Contents">
      <style:text-properties style:font-name="OpenDyslexic" officeooo:rsid="0004c100" officeooo:paragraph-rsid="0004c100"/>
    </style:style>
    <style:style style:name="P10" style:family="paragraph" style:parent-style-name="Table_20_Contents">
      <style:paragraph-properties fo:text-align="center" style:justify-single-word="false"/>
      <style:text-properties style:font-name="OpenDyslexic" officeooo:rsid="0004cbe0" officeooo:paragraph-rsid="0004cbe0"/>
    </style:style>
    <style:style style:name="P11" style:family="paragraph" style:parent-style-name="Standard">
      <style:text-properties style:font-name="OpenDyslexic" style:text-underline-style="none" officeooo:rsid="0005d04b" officeooo:paragraph-rsid="0005d04b"/>
    </style:style>
    <style:style style:name="P12" style:family="paragraph" style:parent-style-name="Standard">
      <style:text-properties style:font-name="OpenDyslexic" style:text-underline-style="none" officeooo:rsid="0005ef4e" officeooo:paragraph-rsid="0005ef4e"/>
    </style:style>
    <style:style style:name="P13" style:family="paragraph" style:parent-style-name="Standard">
      <style:text-properties style:font-name="OpenDyslexic" style:text-underline-style="none" officeooo:rsid="00081c60" officeooo:paragraph-rsid="00081c60"/>
    </style:style>
    <style:style style:name="P14" style:family="paragraph" style:parent-style-name="Standard">
      <style:text-properties style:font-name="OpenDyslexic" style:text-underline-style="none" officeooo:rsid="0008b3ae" officeooo:paragraph-rsid="0008b3ae"/>
    </style:style>
    <style:style style:name="P15" style:family="paragraph" style:parent-style-name="Standard">
      <style:text-properties style:font-name="OpenDyslexic" style:text-underline-style="none" officeooo:rsid="000a3350" officeooo:paragraph-rsid="000a3350"/>
    </style:style>
    <style:style style:name="P16" style:family="paragraph" style:parent-style-name="Standard">
      <style:text-properties style:font-name="OpenDyslexic" style:text-underline-style="none" officeooo:rsid="000b94a8" officeooo:paragraph-rsid="000b94a8"/>
    </style:style>
    <style:style style:name="P17" style:family="paragraph" style:parent-style-name="Standard">
      <style:text-properties style:font-name="OpenDyslexic" style:text-underline-style="solid" style:text-underline-width="auto" style:text-underline-color="font-color" officeooo:rsid="0005ef4e" officeooo:paragraph-rsid="0005ef4e"/>
    </style:style>
    <style:style style:name="P18" style:family="paragraph" style:parent-style-name="Standard">
      <style:text-properties style:font-name="OpenDyslexic" style:text-underline-style="solid" style:text-underline-width="auto" style:text-underline-color="font-color" officeooo:rsid="000765d9" officeooo:paragraph-rsid="000765d9"/>
    </style:style>
    <style:style style:name="P19" style:family="paragraph" style:parent-style-name="Standard">
      <style:text-properties style:font-name="OpenDyslexic" style:text-underline-style="solid" style:text-underline-width="auto" style:text-underline-color="font-color" officeooo:rsid="00081c60" officeooo:paragraph-rsid="00081c60"/>
    </style:style>
    <style:style style:name="P20" style:family="paragraph" style:parent-style-name="Standard">
      <style:text-properties style:font-name="OpenDyslexic" style:text-underline-style="solid" style:text-underline-width="auto" style:text-underline-color="font-color" officeooo:rsid="0008b3ae" officeooo:paragraph-rsid="0008b3ae"/>
    </style:style>
    <style:style style:name="P21" style:family="paragraph" style:parent-style-name="Standard">
      <style:text-properties style:font-name="OpenDyslexic" style:text-underline-style="solid" style:text-underline-width="auto" style:text-underline-color="font-color" officeooo:rsid="000a3350" officeooo:paragraph-rsid="000a3350"/>
    </style:style>
    <style:style style:name="P22" style:family="paragraph" style:parent-style-name="Standard">
      <style:text-properties style:font-name="OpenDyslexic" style:text-underline-style="solid" style:text-underline-width="auto" style:text-underline-color="font-color" officeooo:rsid="000b94a8" officeooo:paragraph-rsid="000b94a8"/>
    </style:style>
    <style:style style:name="P23" style:family="paragraph" style:parent-style-name="Standard">
      <style:text-properties style:font-name="OpenDyslexic" style:text-underline-style="solid" style:text-underline-width="auto" style:text-underline-color="font-color" officeooo:rsid="000bc5cd" officeooo:paragraph-rsid="000bc5cd"/>
    </style:style>
    <style:style style:name="P24" style:family="paragraph" style:parent-style-name="Table_20_Contents">
      <style:text-properties style:font-name="OpenDyslexic"/>
    </style:style>
    <style:style style:name="P25" style:family="paragraph" style:parent-style-name="Table_20_Contents">
      <style:text-properties style:font-name="OpenDyslexic" style:text-underline-style="solid" style:text-underline-width="auto" style:text-underline-color="font-color"/>
    </style:style>
    <style:style style:name="P26" style:family="paragraph" style:parent-style-name="Table_20_Contents">
      <style:text-properties style:font-name="OpenDyslexic" style:text-underline-style="solid" style:text-underline-width="auto" style:text-underline-color="font-color" officeooo:rsid="00081c60" officeooo:paragraph-rsid="00081c60"/>
    </style:style>
    <style:style style:name="T1" style:family="text">
      <style:text-properties officeooo:rsid="00053e8e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none" officeooo:rsid="000bc5cd"/>
    </style:style>
    <style:style style:name="T6" style:family="text">
      <style:text-properties style:text-position="0% 100%" officeooo:rsid="000765d9"/>
    </style:style>
    <style:style style:name="T7" style:family="text">
      <style:text-properties style:text-underline-style="none"/>
    </style:style>
    <style:style style:name="T8" style:family="text">
      <style:text-properties officeooo:rsid="00081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Collège A.Lejeune <text:s text:c="68"/>6ème</text:p>
            <text:p text:style-name="P9">Exercices <text:s text:c="4"/>Chapitre 6 : Droites perpendiculaires et droites parallèles</text:p>
          </table:table-cell>
        </table:table-row>
      </table:table>
      <text:p text:style-name="P1"/>
      <text:p text:style-name="P2">Exercice 1 :</text:p>
      <text:p text:style-name="P5">Complète les phrases avec les mots :</text:p>
      <text:p text:style-name="P5">« parallèles », « perpendiculaires » ou « sécantes et non perpendiculaires ».</text:p>
      <text:p text:style-name="P5"><draw:frame draw:style-name="fr1" draw:name="Image1" text:anchor-type="paragraph" svg:x="0.286cm" svg:y="0cm" svg:width="15.69cm" svg:height="7.355cm" draw:z-index="0"><draw:image xlink:href="Pictures/100000000000025100000116F0443E9954B8C330.png" xlink:type="simple" xlink:show="embed" xlink:actuate="onLoad" loext:mime-type="image/png"/></draw:frame>a. Les droites (AB) et (AD) semblent ….</text:p>
      <text:p text:style-name="P5">b. Les droites (AB) et (BC) semblent ….</text:p>
      <text:p text:style-name="P5">c. Les droites (GE) et (FA) semblent …..</text:p>
      <text:p text:style-name="P5">d. Les droites (AB) et (CF) semblent …..</text:p>
      <text:p text:style-name="P5">e. Les droites (BC) et (GE) semblent …..</text:p>
      <text:p text:style-name="P5"/>
      <text:p text:style-name="P2">Exercice 2 :</text:p>
      <text:p text:style-name="P5">a. Reproduis la figure ci-dessous en respectant le quadrillage.</text:p>
      <text:p text:style-name="P5"><draw:frame draw:style-name="fr2" draw:name="Image2" text:anchor-type="paragraph" svg:width="9.737cm" svg:height="5.556cm" draw:z-index="1"><draw:image xlink:href="Pictures/1000000000000170000000D210CFD3DE4A177B6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b. Recopie et complète ce tableau avec les symboles // et <draw:frame draw:style-name="fr5" draw:name="Objet1" text:anchor-type="as-char" svg:y="-0.527cm" svg:width="0.818cm" svg:height="0.739cm" draw:z-index="2"><draw:object xlink:href="./Object 1" xlink:type="simple" xlink:show="embed" xlink:actuate="onLoad"/><draw:image xlink:href="./ObjectReplacements/Object 1" xlink:type="simple" xlink:show="embed" xlink:actuate="onLoad"/></draw:frame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0">(AB) …. (BC)</text:p>
          </table:table-cell>
          <table:table-cell table:style-name="Tableau2.A1" office:value-type="string">
            <text:p text:style-name="P10">(BC)…. (DE)</text:p>
          </table:table-cell>
          <table:table-cell table:style-name="Tableau2.C1" office:value-type="string">
            <text:p text:style-name="P10">(EF)…..(CD)</text:p>
          </table:table-cell>
        </table:table-row>
        <table:table-row>
          <table:table-cell table:style-name="Tableau2.A2" office:value-type="string">
            <text:p text:style-name="P10">(AB)….(DE)</text:p>
          </table:table-cell>
          <table:table-cell table:style-name="Tableau2.A2" office:value-type="string">
            <text:p text:style-name="P10">(BD)....(DF)</text:p>
          </table:table-cell>
          <table:table-cell table:style-name="Tableau2.C2" office:value-type="string">
            <text:p text:style-name="P10">(DF).…(CE)</text:p>
          </table:table-cell>
        </table:table-row>
      </table:table>
      <text:p text:style-name="P6"/>
      <text:p text:style-name="P3">Exercice 3 :</text:p>
      <text:p text:style-name="P7"><text:span text:style-name="T1">C</text:span>omplète ce tableau avec les symboles // et <draw:frame draw:style-name="fr5" draw:name="Objet2" text:anchor-type="as-char" svg:y="-0.527cm" svg:width="0.818cm" svg:height="0.739cm" draw:z-index="4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1">si possible.</text:span></text:p>
      <text:p text:style-name="P8"><draw:frame draw:style-name="fr1" draw:name="Image3" text:anchor-type="paragraph" svg:x="0.048cm" svg:y="0.238cm" svg:width="9.287cm" svg:height="10.266cm" draw:z-index="3"><draw:image xlink:href="Pictures/100000000000015F0000018430B0E3643E3E83D9.png" xlink:type="simple" xlink:show="embed" xlink:actuate="onLoad" loext:mime-type="image/png"/></draw:frame>a) (AB) ……....(BD)</text:p>
      <text:p text:style-name="P8">b) (AG) ……...(CH)</text:p>
      <text:p text:style-name="P8">c) (FI) ……....(CE)</text:p>
      <text:p text:style-name="P8">d) (AB)……...(FI)</text:p>
      <text:p text:style-name="P8">e) (BC)……..(EI)</text:p>
      <text:p text:style-name="P8">f) (DG)……..(EH)</text:p>
      <text:p text:style-name="P8">g) (CD)……..(CH)</text:p>
      <text:p text:style-name="P8">h) (FH) ……..(GI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Exercice 4 :</text:p>
      <text:p text:style-name="P11">Complète les phrases suivantes :</text:p>
      <text:p text:style-name="P11">a. (d<text:span text:style-name="T2">5</text:span><text:span text:style-name="T3">) est …….. droite ………………….. à la droite (d</text:span><text:span text:style-name="T2">1</text:span><text:span text:style-name="T3">) passant par le point …….. ;</text:span></text:p>
      <text:p text:style-name="P11"><text:span text:style-name="T3"/></text:p>
      <text:p text:style-name="P11"><text:span text:style-name="T3">b. (d</text:span><text:span text:style-name="T2">4</text:span><text:span text:style-name="T3">) est la droite …………………. à la droite (d</text:span><text:span text:style-name="T2">2</text:span><text:span text:style-name="T3">) en ………… ;</text:span></text:p>
      <text:p text:style-name="P11"><text:span text:style-name="T3"/></text:p>
      <text:p text:style-name="P11"><text:span text:style-name="T3">c. (d</text:span><text:span text:style-name="T2">3</text:span><text:span text:style-name="T3">) est ……. droite ……………. à la droite (d</text:span><text:span text:style-name="T2">4</text:span><text:span text:style-name="T3">).</text:span></text:p>
      <text:p text:style-name="P11"><draw:frame draw:style-name="fr1" draw:name="Image4" text:anchor-type="paragraph" svg:x="1.893cm" svg:y="0cm" svg:width="12.423cm" svg:height="8.555cm" draw:z-index="5"><draw:image xlink:href="Pictures/100000000000026F000001ADE3326AAE51502B22.png" xlink:type="simple" xlink:show="embed" xlink:actuate="onLoad" loext:mime-type="image/png"/></draw:frame><text:soft-page-break/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7"><text:span text:style-name="T3">Exercice 5 :</text:span></text:p>
      <text:p text:style-name="P12"><text:span text:style-name="T3">Voici les trois étapes d’une construction.</text:span></text:p>
      <text:p text:style-name="P18"><text:span text:style-name="T3">Étape 1 :</text:span><text:span text:style-name="T4"> <text:s text:c="22"/></text:span><text:span text:style-name="T3">Étape 2 :</text:span><text:span text:style-name="T4"> <text:s text:c="19"/></text:span><text:span text:style-name="T3">Étape 3 :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4"><draw:frame draw:style-name="fr1" draw:name="Image5" text:anchor-type="paragraph" svg:x="0cm" svg:y="0.37cm" svg:width="5.472cm" svg:height="3.124cm" draw:z-index="6"><draw:image xlink:href="Pictures/1000000000000144000000B94C97A602BC164693.png" xlink:type="simple" xlink:show="embed" xlink:actuate="onLoad" loext:mime-type="image/png"/></draw:frame></text:p>
          </table:table-cell>
          <table:table-cell table:style-name="Tableau3.A1" office:value-type="string">
            <text:p text:style-name="P24"><draw:frame draw:style-name="fr3" draw:name="Image6" text:anchor-type="paragraph" svg:width="5.473cm" svg:height="2.858cm" draw:z-index="7"><draw:image xlink:href="Pictures/100000000000013C000000A53AC4650A12D50AE3.png" xlink:type="simple" xlink:show="embed" xlink:actuate="onLoad" loext:mime-type="image/png"/></draw:frame></text:p>
          </table:table-cell>
          <table:table-cell table:style-name="Tableau3.C1" office:value-type="string">
            <text:p text:style-name="P24"><draw:frame draw:style-name="fr4" draw:name="Image7" text:anchor-type="paragraph" svg:width="5.473cm" svg:height="2.526cm" draw:z-index="8"><draw:image xlink:href="Pictures/1000000000000161000000A33DEC6B2941870BB3.png" xlink:type="simple" xlink:show="embed" xlink:actuate="onLoad" loext:mime-type="image/png"/></draw:frame></text:p>
          </table:table-cell>
        </table:table-row>
      </table:table>
      <text:p text:style-name="P12"><text:span text:style-name="T3"/></text:p>
      <text:p text:style-name="P12"><text:span text:style-name="T3">P</text:span><text:span text:style-name="T6">our chacune des trois phrases suivantes, dis à quelle étape elle correspond.</text:span></text:p>
      <text:p text:style-name="P18"><text:span text:style-name="T3">Phrase A :</text:span><text:span text:style-name="T4"> Placer un point A n’appartenant pas à la droite (d).</text:span></text:p>
      <text:p text:style-name="P18"><text:span text:style-name="T3">Phrase B :</text:span><text:span text:style-name="T4"> Tracer une droite (d).</text:span></text:p>
      <text:p text:style-name="P18"><text:span text:style-name="T3">Phrase C :</text:span><text:span text:style-name="T4"> Tracer la droite (d’), parallèle à la droite (d) passant par le point A.</text:span></text:p>
      <text:p text:style-name="P18"><text:span text:style-name="T4"/></text:p>
      <text:p text:style-name="P18"><text:span text:style-name="T3">Exercice 6 :</text:span></text:p>
      <text:p text:style-name="P13"><text:span text:style-name="T3">Voici les quatre étapes d’une construction.</text:span></text:p>
      <text:p text:style-name="P13"><text:span text:style-name="T3"/></text:p>
      <text:p text:style-name="P13"><text:span text:style-name="T3"/></text:p>
      <text:p text:style-name="P13"><text:span text:style-name="T3"/></text:p>
      <table:table table:name="Tableau4" table:style-name="Tableau4">
        <table:table-column table:style-name="Tableau4.A" table:number-columns-repeated="2"/>
        <text:soft-page-break/>
        <table:table-row>
          <table:table-cell table:style-name="Tableau4.A1" office:value-type="string">
            <text:p text:style-name="P26"><draw:frame draw:style-name="fr1" draw:name="Image8" text:anchor-type="paragraph" svg:x="0.584cm" svg:y="0.938cm" svg:width="7.65cm" svg:height="4.768cm" draw:z-index="9"><draw:image xlink:href="Pictures/1000000000000144000000CA159507B3A8E3D118.png" xlink:type="simple" xlink:show="embed" xlink:actuate="onLoad" loext:mime-type="image/png"/></draw:frame>Étape 1 :<text:span text:style-name="T7"><text:line-break/></text:span></text:p>
          </table:table-cell>
          <table:table-cell table:style-name="Tableau4.B1" office:value-type="string">
            <text:p text:style-name="P25"><draw:frame draw:style-name="fr1" draw:name="Image9" text:anchor-type="paragraph" svg:x="0.383cm" svg:y="1.296cm" svg:width="6.906cm" svg:height="4.207cm" draw:z-index="10"><draw:image xlink:href="Pictures/10000000000001050000009F6196B6565238E649.png" xlink:type="simple" xlink:show="embed" xlink:actuate="onLoad" loext:mime-type="image/png"/></draw:frame><text:span text:style-name="T8">Étape 2 :<text:line-break/></text:span></text:p>
          </table:table-cell>
        </table:table-row>
        <table:table-row>
          <table:table-cell table:style-name="Tableau4.A2" office:value-type="string">
            <text:p text:style-name="P25"><text:span text:style-name="T8">Étape 3 :</text:span></text:p>
            <text:p text:style-name="P25"><draw:frame draw:style-name="fr1" draw:name="Image10" text:anchor-type="paragraph" svg:x="0.621cm" svg:y="0.291cm" svg:width="7.064cm" svg:height="4.974cm" draw:z-index="11"><draw:image xlink:href="Pictures/100000000000010B000000BCF2B96AA996572226.png" xlink:type="simple" xlink:show="embed" xlink:actuate="onLoad" loext:mime-type="image/png"/></draw:frame><text:span text:style-name="T7"/></text:p>
          </table:table-cell>
          <table:table-cell table:style-name="Tableau4.B2" office:value-type="string">
            <text:p text:style-name="P25"><text:span text:style-name="T8">Étape 4 :</text:span></text:p>
            <text:p text:style-name="P25"><draw:frame draw:style-name="fr4" draw:name="Image11" text:anchor-type="paragraph" svg:width="8.306cm" svg:height="5.703cm" draw:z-index="12"><draw:image xlink:href="Pictures/100000000000014C000000E4C2361002B43010A3.png" xlink:type="simple" xlink:show="embed" xlink:actuate="onLoad" loext:mime-type="image/png"/></draw:frame></text:p>
          </table:table-cell>
        </table:table-row>
      </table:table>
      <text:p text:style-name="P13"><text:span text:style-name="T3">Pour chacune des quatre phrases suivantes, dis à quelle étape elle correspond.</text:span></text:p>
      <text:p text:style-name="P13"><text:span text:style-name="T3"/></text:p>
      <text:p text:style-name="P19"><text:span text:style-name="T3">Phrase A :</text:span><text:span text:style-name="T4"> Trace la droite (d), perpendiculaire à la droite (AB) passant par le point M.</text:span></text:p>
      <text:p text:style-name="P19"><text:span text:style-name="T4"/></text:p>
      <text:p text:style-name="P19"><text:span text:style-name="T3">Phrase B :</text:span><text:span text:style-name="T4"> Place deux points distincts A et B.</text:span></text:p>
      <text:p text:style-name="P19"><text:span text:style-name="T4"/></text:p>
      <text:p text:style-name="P19"><text:span text:style-name="T3">Phrase C :</text:span><text:span text:style-name="T4"> Place un point M n’appartenant pas à la droite (AB).</text:span></text:p>
      <text:p text:style-name="P19"><text:span text:style-name="T4"/></text:p>
      <text:p text:style-name="P19"><text:span text:style-name="T3">Phrase D :</text:span><text:span text:style-name="T4"> Trace la droite (AB).</text:span></text:p>
      <text:p text:style-name="P19"><text:span text:style-name="T4"/></text:p>
      <text:p text:style-name="P20"><text:span text:style-name="T3">Exercice 7 :</text:span></text:p>
      <text:p text:style-name="P14"><text:span text:style-name="T3">On a écrit le programme de construction permettant de construire cette figure.</text:span></text:p>
      <text:p text:style-name="P14"><draw:frame draw:style-name="fr2" draw:name="Image12" text:anchor-type="paragraph" svg:width="10.98cm" svg:height="6.8cm" draw:z-index="13"><draw:image xlink:href="Pictures/100000000000019F00000101F543449132B6961C.png" xlink:type="simple" xlink:show="embed" xlink:actuate="onLoad" loext:mime-type="image/png"/></draw:frame><text:soft-page-break/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>Malheureusement, les cinq étapes du texte sont dans le désorde ! Réécris, dans l’ordre, le programme de construction.</text:span></text:p>
      <text:p text:style-name="P14"><text:span text:style-name="T3">a. Trace la droite (d’), parallèle à la droite (d) passant par le point S.</text:span></text:p>
      <text:p text:style-name="P14"><text:span text:style-name="T3">b. Trace une droite (d), sécante en T à la droite (TR).</text:span></text:p>
      <text:p text:style-name="P14"><text:span text:style-name="T3">c. Trace la droite (TR).</text:span></text:p>
      <text:p text:style-name="P14"><text:span text:style-name="T3">d. Place deux points distincts T et R.</text:span></text:p>
      <text:p text:style-name="P14"><text:span text:style-name="T3">e. Place un point S n’appartenant pas à la droite (d).</text:span></text:p>
      <text:p text:style-name="P14"><text:span text:style-name="T3"/></text:p>
      <text:p text:style-name="P20"><text:span text:style-name="T3">Exercice 8 :</text:span></text:p>
      <text:p text:style-name="P14"><text:span text:style-name="T3">Trace la droite parallèle à la droite (d) passant par le point A.</text:span></text:p>
      <text:p text:style-name="P14"><draw:frame draw:style-name="fr4" draw:name="Image13" text:anchor-type="paragraph" svg:width="17cm" svg:height="8.678cm" draw:z-index="14"><draw:image xlink:href="Pictures/100000000000029800000153337C4EFD51F689C1.png" xlink:type="simple" xlink:show="embed" xlink:actuate="onLoad" loext:mime-type="image/png"/></draw:frame><text:span text:style-name="T3"/></text:p>
      <text:p text:style-name="P14"><text:span text:style-name="T3"/></text:p>
      <text:p text:style-name="P21"><text:soft-page-break/><text:span text:style-name="T3">Exercice 9 :</text:span></text:p>
      <text:p text:style-name="P15"><draw:frame draw:style-name="fr1" draw:name="Image14" text:anchor-type="paragraph" svg:x="4.267cm" svg:y="1.614cm" svg:width="8.467cm" svg:height="9.393cm" draw:z-index="15"><draw:image xlink:href="Pictures/10000000000001400000016363924032371A785D.png" xlink:type="simple" xlink:show="embed" xlink:actuate="onLoad" loext:mime-type="image/png"/></draw:frame><text:span text:style-name="T3">Trace la droite perpendiculaire à la droite (d) passant par le point B.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21"><text:span text:style-name="T3">Exercice 10 :</text:span></text:p>
      <text:p text:style-name="P15"><text:span text:style-name="T3">Trace la droite (d</text:span><text:span text:style-name="T2">1</text:span><text:span text:style-name="T3">) perpendiculaire à la droite (d) passant par le point M, puis la droite (d</text:span><text:span text:style-name="T2">2</text:span><text:span text:style-name="T3">) parallèle à la droite (d’) passant par M.</text:span></text:p>
      <text:p text:style-name="P15"><draw:frame draw:style-name="fr2" draw:name="Image15" text:anchor-type="paragraph" svg:width="10.716cm" svg:height="7.038cm" draw:z-index="16"><draw:image xlink:href="Pictures/10000000000001950000010A9074EF7E5ABC4978.png" xlink:type="simple" xlink:show="embed" xlink:actuate="onLoad" loext:mime-type="image/png"/></draw:frame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21"><text:span text:style-name="T3">Exercice 11 :</text:span></text:p>
      <text:p text:style-name="P21"><text:span text:style-name="T4">a. Place trois points R, D et T distincts et non alignés.</text:span></text:p>
      <text:p text:style-name="P21"><text:span text:style-name="T4">b. Trace la droite (d), parallèle à la droite (ST) passant par le point R.</text:span></text:p>
      <text:p text:style-name="P21"><text:soft-page-break/><text:span text:style-name="T4">c. Trace la droite (d’), perpendiculaire à la droite (RT) passant par le point S.</text:span></text:p>
      <text:p text:style-name="P22"><text:span text:style-name="T3">Exercice 12 :</text:span></text:p>
      <text:p text:style-name="P16"><text:span text:style-name="T3">a. Trace une droite (d) et place un point A n’appartenant pas à cette droite.</text:span></text:p>
      <text:p text:style-name="P16"><text:span text:style-name="T3">b. Trace (d’), la parallèle à (d) passant par A.</text:span></text:p>
      <text:p text:style-name="P16"><text:span text:style-name="T3">c. Trace une droite (d’’), perpendiculaire à (d).</text:span></text:p>
      <text:p text:style-name="P16"><text:span text:style-name="T3">d. Que peux-tu dire des droites (d’) et (d’’) ?</text:span></text:p>
      <text:p text:style-name="P16"><text:span text:style-name="T3"/></text:p>
      <text:p text:style-name="P22"><text:span text:style-name="T3">Exercice 13 :</text:span></text:p>
      <text:p text:style-name="P16"><text:span text:style-name="T3">1) Trace un cercle de centre O.</text:span></text:p>
      <text:p text:style-name="P16"><text:span text:style-name="T3">Tracer un diamètre [AB] de ce cercle.</text:span></text:p>
      <text:p text:style-name="P16"><text:span text:style-name="T3">2) Tracer la perpendiculaire à la droite (AB) passant par le point O. Cette perpendiculaire coupe le cercle aux points C et D. Placer ces points.</text:span></text:p>
      <text:p text:style-name="P16"><text:span text:style-name="T3">3) a) Tracer la droite qui passe par le point C et qui est parallèle à la droite (AD).</text:span></text:p>
      <text:p text:style-name="P16"><text:span text:style-name="T3">b) Par quel autre point nommé de la figure cette parallèle passe-t-elle ?</text:span></text:p>
      <text:p text:style-name="P16"><text:span text:style-name="T3"/></text:p>
      <text:p text:style-name="P22"><text:span text:style-name="T3">Exercice 14 :</text:span></text:p>
      <text:p text:style-name="P22"><text:span text:style-name="T4">a. Place deux points A et B tels que AB=8 cm.</text:span></text:p>
      <text:p text:style-name="P22"><text:span text:style-name="T4">b. Place le point L sur [AB] tel que AL=3cm.</text:span></text:p>
      <text:p text:style-name="P22"><text:span text:style-name="T4">c. Trace la droite (d) telle que :</text:span></text:p>
      <text:p text:style-name="P22"><text:span text:style-name="T4"><draw:frame draw:style-name="fr6" draw:name="Objet3" text:anchor-type="as-char" svg:y="-0.527cm" svg:width="1.392cm" svg:height="0.739cm" draw:z-index="17"><draw:object xlink:href="./Object 3" xlink:type="simple" xlink:show="embed" xlink:actuate="onLoad"/><draw:image xlink:href="./ObjectReplacements/Object 3" xlink:type="simple" xlink:show="embed" xlink:actuate="onLoad"/></draw:frame></text:span><text:span text:style-name="T4">et </text:span><text:span text:style-name="T4"><draw:frame draw:style-name="fr6" draw:name="Objet4" text:anchor-type="as-char" svg:y="-0.527cm" svg:width="2.103cm" svg:height="0.739cm" draw:z-index="18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2"><text:span text:style-name="T4">d. Place un point C tel que :</text:span></text:p>
      <text:p text:style-name="P22"><text:span text:style-name="T4"><draw:frame draw:style-name="fr6" draw:name="Objet5" text:anchor-type="as-char" svg:y="-0.527cm" svg:width="1.423cm" svg:height="0.739cm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5">et LC= 2cm</text:span></text:p>
      <text:p text:style-name="P23"><text:span text:style-name="T4">e. Trace la droite (d’) telle que : </text:span></text:p>
      <text:p text:style-name="P23"><text:span text:style-name="T4">(d’)//(AB) et </text:span><text:span text:style-name="T4"><draw:frame draw:style-name="fr6" draw:name="Objet6" text:anchor-type="as-char" svg:y="-0.527cm" svg:width="1.591cm" svg:height="0.739cm" draw:z-index="20"><draw:object xlink:href="./Object 6" xlink:type="simple" xlink:show="embed" xlink:actuate="onLoad"/><draw:image xlink:href="./ObjectReplacements/Object 6" xlink:type="simple" xlink:show="embed" xlink:actuate="onLoad"/></draw:frame></text:span><text:span text:style-name="T4">.</text:span></text:p>
      <text:p text:style-name="P23"><text:span text:style-name="T4">f. Sur la demi-droite [BC), place le point I tel que BI=7 cm.</text:span></text:p>
      <text:p text:style-name="P23"><text:span text:style-name="T4">g. Trace la droite (d’’) telle que :</text:span></text:p>
      <text:p text:style-name="P23"><text:span text:style-name="T4"><draw:frame draw:style-name="fr6" draw:name="Objet7" text:anchor-type="as-char" svg:y="-0.527cm" svg:width="1.584cm" svg:height="0.739cm" draw:z-index="21"><draw:object xlink:href="./Object 7" xlink:type="simple" xlink:show="embed" xlink:actuate="onLoad"/><draw:image xlink:href="./ObjectReplacements/Object 7" xlink:type="simple" xlink:show="embed" xlink:actuate="onLoad"/></draw:frame></text:span><text:span text:style-name="T4">et (d’’)//(AC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21:38:37.721000000</meta:creation-date>
    <dc:date>2020-12-13T17:34:21.146000000</dc:date>
    <meta:editing-duration>PT11M41S</meta:editing-duration>
    <meta:editing-cycles>2</meta:editing-cycles>
    <meta:generator>LibreOffice/6.2.3.2$Windows_X86_64 LibreOffice_project/aecc05fe267cc68dde00352a451aa867b3b546ac</meta:generator>
    <meta:document-statistic meta:table-count="4" meta:image-count="15" meta:object-count="7" meta:page-count="7" meta:paragraph-count="93" meta:word-count="723" meta:character-count="3837" meta:non-whitespace-character-count="3089"/>
  </office:meta>
</office:document-meta>
</file>

<file path=Object 1/content.xml><?xml version="1.0" encoding="utf-8"?>
<math xmlns="http://www.w3.org/1998/Math/MathML" display="block">
  <semantics>
    <mrow>
      <mn>.</mn>
      <mo stretchy="false">⊥</mo>
      <mi>.</mi>
    </mrow>
    <annotation encoding="StarMath 5.0">. ortho .</annotation>
  </semantics>
</math>
</file>

<file path=Object 2/content.xml><?xml version="1.0" encoding="utf-8"?>
<math xmlns="http://www.w3.org/1998/Math/MathML" display="block">
  <semantics>
    <mrow>
      <mn>.</mn>
      <mo stretchy="false">⊥</mo>
      <mi>.</mi>
    </mrow>
    <annotation encoding="StarMath 5.0">. ortho .</annotation>
  </semantics>
</math>
</file>

<file path=Object 3/content.xml><?xml version="1.0" encoding="utf-8"?>
<math xmlns="http://www.w3.org/1998/Math/MathML" display="block">
  <semantics>
    <mrow>
      <mi>L</mi>
      <mo stretchy="false">∈</mo>
      <mrow>
        <mo fence="true" stretchy="false">(</mo>
        <mrow>
          <mi>d</mi>
        </mrow>
        <mo fence="true" stretchy="false">)</mo>
      </mrow>
    </mrow>
    <annotation encoding="StarMath 5.0">L in ( d 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i mathvariant="italic">AB</mi>
        </mrow>
        <mo fence="true" stretchy="false">)</mo>
      </mrow>
      <mo stretchy="false">⊥</mo>
      <mrow>
        <mo fence="true" stretchy="false">(</mo>
        <mrow>
          <mi>d</mi>
        </mrow>
        <mo fence="true" stretchy="false">)</mo>
      </mrow>
    </mrow>
    <annotation encoding="StarMath 5.0">( AB )  ortho ( d )</annotation>
  </semantics>
</math>
</file>

<file path=Object 5/content.xml><?xml version="1.0" encoding="utf-8"?>
<math xmlns="http://www.w3.org/1998/Math/MathML" display="block">
  <semantics>
    <mrow>
      <mi>C</mi>
      <mo stretchy="false">∈</mo>
      <mrow>
        <mo fence="true" stretchy="false">(</mo>
        <mrow>
          <mi>d</mi>
        </mrow>
        <mo fence="true" stretchy="false">)</mo>
      </mrow>
    </mrow>
    <annotation encoding="StarMath 5.0">C in ( d )</annotation>
  </semantics>
</math>
</file>

<file path=Object 6/content.xml><?xml version="1.0" encoding="utf-8"?>
<math xmlns="http://www.w3.org/1998/Math/MathML" display="block">
  <semantics>
    <mrow>
      <mi>C</mi>
      <mo stretchy="false">∈</mo>
      <mrow>
        <mo fence="true" stretchy="false">(</mo>
        <mrow>
          <mrow>
            <mi>d</mi>
            <mi>'</mi>
          </mrow>
        </mrow>
        <mo fence="true" stretchy="false">)</mo>
      </mrow>
    </mrow>
    <annotation encoding="StarMath 5.0">C in ( d' )</annotation>
  </semantics>
</math>
</file>

<file path=Object 7/content.xml><?xml version="1.0" encoding="utf-8"?>
<math xmlns="http://www.w3.org/1998/Math/MathML" display="block">
  <semantics>
    <mrow>
      <mi>I</mi>
      <mo stretchy="false">∈</mo>
      <mrow>
        <mo fence="true" stretchy="false">(</mo>
        <mrow>
          <mrow>
            <mi>d</mi>
            <mi>'</mi>
            <mi>'</mi>
          </mrow>
        </mrow>
        <mo fence="true" stretchy="false">)</mo>
      </mrow>
    </mrow>
    <annotation encoding="StarMath 5.0">I in ( d'' )</annotation>
  </semantics>
</math>
</file>