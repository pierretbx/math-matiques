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B000000C96290BC6D008421DC.png" manifest:media-type="image/png"/>
  <manifest:file-entry manifest:full-path="Pictures/1000020100000298000001F1EB36C8285F891C42.png" manifest:media-type="image/png"/>
  <manifest:file-entry manifest:full-path="Pictures/10000201000003240000030CF3457C649C79EA9A.png" manifest:media-type="image/png"/>
  <manifest:file-entry manifest:full-path="Pictures/1000020100000297000001F0A4E5A168F6C07249.png" manifest:media-type="image/png"/>
  <manifest:file-entry manifest:full-path="Pictures/1000020100000292000001F334F664684B45B8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98a55" officeooo:paragraph-rsid="00198a55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a1f32" officeooo:paragraph-rsid="001a1f32"/>
    </style:style>
    <style:style style:name="P4" style:family="paragraph" style:parent-style-name="Standard">
      <style:text-properties style:font-name="OpenDyslexic" style:text-underline-style="none" officeooo:rsid="00198a55" officeooo:paragraph-rsid="00198a55"/>
    </style:style>
    <style:style style:name="P5" style:family="paragraph" style:parent-style-name="Standard">
      <style:text-properties style:font-name="OpenDyslexic" style:text-underline-style="none" officeooo:rsid="001a1f32" officeooo:paragraph-rsid="001a1f32"/>
    </style:style>
    <style:style style:name="P6" style:family="paragraph" style:parent-style-name="Table_20_Contents">
      <style:text-properties style:font-name="OpenDyslexic" officeooo:rsid="00198a55" officeooo:paragraph-rsid="00198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Collège A.Lejeune <text:s text:c="65"/>6ème</text:p>
            <text:p text:style-name="P6">Exercice <text:s text:c="23"/>chapitre 13 : symétrie axiale</text:p>
          </table:table-cell>
        </table:table-row>
      </table:table>
      <text:p text:style-name="P1"/>
      <text:p text:style-name="P2">Exercice 1 :</text:p>
      <text:p text:style-name="P4">Construis le symétrique de la figure par rapport à la droite en utlisant le quadrillage.</text:p>
      <text:p text:style-name="P4"><draw:frame draw:style-name="fr1" draw:name="Image1" text:anchor-type="paragraph" svg:x="0.534cm" svg:y="0.381cm" svg:width="6.641cm" svg:height="5.318cm" draw:z-index="0"><draw:image xlink:href="Pictures/10000000000000FB000000C96290BC6D008421D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Exercice 2 :</text:p>
      <text:p text:style-name="P4">Construis le symétrique de chaque figure par rapport à la droite (d) en utilisant le papier quadrillé ou pointé.</text:p>
      <text:p text:style-name="P4"><draw:frame draw:style-name="fr1" draw:name="Image2" text:anchor-type="paragraph" svg:x="0cm" svg:y="-1.323cm" svg:width="17cm" svg:height="12.725cm" draw:z-index="1"><draw:image xlink:href="Pictures/1000020100000298000001F1EB36C8285F891C42.png" xlink:type="simple" xlink:show="embed" xlink:actuate="onLoad" loext:mime-type="image/png"/></draw:frame><text:soft-page-break/></text:p>
      <text:p text:style-name="P4"><draw:frame draw:style-name="fr2" draw:name="Image3" text:anchor-type="paragraph" svg:width="17cm" svg:height="12.718cm" draw:z-index="2"><draw:image xlink:href="Pictures/1000020100000297000001F0A4E5A168F6C07249.png" xlink:type="simple" xlink:show="embed" xlink:actuate="onLoad" loext:mime-type="image/png"/></draw:frame></text:p>
      <text:p text:style-name="P3"><draw:frame draw:style-name="fr1" draw:name="Image4" text:anchor-type="paragraph" svg:x="0cm" svg:y="-1.616cm" svg:width="17cm" svg:height="12.892cm" draw:z-index="3"><draw:image xlink:href="Pictures/1000020100000292000001F334F664684B45B887.png" xlink:type="simple" xlink:show="embed" xlink:actuate="onLoad" loext:mime-type="image/png"/></draw:frame><text:soft-page-break/>Exercice 3 :</text:p>
      <text:p text:style-name="P5">Construis les symétriques du personnage pour que les axes en orange soient les axes de symétrie de la figure.</text:p>
      <text:p text:style-name="P5"><draw:frame draw:style-name="fr3" draw:name="Image5" text:anchor-type="paragraph" svg:width="17cm" svg:height="16.492cm" draw:z-index="4"><draw:image xlink:href="Pictures/10000201000003240000030CF3457C649C79EA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21:27:23.029000000</meta:creation-date>
    <dc:date>2021-06-20T21:42:15.280000000</dc:date>
    <meta:editing-duration>PT4M42S</meta:editing-duration>
    <meta:editing-cycles>1</meta:editing-cycles>
    <meta:document-statistic meta:table-count="1" meta:image-count="5" meta:object-count="0" meta:page-count="4" meta:paragraph-count="8" meta:word-count="71" meta:character-count="493" meta:non-whitespace-character-count="342"/>
    <meta:generator>LibreOffice/6.2.3.2$Windows_X86_64 LibreOffice_project/aecc05fe267cc68dde00352a451aa867b3b546ac</meta:generator>
  </office:meta>
</office:document-meta>
</file>