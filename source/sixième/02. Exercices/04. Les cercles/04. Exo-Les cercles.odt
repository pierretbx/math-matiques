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D6000001D52CC90195B45409DF.png" manifest:media-type="image/png"/>
  <manifest:file-entry manifest:full-path="Pictures/10000000000001EA000001D5942DB192693657F6.png" manifest:media-type="image/png"/>
  <manifest:file-entry manifest:full-path="Pictures/10000000000001C0000001881CD4E2C263212780.png" manifest:media-type="image/png"/>
  <manifest:file-entry manifest:full-path="Pictures/100000000000032D00000321088A6B1DCA847ADB.png" manifest:media-type="image/png"/>
  <manifest:file-entry manifest:full-path="Pictures/10000000000001E700000185003765B0D681A278.png" manifest:media-type="image/png"/>
  <manifest:file-entry manifest:full-path="Pictures/100000000000036600000128C27ADE0D50BD27C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Graphecrit" svg:font-family="Graphecrit" style:font-pitch="variable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OpenDyslexic" officeooo:rsid="00104e5a" officeooo:paragraph-rsid="00037dc4"/>
    </style:style>
    <style:style style:name="P2" style:family="paragraph" style:parent-style-name="Standard">
      <style:text-properties style:font-name="OpenDyslexic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37dc4" officeooo:paragraph-rsid="00037dc4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4d8d8" officeooo:paragraph-rsid="0004d8d8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057aea" officeooo:paragraph-rsid="00057aea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6507a" officeooo:paragraph-rsid="0006507a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08212a" officeooo:paragraph-rsid="0008212a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097da3" officeooo:paragraph-rsid="00097da3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0b1297" officeooo:paragraph-rsid="000b1297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0b90ab" officeooo:paragraph-rsid="000b90ab"/>
    </style:style>
    <style:style style:name="P11" style:family="paragraph" style:parent-style-name="Standard">
      <style:text-properties style:font-name="OpenDyslexic" style:text-underline-style="none" officeooo:rsid="00037dc4" officeooo:paragraph-rsid="00037dc4"/>
    </style:style>
    <style:style style:name="P12" style:family="paragraph" style:parent-style-name="Standard">
      <style:text-properties style:font-name="OpenDyslexic" style:text-underline-style="none" officeooo:rsid="0004d8d8" officeooo:paragraph-rsid="0004d8d8"/>
    </style:style>
    <style:style style:name="P13" style:family="paragraph" style:parent-style-name="Standard">
      <style:text-properties style:font-name="OpenDyslexic" style:text-underline-style="none" officeooo:rsid="0005274c" officeooo:paragraph-rsid="0005274c"/>
    </style:style>
    <style:style style:name="P14" style:family="paragraph" style:parent-style-name="Standard">
      <style:text-properties style:font-name="OpenDyslexic" style:text-underline-style="none" officeooo:rsid="00057aea" officeooo:paragraph-rsid="00057aea"/>
    </style:style>
    <style:style style:name="P15" style:family="paragraph" style:parent-style-name="Standard">
      <style:text-properties style:font-name="OpenDyslexic" style:text-underline-style="none" officeooo:rsid="0006507a" officeooo:paragraph-rsid="0006507a"/>
    </style:style>
    <style:style style:name="P16" style:family="paragraph" style:parent-style-name="Standard">
      <style:text-properties style:font-name="OpenDyslexic" style:text-underline-style="none" officeooo:rsid="0008212a" officeooo:paragraph-rsid="0008212a"/>
    </style:style>
    <style:style style:name="P17" style:family="paragraph" style:parent-style-name="Standard">
      <style:text-properties style:font-name="OpenDyslexic" style:text-underline-style="none" officeooo:rsid="00096c8c" officeooo:paragraph-rsid="00096c8c"/>
    </style:style>
    <style:style style:name="P18" style:family="paragraph" style:parent-style-name="Standard">
      <style:text-properties style:font-name="OpenDyslexic" style:text-underline-style="none" officeooo:rsid="000b90ab" officeooo:paragraph-rsid="000b90ab"/>
    </style:style>
    <style:style style:name="P19" style:family="paragraph" style:parent-style-name="Standard">
      <style:text-properties style:font-name="OpenDyslexic" style:text-underline-style="none" officeooo:rsid="0005274c" officeooo:paragraph-rsid="0005274c"/>
    </style:style>
    <style:style style:name="P20" style:family="paragraph" style:parent-style-name="Standard" style:list-style-name="L1">
      <style:text-properties style:font-name="OpenDyslexic" style:text-underline-style="none" officeooo:rsid="0005274c" officeooo:paragraph-rsid="0005274c"/>
    </style:style>
    <style:style style:name="P21" style:family="paragraph" style:parent-style-name="Standard">
      <style:text-properties style:font-name="OpenDyslexic" style:text-underline-style="none" officeooo:rsid="000b1297" officeooo:paragraph-rsid="000b1297"/>
    </style:style>
    <style:style style:name="T1" style:family="text">
      <style:text-properties officeooo:rsid="00037dc4"/>
    </style:style>
    <style:style style:name="T2" style:family="text">
      <style:text-properties style:font-name="Graphecrit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6"/>6ème</text:p>
            <text:p text:style-name="P1"><text:span text:style-name="T1">Exercices</text:span> <text:s text:c="17"/>Chapitre <text:span text:style-name="T1">4</text:span> : <text:span text:style-name="T1">Cercles</text:span></text:p>
          </table:table-cell>
        </table:table-row>
      </table:table>
      <text:p text:style-name="P2"/>
      <text:p text:style-name="P2"/>
      <text:p text:style-name="P3">Exercice 1 :</text:p>
      <text:p text:style-name="P11">A l’aide de la figure ci-contre, recopie et complète chaque phrase par le mot qui convient.</text:p>
      <text:p text:style-name="P12"><draw:frame draw:style-name="fr1" draw:name="Image1" text:anchor-type="paragraph" svg:x="-1.501cm" svg:y="0.238cm" svg:width="11.322cm" svg:height="11.298cm" draw:z-index="0"><draw:image xlink:href="Pictures/10000000000001D6000001D52CC90195B45409DF.png" xlink:type="simple" xlink:show="embed" xlink:actuate="onLoad" loext:mime-type="image/png"/></draw:frame>a. Le point O est le …………… du cercle.</text:p>
      <text:p text:style-name="P12"/>
      <text:p text:style-name="P12">b. Le point O est le …………….. de [AB]</text:p>
      <text:p text:style-name="P12"/>
      <text:p text:style-name="P12"/>
      <text:p text:style-name="P12">c. Le segment [OA] est un ……</text:p>
      <text:p text:style-name="P12">du cercle.</text:p>
      <text:p text:style-name="P12"/>
      <text:p text:style-name="P12">d. Le segment [AB] est un ……</text:p>
      <text:p text:style-name="P12">du cercle.</text:p>
      <text:p text:style-name="P12"/>
      <text:p text:style-name="P12">e. La portion du cercle qui se trouve entre les points A et M est un …………………………….</text:p>
      <text:p text:style-name="P12"/>
      <text:p text:style-name="P12">f. Le segment [MN] est une ……………….. du cercle.</text:p>
      <text:p text:style-name="P12"/>
      <text:p text:style-name="P12">g. Les droites (AB) et (MM’) sont ……………………….</text:p>
      <text:p text:style-name="P12"/>
      <text:p text:style-name="P4">Exercice 2 :</text:p>
      <text:p text:style-name="P13">a. Écris deux phrases décrivant la figure en utilisant les mots « rayon » et diamètre ».</text:p>
      <text:p text:style-name="P12"/>
      <text:p text:style-name="P13">b. Recopie et complète les phrases suivantes.</text:p>
      <text:list xml:id="list1729780430" text:style-name="L1">
        <text:list-item>
          <text:p text:style-name="P20"><draw:frame draw:style-name="fr1" draw:name="Image2" text:anchor-type="paragraph" svg:x="-1.99cm" svg:y="0.037cm" svg:width="8.599cm" svg:height="8.23cm" draw:z-index="1"><draw:image xlink:href="Pictures/10000000000001EA000001D5942DB192693657F6.png" xlink:type="simple" xlink:show="embed" xlink:actuate="onLoad" loext:mime-type="image/png"/></draw:frame><text:soft-page-break/>Le point O est le milieu du …….</text:p>
        </text:list-item>
        <text:list-item>
          <text:p text:style-name="P20">Le point O est une extrémité du ……..</text:p>
        </text:list-item>
        <text:list-item>
          <text:p text:style-name="P20">Le point O est le …………. du cercle.</text:p>
        </text:list-item>
        <text:list-item>
          <text:p text:style-name="P20">A et B sont les ………. du ……… [AB].</text:p>
        </text:list-item>
        <text:list-item>
          <text:p text:style-name="P20">La portion de cercle comprise entre les points A et C est l’……….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5">Exercice 3 :</text:p>
      <text:p text:style-name="P14">On considère la figure ci-dessous.</text:p>
      <text:p text:style-name="P15"><draw:frame draw:style-name="fr1" draw:name="Image3" text:anchor-type="paragraph" svg:x="-1.736cm" svg:y="0.056cm" svg:width="10.7cm" svg:height="9.363cm" draw:z-index="2"><draw:image xlink:href="Pictures/10000000000001C0000001881CD4E2C263212780.png" xlink:type="simple" xlink:show="embed" xlink:actuate="onLoad" loext:mime-type="image/png"/></draw:frame>1) En utilisant le vocabulaire spécifique du cercle, associer un ou plusieurs mots de la liste suivante à chacun des numéros de la figure :</text:p>
      <text:p text:style-name="P15"/>
      <text:p text:style-name="P15">- Cercle</text:p>
      <text:p text:style-name="P15">- Centre</text:p>
      <text:p text:style-name="P15">- Rayon</text:p>
      <text:p text:style-name="P15">- Diamètre</text:p>
      <text:p text:style-name="P15">- Corde</text:p>
      <text:p text:style-name="P15">2) Citer quatre rayons</text:p>
      <text:p text:style-name="P15">3) Citer six cordes</text:p>
      <text:p text:style-name="P6">Exercice 4 :</text:p>
      <text:p text:style-name="P16">a. Trace un cercle de centre O et de rayon 4 cm puis un cercle de rayon 4 cm et passant par O.</text:p>
      <text:p text:style-name="P16">b. Où se trouve le centre du deuxième cercle ?</text:p>
      <text:p text:style-name="P16"/>
      <text:p text:style-name="P7">Exercice 5 :</text:p>
      <text:p text:style-name="P16">1) Tracer un cercle de centre O.</text:p>
      <text:p text:style-name="P16"><text:soft-page-break/>2) Placer trois points I,J et K sur ce cercle.</text:p>
      <text:p text:style-name="P16">3) Citer deux segments de même longueur. Justifier la réponse.</text:p>
      <text:p text:style-name="P16">4) Que représente pour ce cercle le segment [OI] ?</text:p>
      <text:p text:style-name="P16">Que représente pour ce cercle la longueur OI ?</text:p>
      <text:p text:style-name="P16">5) Pour ce cercle, comment appelle-t-on le segment [IJ] ?</text:p>
      <text:p text:style-name="P16">6) a) Repasser en rouge l’arc de cercle <draw:frame draw:style-name="fr4" draw:name="Objet1" text:anchor-type="as-char" svg:y="-0.527cm" svg:width="0.513cm" svg:height="0.739cm" draw:z-index="3"><draw:object xlink:href="./Object 1" xlink:type="simple" xlink:show="embed" xlink:actuate="onLoad"/><draw:image xlink:href="./ObjectReplacements/Object 1" xlink:type="simple" xlink:show="embed" xlink:actuate="onLoad"/></draw:frame>contenant le point K</text:p>
      <text:p text:style-name="P16">b) Repasser en vert l’arc de cercle <draw:frame draw:style-name="fr4" draw:name="Objet2" text:anchor-type="as-char" svg:y="-0.527cm" svg:width="0.513cm" svg:height="0.739cm" draw:z-index="4"><draw:object xlink:href="./Object 2" xlink:type="simple" xlink:show="embed" xlink:actuate="onLoad"/><draw:image xlink:href="./ObjectReplacements/Object 2" xlink:type="simple" xlink:show="embed" xlink:actuate="onLoad"/><svg:desc>formule</svg:desc></draw:frame>ne contenant pas le point K.</text:p>
      <text:p text:style-name="P16"/>
      <text:p text:style-name="P7">Exercice 6 :</text:p>
      <text:p text:style-name="P17">Au centre d’une feuille quadrillée, reproduis chaque spirale puis poursuis la construction en suivant le même principe plusieurs fois pour occuper la feuille entière.</text:p>
      <text:p text:style-name="P17"><draw:frame draw:style-name="fr2" draw:name="Image4" text:anchor-type="paragraph" svg:width="12.885cm" svg:height="10.292cm" draw:z-index="5"><draw:image xlink:href="Pictures/10000000000001E700000185003765B0D681A27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>Exercice 7 :</text:p>
      <text:p text:style-name="P21"><draw:frame draw:style-name="fr1" draw:name="Image5" text:anchor-type="paragraph" svg:x="-0.397cm" svg:y="1.812cm" svg:width="17cm" svg:height="5.784cm" draw:z-index="6"><draw:image xlink:href="Pictures/100000000000036600000128C27ADE0D50BD27CA.png" xlink:type="simple" xlink:show="embed" xlink:actuate="onLoad" loext:mime-type="image/png"/></draw:frame>En utilisant le quadrillage de ton cahier, reproduis chaque figure.</text:p>
      <text:p text:style-name="P9"><text:soft-page-break/>Exercice 8 :</text:p>
      <text:p text:style-name="P18">(<text:span text:style-name="T2">C</text:span>) est un cercle de centre O et de rayon 5,2 cm. Pour chacun des points P, M, N et R définis ci-dessous, dis s’il appartient au cercle ou non.</text:p>
      <text:p text:style-name="P18">a. Le point P est à 5,2 cm du point O.</text:p>
      <text:p text:style-name="P18">b. Le segment [OM] mesure 5,1 cm.</text:p>
      <text:p text:style-name="P18">c. ON=5,2 cm.</text:p>
      <text:p text:style-name="P18">d. OR&gt;5,3 cm.</text:p>
      <text:p text:style-name="P18"/>
      <text:p text:style-name="P10">Exercice 9 :</text:p>
      <text:p text:style-name="P18">Cette figure est uniquement constituée de cercle. Observe-le et reproduis-le.</text:p>
      <text:p text:style-name="P18"><draw:frame draw:style-name="fr3" draw:name="Image6" text:anchor-type="paragraph" svg:width="13.448cm" svg:height="13.249cm" draw:z-index="7"><draw:image xlink:href="Pictures/100000000000032D00000321088A6B1DCA847ADB.png" xlink:type="simple" xlink:show="embed" xlink:actuate="onLoad" loext:mime-type="image/png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Graphecrit" svg:font-family="Graphecrit" style:font-pitch="variable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4:34:16.013000000</meta:creation-date>
    <dc:date>2020-11-15T21:31:30.913000000</dc:date>
    <meta:editing-duration>PT3M52S</meta:editing-duration>
    <meta:editing-cycles>2</meta:editing-cycles>
    <meta:generator>LibreOffice/6.2.3.2$Windows_X86_64 LibreOffice_project/aecc05fe267cc68dde00352a451aa867b3b546ac</meta:generator>
    <meta:document-statistic meta:table-count="1" meta:image-count="6" meta:object-count="2" meta:page-count="4" meta:paragraph-count="55" meta:word-count="456" meta:character-count="2352" meta:non-whitespace-character-count="1873"/>
  </office:meta>
</office:document-meta>
</file>

<file path=Object 1/content.xml><?xml version="1.0" encoding="utf-8"?>
<math xmlns="http://www.w3.org/1998/Math/MathML" display="block">
  <semantics>
    <mover accent="true">
      <mi mathvariant="italic">IJ</mi>
      <mo stretchy="false">^</mo>
    </mover>
    <annotation encoding="StarMath 5.0">hat IJ </annotation>
  </semantics>
</math>
</file>

<file path=Object 2/content.xml><?xml version="1.0" encoding="utf-8"?>
<math xmlns="http://www.w3.org/1998/Math/MathML" display="block">
  <semantics>
    <mover accent="true">
      <mi mathvariant="italic">IJ</mi>
      <mo stretchy="false">^</mo>
    </mover>
    <annotation encoding="StarMath 5.0">hat IJ </annotation>
  </semantics>
</math>
</file>