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600000046069744646F0E7A20.png" manifest:media-type="image/png"/>
  <manifest:file-entry manifest:full-path="Pictures/10000000000001C900000044D0A859543ADC23E3.png" manifest:media-type="image/png"/>
  <manifest:file-entry manifest:full-path="Pictures/10000000000001CB0000005EECD6DC7380EF43D4.png" manifest:media-type="image/png"/>
  <manifest:file-entry manifest:full-path="Pictures/10000000000001CF0000004EFB8C3A8DC323716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5.667cm" style:rel-column-width="21845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00eaa7" officeooo:paragraph-rsid="0000eaa7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01c07c" officeooo:paragraph-rsid="0001c07c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021eef" officeooo:paragraph-rsid="00021eef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021eef" officeooo:paragraph-rsid="0003fa65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03fa65" officeooo:paragraph-rsid="0003fa65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057039" officeooo:paragraph-rsid="00057039"/>
    </style:style>
    <style:style style:name="P8" style:family="paragraph" style:parent-style-name="Standard">
      <style:paragraph-properties fo:text-align="justify" style:justify-single-word="false"/>
      <style:text-properties style:font-name="OpenDyslexic" style:text-underline-style="solid" style:text-underline-width="auto" style:text-underline-color="font-color" officeooo:rsid="00057039" officeooo:paragraph-rsid="00057039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07f52f" officeooo:paragraph-rsid="0007f52f"/>
    </style:style>
    <style:style style:name="P10" style:family="paragraph" style:parent-style-name="Standard">
      <style:paragraph-properties fo:text-align="justify" style:justify-single-word="false"/>
      <style:text-properties style:font-name="OpenDyslexic" style:text-underline-style="solid" style:text-underline-width="auto" style:text-underline-color="font-color" officeooo:rsid="0007f52f" officeooo:paragraph-rsid="0007f52f"/>
    </style:style>
    <style:style style:name="P11" style:family="paragraph" style:parent-style-name="Standard">
      <style:text-properties style:font-name="OpenDyslexic" style:text-underline-style="solid" style:text-underline-width="auto" style:text-underline-color="font-color" officeooo:rsid="00086e70" officeooo:paragraph-rsid="00086e70"/>
    </style:style>
    <style:style style:name="P12" style:family="paragraph" style:parent-style-name="Standard">
      <style:text-properties style:font-name="OpenDyslexic" style:text-underline-style="solid" style:text-underline-width="auto" style:text-underline-color="font-color" officeooo:rsid="0009cd44" officeooo:paragraph-rsid="0009cd44"/>
    </style:style>
    <style:style style:name="P13" style:family="paragraph" style:parent-style-name="Standard">
      <style:text-properties style:font-name="OpenDyslexic" style:text-underline-style="solid" style:text-underline-width="auto" style:text-underline-color="font-color" officeooo:rsid="000b9e05" officeooo:paragraph-rsid="000b9e05"/>
    </style:style>
    <style:style style:name="P14" style:family="paragraph" style:parent-style-name="Standard">
      <style:text-properties style:font-name="OpenDyslexic" style:text-underline-style="solid" style:text-underline-width="auto" style:text-underline-color="font-color" officeooo:rsid="000d85ca" officeooo:paragraph-rsid="000d85ca"/>
    </style:style>
    <style:style style:name="P15" style:family="paragraph" style:parent-style-name="Standard">
      <style:text-properties style:font-name="OpenDyslexic" style:text-underline-style="solid" style:text-underline-width="auto" style:text-underline-color="font-color" officeooo:rsid="000edf4e" officeooo:paragraph-rsid="000edf4e"/>
    </style:style>
    <style:style style:name="P16" style:family="paragraph" style:parent-style-name="Standard">
      <style:text-properties style:font-name="OpenDyslexic" style:text-underline-style="solid" style:text-underline-width="auto" style:text-underline-color="font-color" officeooo:rsid="000f9f6e" officeooo:paragraph-rsid="000f9f6e"/>
    </style:style>
    <style:style style:name="P17" style:family="paragraph" style:parent-style-name="Standard">
      <style:text-properties style:font-name="OpenDyslexic" style:text-underline-style="solid" style:text-underline-width="auto" style:text-underline-color="font-color" officeooo:rsid="001067ba" officeooo:paragraph-rsid="001067ba"/>
    </style:style>
    <style:style style:name="P18" style:family="paragraph" style:parent-style-name="Standard">
      <style:paragraph-properties fo:text-align="justify" style:justify-single-word="false"/>
      <style:text-properties style:font-name="OpenDyslexic" style:text-underline-style="solid" style:text-underline-width="auto" style:text-underline-color="font-color" officeooo:rsid="001067ba" officeooo:paragraph-rsid="001067ba"/>
    </style:style>
    <style:style style:name="P19" style:family="paragraph" style:parent-style-name="Standard">
      <style:text-properties style:font-name="OpenDyslexic" style:text-underline-style="solid" style:text-underline-width="auto" style:text-underline-color="font-color" officeooo:rsid="00123636" officeooo:paragraph-rsid="00123636"/>
    </style:style>
    <style:style style:name="P20" style:family="paragraph" style:parent-style-name="Standard">
      <style:text-properties style:font-name="OpenDyslexic" style:text-underline-style="none" officeooo:rsid="00086e70" officeooo:paragraph-rsid="00086e70"/>
    </style:style>
    <style:style style:name="P21" style:family="paragraph" style:parent-style-name="Standard">
      <style:text-properties style:font-name="OpenDyslexic" style:text-underline-style="none" officeooo:rsid="00095271" officeooo:paragraph-rsid="00095271"/>
    </style:style>
    <style:style style:name="P22" style:family="paragraph" style:parent-style-name="Standard">
      <style:text-properties style:font-name="OpenDyslexic" style:text-underline-style="none" officeooo:rsid="0009cd44" officeooo:paragraph-rsid="0009cd44"/>
    </style:style>
    <style:style style:name="P23" style:family="paragraph" style:parent-style-name="Standard">
      <style:text-properties style:font-name="OpenDyslexic" style:text-underline-style="none" officeooo:rsid="000d85ca" officeooo:paragraph-rsid="000d85ca"/>
    </style:style>
    <style:style style:name="P24" style:family="paragraph" style:parent-style-name="Standard">
      <style:text-properties style:font-name="OpenDyslexic" style:text-underline-style="none" officeooo:rsid="000edf4e" officeooo:paragraph-rsid="000edf4e"/>
    </style:style>
    <style:style style:name="P25" style:family="paragraph" style:parent-style-name="Standard">
      <style:text-properties style:font-name="OpenDyslexic" style:text-underline-style="none" officeooo:rsid="000f655c" officeooo:paragraph-rsid="000f655c"/>
    </style:style>
    <style:style style:name="P26" style:family="paragraph" style:parent-style-name="Standard">
      <style:text-properties style:font-name="OpenDyslexic" style:text-underline-style="none" officeooo:rsid="000f9f6e" officeooo:paragraph-rsid="000f9f6e"/>
    </style:style>
    <style:style style:name="P27" style:family="paragraph" style:parent-style-name="Standard">
      <style:text-properties style:font-name="OpenDyslexic" style:text-underline-style="none" officeooo:rsid="001067ba" officeooo:paragraph-rsid="001067ba"/>
    </style:style>
    <style:style style:name="P28" style:family="paragraph" style:parent-style-name="Standard">
      <style:text-properties style:font-name="OpenDyslexic" style:text-underline-style="none" officeooo:rsid="00123636" officeooo:paragraph-rsid="00123636"/>
    </style:style>
    <style:style style:name="P29" style:family="paragraph" style:parent-style-name="Standard">
      <style:paragraph-properties fo:text-align="justify" style:justify-single-word="false"/>
      <style:text-properties style:font-name="OpenDyslexic" style:text-underline-style="none" officeooo:rsid="00123636" officeooo:paragraph-rsid="00123636"/>
    </style:style>
    <style:style style:name="P30" style:family="paragraph" style:parent-style-name="Table_20_Contents">
      <style:text-properties style:font-name="OpenDyslexic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OpenDyslexic"/>
    </style:style>
    <style:style style:name="P32" style:family="paragraph" style:parent-style-name="Table_20_Contents">
      <style:paragraph-properties fo:text-align="center" style:justify-single-word="false"/>
      <style:text-properties style:font-name="OpenDyslexic" officeooo:rsid="001067ba" officeooo:paragraph-rsid="001067ba"/>
    </style:style>
    <style:style style:name="P33" style:family="paragraph" style:parent-style-name="Table_20_Contents">
      <style:paragraph-properties fo:text-align="center" style:justify-single-word="false"/>
      <style:text-properties style:font-name="OpenDyslexic" officeooo:rsid="00123636" officeooo:paragraph-rsid="00123636"/>
    </style:style>
    <style:style style:name="P34" style:family="paragraph" style:parent-style-name="Table_20_Contents">
      <style:text-properties style:font-name="OpenDyslexic" officeooo:rsid="000692c1" officeooo:paragraph-rsid="0000eaa7"/>
    </style:style>
    <style:style style:name="P35" style:family="paragraph" style:parent-style-name="Text_20_body">
      <style:text-properties style:font-name="OpenDyslexic" fo:font-size="8pt" style:font-size-asian="8pt" style:font-size-complex="8pt"/>
    </style:style>
    <style:style style:name="T1" style:family="text">
      <style:text-properties officeooo:rsid="00183a5c"/>
    </style:style>
    <style:style style:name="T2" style:family="text">
      <style:text-properties officeooo:rsid="0000eaa7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1c07c"/>
    </style:style>
    <style:style style:name="T5" style:family="text">
      <style:text-properties style:text-underline-style="none" officeooo:rsid="0003fa65"/>
    </style:style>
    <style:style style:name="T6" style:family="text">
      <style:text-properties fo:font-weight="bold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edf4e" style:font-style-asian="normal" style:font-style-complex="normal"/>
    </style:style>
    <style:style style:name="T10" style:family="text">
      <style:text-properties fo:font-style="normal" officeooo:rsid="000f9f6e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07f52f" style:font-style-asian="normal" style:font-style-complex="normal"/>
    </style:style>
    <style:style style:name="T13" style:family="text">
      <style:text-properties fo:font-style="normal" style:text-underline-style="none" officeooo:rsid="000b9e05" style:font-style-asian="normal" style:font-style-complex="normal"/>
    </style:style>
    <style:style style:name="T14" style:family="text">
      <style:text-properties fo:font-style="normal" style:text-underline-style="none" officeooo:rsid="001345bb" style:font-style-asian="normal" style:font-style-complex="normal"/>
    </style:style>
    <style:style style:name="T15" style:family="text">
      <style:text-properties officeooo:rsid="001067ba"/>
    </style:style>
    <style:style style:name="T16" style:family="text">
      <style:text-properties style:text-position="super 58%" fo:font-style="normal" style:font-style-asian="normal" style:font-style-complex="normal"/>
    </style:style>
    <style:style style:name="T17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4">Collège <text:span text:style-name="T1">Amiral Lejeune</text:span> <text:s text:c="61"/><text:span text:style-name="T1">6</text:span>ème<text:line-break/><text:span text:style-name="T2">Exercices</text:span> <text:s text:c="18"/>Chapitre 1 : <text:span text:style-name="T1">Nombres Entiers</text:span></text:p>
          </table:table-cell>
        </table:table-row>
      </table:table>
      <text:p text:style-name="P1"/>
      <text:p text:style-name="P2">Exercice 1 :</text:p>
      <text:p text:style-name="P2"><text:span text:style-name="T3">Écris les nombres suivants en respectant les espaces entre les classes.</text:span></text:p>
      <text:p text:style-name="P2"><text:span text:style-name="T3"/></text:p>
      <text:p text:style-name="P2"><text:span text:style-name="T3">a. 2514<text:tab/><text:tab/><text:tab/><text:tab/>b. <text:s/>20135 <text:tab/><text:tab/><text:tab/><text:tab/><text:tab/>c. 180208</text:span></text:p>
      <text:p text:style-name="P2"><text:span text:style-name="T3"/></text:p>
      <text:p text:style-name="P2"><text:span text:style-name="T3">d. 1453346<text:tab/><text:tab/><text:tab/><text:tab/>e. 50070572<text:tab/><text:tab/><text:tab/><text:tab/>f. 957841253</text:span><text:span text:style-name="T4">5</text:span></text:p>
      <text:p text:style-name="P2"><text:span text:style-name="T4"/></text:p>
      <text:p text:style-name="P3">Exercice 2 :<text:line-break/><text:span text:style-name="T3">Écris en chiffres les nombres suivants.</text:span></text:p>
      <text:p text:style-name="P3"><text:span text:style-name="T3">a. Quatre-vingt-trois-mille-neuf-cent-cinquante ;</text:span></text:p>
      <text:p text:style-name="P3"><text:span text:style-name="T3">b. Huit-millions-trois-cent-mille-cinq-cents ;</text:span></text:p>
      <text:p text:style-name="P3"><text:span text:style-name="T3">c. Cent-trente-six-millions-huit-cent-quatre-vingt-treize-mille-sept-cent-cinquante-cinq ;</text:span></text:p>
      <text:p text:style-name="P3"><text:span text:style-name="T3">d. Neuf-milliards-cent-neuf-millions-trois-cent-douze-mille-quatre-cent-vingt-sept.</text:span></text:p>
      <text:p text:style-name="P3"><text:span text:style-name="T3"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5">20 et 100 s'accordent quand ils sont multipliés par un nombre <text:span text:style-name="T6">sans être suivis</text:span> par un autre nombre.</text:p>
            <text:p text:style-name="P35">* quatre-vingts<text:line-break/>* quatre-vingt-trois<text:line-break/>* quatre cents<text:line-break/>* quatre cent vingt et un </text:p>
            <text:p text:style-name="P35"><text:span text:style-name="T6">Mille</text:span> est toujours invariable</text:p>
            <text:p text:style-name="P35">* trois mille<text:line-break/>* dix mille deux </text:p>
            <text:p text:style-name="P35">un est invariable en nombre mais pas en genre :</text:p>
            <text:p text:style-name="P35">* cinquante et une pages </text:p>
            <text:p text:style-name="P35"><text:span text:style-name="T6">Millier, million et milliard</text:span> sont des noms et non des adjectifs. Ils ne font pas vraiment partie du nombre et laissent place à l'accord : </text:p>
            <text:p text:style-name="P35">* quatre cents millions<text:line-break/>* deux cent mille<text:line-break/>* deux cents milliers </text:p>
            <text:p text:style-name="P30"/>
          </table:table-cell>
        </table:table-row>
      </table:table>
      <text:p text:style-name="P4"><text:soft-page-break/>Exercice 3 :</text:p>
      <text:p text:style-name="P5"><text:span text:style-name="T3">Écris en toutes lettres les nombres </text:span><text:span text:style-name="T5">suivants.</text:span></text:p>
      <text:p text:style-name="P5"><text:span text:style-name="T5">a. 1 096<text:tab/><text:tab/><text:tab/>b. 5 893</text:span><text:span text:style-name="T3"> <text:tab/><text:tab/><text:tab/></text:span><text:span text:style-name="T5">c. 13 184</text:span></text:p>
      <text:p text:style-name="P6"><text:span text:style-name="T3">d. 70 000 000 <text:s text:c="10"/>e. 1 219 275 200 <text:s text:c="8"/>f. 132 854 780</text:span></text:p>
      <text:p text:style-name="P6"><text:span text:style-name="T3"/></text:p>
      <text:p text:style-name="P6">Exercice 4 :</text:p>
      <text:p text:style-name="P7"><text:span text:style-name="T3">Recopie le texte suivant sur ton cahier, en écrivant chaque nombre en toutes lettres.</text:span></text:p>
      <text:p text:style-name="P8"><text:span text:style-name="T3">«</text:span><text:span text:style-name="T7">En 1953, Edmond Hillary, alors âgé de 34 ans est le premier alpiniste à parvenir au sommet de l’Everest.</text:span></text:p>
      <text:p text:style-name="P8"><text:span text:style-name="T7">L’altitude de ce sommet est établie à 8 848 m. L’Everest est un des sommets de l’Himalata, chaîne de montagne dont la superficie est de 600 000 km². »</text:span></text:p>
      <text:p text:style-name="P7"><text:span text:style-name="T11"/></text:p>
      <text:section text:style-name="Sect1" text:name="Section1">
        <text:p text:style-name="P7"><text:span text:style-name="T8">Exercice 5 :</text:span></text:p>
        <text:p text:style-name="P7"><text:span text:style-name="T11">Pour le nombre 234 591 687, quel est…</text:span></text:p>
        <text:p text:style-name="P7"><text:span text:style-name="T11">a. le chiffre des centaines de mille ?</text:span></text:p>
        <text:p text:style-name="P7"><text:span text:style-name="T11">b. le chiffre des unités ?</text:span></text:p>
        <text:p text:style-name="P7"><text:span text:style-name="T11">c. le chiffre des dizaines de millions ?</text:span></text:p>
        <text:p text:style-name="P7"><text:span text:style-name="T11">d. le chiffre des centaines de millions ?</text:span></text:p>
        <text:p text:style-name="P7"/>
        <text:p text:style-name="P7"><text:span text:style-name="T8">Exercice 6 :</text:span></text:p>
        <text:p text:style-name="P7"><text:span text:style-name="T11">Pour le nombre 9 345 762, quel est …</text:span></text:p>
        <text:p text:style-name="P7"><text:span text:style-name="T11">a. le chiffre des unités de mille ?</text:span></text:p>
        <text:p text:style-name="P7"><text:span text:style-name="T11">b. </text:span><text:span text:style-name="T12">le nombre d’unités de mille ?</text:span></text:p>
        <text:p text:style-name="P9"><text:span text:style-name="T11">c. le chiffre des centaines de mille ?</text:span></text:p>
        <text:p text:style-name="P9"><text:span text:style-name="T11">d. le nombre de centaines ?</text:span></text:p>
        <text:p text:style-name="P9"><text:span text:style-name="T11"/></text:p>
        <text:p text:style-name="P9"><text:span text:style-name="T8">Exercice 7 :</text:span></text:p>
        <text:p text:style-name="P9"><text:span text:style-name="T11">a. 15 dizaines et 9 unités ;</text:span></text:p>
        <text:p text:style-name="P9"><text:span text:style-name="T11">b. 12 centaines et 23 dizaines ;</text:span></text:p>
        <text:p text:style-name="P9"><text:span text:style-name="T11">c. 15 milliers et 1234 unités ;</text:span></text:p>
        <text:p text:style-name="P9"><text:span text:style-name="T11">d. 2 millions d’unités et 2 millions de centaines.</text:span></text:p>
        <text:p text:style-name="P9"><text:span text:style-name="T11"/></text:p>
        <text:p text:style-name="P10"><text:span text:style-name="T8">Exercice 8 :</text:span><text:span text:style-name="T11"> Je suis un nombre strictement inférieur à 1 000. La somme de mes chiffres est 21. Mon chiffre des unités est le double de mon chiffre des centaines. Qui suis-je ? </text:span></text:p>
      </text:section>
      <text:p text:style-name="P9"><text:span text:style-name="T11"/></text:p>
      <text:p text:style-name="P11"><text:span text:style-name="T8">Exercice 9 :</text:span></text:p>
      <text:p text:style-name="P20"><text:span text:style-name="T8">Recopie et complète toutes les graduations des axes c-dessous.</text:span></text:p>
      <text:p text:style-name="P21"><text:soft-page-break/><text:span text:style-name="T8">a.</text:span></text:p>
      <text:p text:style-name="P21"><draw:frame draw:style-name="fr1" draw:name="Image1" text:anchor-type="paragraph" svg:x="0.642cm" svg:y="0.132cm" svg:width="13.111cm" svg:height="1.852cm" draw:z-index="0"><draw:image xlink:href="Pictures/10000000000001C600000046069744646F0E7A20.png" xlink:type="simple" xlink:show="embed" xlink:actuate="onLoad" loext:mime-type="image/png"/></draw:frame><text:span text:style-name="T8"/></text:p>
      <text:p text:style-name="P21"><text:span text:style-name="T8"/></text:p>
      <text:p text:style-name="P21"><text:span text:style-name="T8"/></text:p>
      <text:p text:style-name="P21"><text:span text:style-name="T8">b.</text:span></text:p>
      <text:p text:style-name="P21"><draw:frame draw:style-name="fr1" draw:name="Image2" text:anchor-type="paragraph" svg:x="0.654cm" svg:y="0.265cm" svg:width="13.125cm" svg:height="2.487cm" draw:z-index="1"><draw:image xlink:href="Pictures/10000000000001CB0000005EECD6DC7380EF43D4.png" xlink:type="simple" xlink:show="embed" xlink:actuate="onLoad" loext:mime-type="image/png"/></draw:frame><text:span text:style-name="T8"/></text:p>
      <text:p text:style-name="P21"><text:span text:style-name="T8"/></text:p>
      <text:p text:style-name="P21"><text:span text:style-name="T8"/></text:p>
      <text:p text:style-name="P21"><text:span text:style-name="T8"/></text:p>
      <text:p text:style-name="P21"><text:span text:style-name="T8">c.</text:span></text:p>
      <text:p text:style-name="P21"><draw:frame draw:style-name="fr1" draw:name="Image3" text:anchor-type="paragraph" svg:x="0.206cm" svg:y="0.582cm" svg:width="13.547cm" svg:height="2.064cm" draw:z-index="2"><draw:image xlink:href="Pictures/10000000000001CF0000004EFB8C3A8DC323716A.png" xlink:type="simple" xlink:show="embed" xlink:actuate="onLoad" loext:mime-type="image/png"/></draw:frame><text:span text:style-name="T8"/></text:p>
      <text:p text:style-name="P21"><text:span text:style-name="T8"/></text:p>
      <text:p text:style-name="P21"><text:span text:style-name="T8"/></text:p>
      <text:p text:style-name="P21"><text:span text:style-name="T8"/></text:p>
      <text:p text:style-name="P21"><text:span text:style-name="T8">d.</text:span></text:p>
      <text:p text:style-name="P21"><draw:frame draw:style-name="fr1" draw:name="Image4" text:anchor-type="paragraph" svg:x="0.074cm" svg:y="0.159cm" svg:width="13.52cm" svg:height="1.799cm" draw:z-index="3"><draw:image xlink:href="Pictures/10000000000001C900000044D0A859543ADC23E3.png" xlink:type="simple" xlink:show="embed" xlink:actuate="onLoad" loext:mime-type="image/png"/></draw:frame><text:span text:style-name="T8"/></text:p>
      <text:p text:style-name="P21"><text:span text:style-name="T8"/></text:p>
      <text:p text:style-name="P21"><text:span text:style-name="T8"/></text:p>
      <text:p text:style-name="P22"><text:span text:style-name="T8">e. Puis placer sur l’axe gradué a) les points suivants : 90 ;140 ; 360.</text:span></text:p>
      <text:p text:style-name="P22"><text:span text:style-name="T8">f. Placer sur l’axe gradué b) les points suivants : 12; 13 ; 15.</text:span></text:p>
      <text:p text:style-name="P22"><text:span text:style-name="T8"/></text:p>
      <text:p text:style-name="P12"><text:span text:style-name="T8">Exercice 10 :</text:span><text:span text:style-name="T11"> Faire à la maison</text:span></text:p>
      <text:p text:style-name="P12"><text:span text:style-name="T11">Construis une frise chronologique d’origine 0, en prenant 1cm pour 100 ans.</text:span></text:p>
      <text:p text:style-name="P12"><text:span text:style-name="T11">a. Recherche puis place le plus précisément possible les dates des événements suivants.</text:span></text:p>
      <text:p text:style-name="P12"><text:span text:style-name="T11">A : N</text:span><text:span text:style-name="T13">aissance de </text:span><text:span text:style-name="T14">Clara Wieck</text:span></text:p>
      <text:p text:style-name="P13"><text:span text:style-name="T11">B : Mort de C</text:span><text:span text:style-name="T14">atherine de Medicis</text:span></text:p>
      <text:p text:style-name="P13"><text:span text:style-name="T11">C : Bataille de Marignan</text:span></text:p>
      <text:p text:style-name="P13"><text:span text:style-name="T11">D : Fin de l’empire romain</text:span></text:p>
      <text:p text:style-name="P13"><text:span text:style-name="T11">E : </text:span><text:span text:style-name="T14">Chute du mur de Berlin</text:span></text:p>
      <text:p text:style-name="P13"><text:span text:style-name="T11">b. Range ces dates dans l’ordre croissant.</text:span></text:p>
      <text:p text:style-name="P13"><text:span text:style-name="T11"/></text:p>
      <text:p text:style-name="P13"><text:span text:style-name="T11"/></text:p>
      <text:p text:style-name="P13"><text:soft-page-break/><text:span text:style-name="T8">Exercice 11 :</text:span></text:p>
      <text:p text:style-name="P13"><text:span text:style-name="T11">Complète avec : &lt; (plus petit que), &gt; (plus grand que) ou =.</text:span></text:p>
      <text:p text:style-name="P13"><text:span text:style-name="T11">a. 25 …. 14 <text:s text:c="11"/>b. 0 …. 43 <text:s text:c="9"/>c. 0765 …. 765 <text:s text:c="12"/>d. 547 …. 745 <text:s text:c="2"/></text:span></text:p>
      <text:p text:style-name="P13"><text:span text:style-name="T11"/></text:p>
      <text:p text:style-name="P13"><text:span text:style-name="T11">e. 997 ….. 1 001 <text:s text:c="11"/>f. 9 909 ….. 9 099 <text:s text:c="13"/>g. <text:s/>136754 ….. 256231</text:span></text:p>
      <text:p text:style-name="P22"><text:span text:style-name="T8"/></text:p>
      <text:p text:style-name="P13"><text:span text:style-name="T8">Exercice 12 :</text:span></text:p>
      <text:p text:style-name="P23"><text:span text:style-name="T8">Trouve chacun des nombres ci-dessous.</text:span></text:p>
      <text:p text:style-name="P23"><text:span text:style-name="T8">a. Je suis le plus petit nombre de quatre chiffres différents non nuls.</text:span></text:p>
      <text:p text:style-name="P23"><text:span text:style-name="T8">b. Je suis le plus grand entier strictement inférieur à 1 000 dizaines.</text:span></text:p>
      <text:p text:style-name="P23"><text:span text:style-name="T8">c. Je suis le plus grand nombre pair strictement inférieur à un million.</text:span></text:p>
      <text:p text:style-name="P23"><text:span text:style-name="T8"/></text:p>
      <text:p text:style-name="P14"><text:span text:style-name="T8">Exercice 13 :</text:span></text:p>
      <text:p text:style-name="P23"><text:span text:style-name="T8">On considère l’opération 396+438.</text:span></text:p>
      <text:p text:style-name="P23"><text:span text:style-name="T8">a. Décompose chaque nombre sous la forme :</text:span></text:p>
      <text:p text:style-name="P23"><text:span text:style-name="T8">…. centaines + …. dizaines + … </text:span><text:span text:style-name="T9">unités puis aide-toi de cette décomposition pour trouver le résultat de l’addition.</text:span></text:p>
      <text:p text:style-name="P24"><text:span text:style-name="T8">b. Arnaud remarque que 396=400-4. En quoi cela aide-t-il à calculer de tête ?</text:span></text:p>
      <text:p text:style-name="P24"><text:span text:style-name="T8"/></text:p>
      <text:p text:style-name="P15"><text:span text:style-name="T8">Exercice 14 :</text:span></text:p>
      <text:p text:style-name="P25"><text:span text:style-name="T8">Pose et effectue les additions suivantes.</text:span></text:p>
      <text:p text:style-name="P25"><text:span text:style-name="T8">a. 549 + 892 <text:s text:c="34"/>b. 13 184 + 39</text:span></text:p>
      <text:p text:style-name="P25"><text:span text:style-name="T8">c. 54 + 799 + 238 <text:s text:c="27"/>d. 1 084 </text:span><text:span text:style-name="T10">+ 39 + 2 508</text:span></text:p>
      <text:p text:style-name="P26"><text:span text:style-name="T8">e. 55 057 + 6 995 <text:s text:c="28"/>f. 987 + 98 + 7</text:span></text:p>
      <text:p text:style-name="P26"><text:span text:style-name="T8">g. 1 005 987 + 3 998 <text:s text:c="23"/>h. 999 875 + 100 057</text:span></text:p>
      <text:p text:style-name="P26"><text:span text:style-name="T8"/></text:p>
      <text:p text:style-name="P16"><text:span text:style-name="T8">Exercice 15 :</text:span></text:p>
      <text:p text:style-name="P16"><text:span text:style-name="T11">Effectue les opérations suivantes.</text:span></text:p>
      <text:p text:style-name="P16"><text:span text:style-name="T11">a. La somme de douze-mille-neuf-cent-trente-quatre et de quatre-millions-dix-sept.</text:span></text:p>
      <text:p text:style-name="P16"><text:span text:style-name="T11">b. La somme de neuf-mille-trente-trois et de trente-deux centaines.</text:span></text:p>
      <text:p text:style-name="P16"><text:span text:style-name="T11">c. La somme de soixante-trois centaines et de quinze milliers.</text:span></text:p>
      <text:p text:style-name="P16"><text:span text:style-name="T11"/></text:p>
      <text:p text:style-name="P16"><text:soft-page-break/><text:span text:style-name="T8">Exercice 15 :</text:span></text:p>
      <text:p text:style-name="P27"><text:span text:style-name="T8">Quel nombre doi-on ajouter aux nombres suivants pour obtenir cent-mille ?</text:span></text:p>
      <text:p text:style-name="P27"><text:span text:style-name="T8">a. 98 000 <text:s text:c="3"/>b. Cinquante-trois-mille <text:s text:c="2"/>c. Quatre-vingt-douze <text:s text:c="2"/>d. 7 centaines</text:span></text:p>
      <text:p text:style-name="P27"><text:span text:style-name="T8"/></text:p>
      <text:p text:style-name="P17"><text:span text:style-name="T8">Exercice 16 :</text:span></text:p>
      <text:p text:style-name="P27"><text:span text:style-name="T8">Pose et effectue les soustractions suivantes :</text:span></text:p>
      <text:p text:style-name="P27"><text:span text:style-name="T8">a. 997 – 892 <text:s text:c="2"/>b. 1 000 878 – 558 001 <text:s text:c="2"/>c. 6 589 – 29 <text:s/>d. 7 011 000 – 11 700</text:span></text:p>
      <text:p text:style-name="P27"><text:span text:style-name="T8"/></text:p>
      <text:p text:style-name="P17"><text:span text:style-name="T8">Exercice 17 :</text:span></text:p>
      <text:p text:style-name="P17"><text:span text:style-name="T11">Complète les opérations à trou suivantes.</text:span></text:p>
      <text:p text:style-name="P17"><text:span text:style-name="T11">a. 78 + … = 345 <text:s text:c="11"/>b. … + 199 = 238 <text:s text:c="12"/>c. … + 14 + 39 = 555 <text:s/></text:span></text:p>
      <text:p text:style-name="P17"><text:span text:style-name="T11">d. 76 + … + 24 = 658</text:span></text:p>
      <text:p text:style-name="P17"><text:span text:style-name="T11"/></text:p>
      <text:p text:style-name="P17"><text:span text:style-name="T8">Exercice 18 :</text:span></text:p>
      <text:p text:style-name="P18"><text:span text:style-name="T11">Luc résout des petits problèmes mais il se retrouve avec plusieurs solutions à chaque fois. Aide-le à choisir la solution la plus plausible.</text:span></text:p>
      <text:p text:style-name="P17"><text:span text:style-name="T11"/></text:p>
      <text:p text:style-name="P17"><text:span text:style-name="T11">a. Le score d’un candidat qui a gagné l’élection :</text:span>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32">5 %</text:p>
          </table:table-cell>
          <table:table-cell table:style-name="Tableau3.A1" office:value-type="string">
            <text:p text:style-name="P31">1<text:span text:style-name="T15">03 %</text:span></text:p>
          </table:table-cell>
          <table:table-cell table:style-name="Tableau3.C1" office:value-type="string">
            <text:p text:style-name="P31">5<text:span text:style-name="T15">5 %</text:span></text:p>
          </table:table-cell>
        </table:table-row>
      </table:table>
      <text:p text:style-name="P17"><text:span text:style-name="T11">b. La hauteur d’une maison :</text:span>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32">1m</text:p>
          </table:table-cell>
          <table:table-cell table:style-name="Tableau4.A1" office:value-type="string">
            <text:p text:style-name="P32">7m</text:p>
          </table:table-cell>
          <table:table-cell table:style-name="Tableau4.C1" office:value-type="string">
            <text:p text:style-name="P32">27m</text:p>
          </table:table-cell>
        </table:table-row>
      </table:table>
      <text:p text:style-name="P17"><text:span text:style-name="T11">c. La durée d’un film :</text:span></text:p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32">108 min</text:p>
          </table:table-cell>
          <table:table-cell table:style-name="Tableau5.A1" office:value-type="string">
            <text:p text:style-name="P32">360 min</text:p>
          </table:table-cell>
          <table:table-cell table:style-name="Tableau5.C1" office:value-type="string">
            <text:p text:style-name="P32">504 min</text:p>
          </table:table-cell>
        </table:table-row>
      </table:table>
      <text:p text:style-name="P17"><text:span text:style-name="T11">d. La masse d’un cheval :</text:span></text:p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32">670 kg</text:p>
          </table:table-cell>
          <table:table-cell table:style-name="Tableau6.A1" office:value-type="string">
            <text:p text:style-name="P32">670 g</text:p>
          </table:table-cell>
          <table:table-cell table:style-name="Tableau6.C1" office:value-type="string">
            <text:p text:style-name="P32">670 hg</text:p>
          </table:table-cell>
        </table:table-row>
      </table:table>
      <text:p text:style-name="P19"><text:span text:style-name="T11">e. La longueur d’une table :</text:span></text:p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33">2 500 mm</text:p>
          </table:table-cell>
          <table:table-cell table:style-name="Tableau7.A1" office:value-type="string">
            <text:p text:style-name="P33">2 500 dm</text:p>
          </table:table-cell>
          <table:table-cell table:style-name="Tableau7.C1" office:value-type="string">
            <text:p text:style-name="P33">2 500 cm</text:p>
          </table:table-cell>
        </table:table-row>
      </table:table>
      <text:p text:style-name="P19"><text:span text:style-name="T11">f. Le prix d’une maison :</text:span></text:p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p text:style-name="P33">5 300 €</text:p>
          </table:table-cell>
          <table:table-cell table:style-name="Tableau8.A1" office:value-type="string">
            <text:p text:style-name="P33">205 000 €</text:p>
          </table:table-cell>
          <table:table-cell table:style-name="Tableau8.C1" office:value-type="string">
            <text:p text:style-name="P33">34 500 000 €</text:p>
          </table:table-cell>
        </table:table-row>
      </table:table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oft-page-break/><text:span text:style-name="T8">Exercice 19 :</text:span></text:p>
      <text:p text:style-name="P29"><text:span text:style-name="T8">Le point culminant de la Tour Eiffel est à 324 m de haut. Le 1</text:span><text:span text:style-name="T16">er</text:span><text:span text:style-name="T8"> étage est 266 m plus bas. Le 2</text:span><text:span text:style-name="T16">e</text:span><text:span text:style-name="T8"> étage est 58 m plus haut que le 1</text:span><text:span text:style-name="T16">er</text:span><text:span text:style-name="T8"> étage. Le 3</text:span><text:span text:style-name="T16">e</text:span><text:span text:style-name="T8"> étage est à 276 m de haut.</text:span></text:p>
      <text:p text:style-name="P28"><text:span text:style-name="T8">a. Quelle est la hauteur du 1</text:span><text:span text:style-name="T16">er</text:span><text:span text:style-name="T8"> étage ?</text:span></text:p>
      <text:p text:style-name="P28"><text:span text:style-name="T8">b. Quelle est la hauteur du 2</text:span><text:span text:style-name="T16">e</text:span><text:span text:style-name="T8"> étage ?</text:span></text:p>
      <text:p text:style-name="P28"><text:span text:style-name="T8">c. Quelle distance sépare le 3</text:span><text:span text:style-name="T16">e</text:span><text:span text:style-name="T8"> étage du point culminant ?</text:span></text:p>
      <text:p text:style-name="P28"><text:span text:style-name="T8"/></text:p>
      <text:p text:style-name="P19"><text:span text:style-name="T8">Exercice 20 :</text:span></text:p>
      <text:p text:style-name="P28"><text:span text:style-name="T8">Pour chacune des affirmations, dis si elle est vraie ou fausse. Si elle est fausse, corrige-la.</text:span></text:p>
      <text:p text:style-name="P28"><text:span text:style-name="T8">a. Il existe cinq nombres à deux chiffres dont la somme est égale à cinq.</text:span></text:p>
      <text:p text:style-name="P28"><text:span text:style-name="T8">b. Dans le nombre trois-millions-trois-cent-trois-mille-trois, le chiffre des milliers et le chiffre des millions sont identiques.</text:span></text:p>
      <text:p text:style-name="P28"><text:span text:style-name="T8">c. Dans 1 650 352, il y a 165 milliers.</text:span></text:p>
      <text:p text:style-name="P28"><text:span text:style-name="T8">d. Un-milliard vaut 1 000 millions.</text:span></text:p>
      <text:p text:style-name="P28"><text:span text:style-name="T8">e. 15 centaines + 13 dizaines = 1 513 dizai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15:07:21.684000000</meta:creation-date>
    <dc:date>2020-09-06T18:59:26.333000000</dc:date>
    <meta:editing-duration>PT6M21S</meta:editing-duration>
    <meta:editing-cycles>1</meta:editing-cycles>
    <meta:document-statistic meta:table-count="8" meta:image-count="4" meta:object-count="0" meta:page-count="6" meta:paragraph-count="134" meta:word-count="1092" meta:character-count="5922" meta:non-whitespace-character-count="4630"/>
    <meta:generator>LibreOffice/6.2.3.2$Windows_X86_64 LibreOffice_project/aecc05fe267cc68dde00352a451aa867b3b546ac</meta:generator>
  </office:meta>
</office:document-meta>
</file>