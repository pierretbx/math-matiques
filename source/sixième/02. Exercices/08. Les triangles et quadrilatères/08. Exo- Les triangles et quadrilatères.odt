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F000001D6D49F2297F6850464.png" manifest:media-type="image/png"/>
  <manifest:file-entry manifest:full-path="Pictures/10000000000000DC000000DF806C796BB6DDED3A.png" manifest:media-type="image/png"/>
  <manifest:file-entry manifest:full-path="Pictures/10000000000002AC000000BB546962FE23CDEBBE.png" manifest:media-type="image/png"/>
  <manifest:file-entry manifest:full-path="Pictures/10000000000001060000014100405B868538A0C0.png" manifest:media-type="image/png"/>
  <manifest:file-entry manifest:full-path="Pictures/10000000000001EE000000F73D010EE928CE5CCB.png" manifest:media-type="image/png"/>
  <manifest:file-entry manifest:full-path="Pictures/10000000000001C7000001BE9EFCD219BF5C0712.png" manifest:media-type="image/png"/>
  <manifest:file-entry manifest:full-path="Pictures/10000000000002AF00000219CC71BCD901911B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2c762" officeooo:paragraph-rsid="0012c762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46b44" officeooo:paragraph-rsid="00146b44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59aaf" officeooo:paragraph-rsid="00159aaf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70ff1" officeooo:paragraph-rsid="00170ff1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8e50a" officeooo:paragraph-rsid="0018e50a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a5597" officeooo:paragraph-rsid="001a5597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af81f" officeooo:paragraph-rsid="001af81f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1d5827" officeooo:paragraph-rsid="001d5827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1e692d" officeooo:paragraph-rsid="001e692d"/>
    </style:style>
    <style:style style:name="P11" style:family="paragraph" style:parent-style-name="Standard">
      <style:text-properties style:font-name="OpenDyslexic" style:text-underline-style="none" officeooo:rsid="0012c762" officeooo:paragraph-rsid="0012c762"/>
    </style:style>
    <style:style style:name="P12" style:family="paragraph" style:parent-style-name="Standard">
      <style:text-properties style:font-name="OpenDyslexic" style:text-underline-style="none" officeooo:rsid="00146b44" officeooo:paragraph-rsid="00146b44"/>
    </style:style>
    <style:style style:name="P13" style:family="paragraph" style:parent-style-name="Standard">
      <style:text-properties style:font-name="OpenDyslexic" style:text-underline-style="none" officeooo:rsid="00159aaf" officeooo:paragraph-rsid="00159aaf"/>
    </style:style>
    <style:style style:name="P14" style:family="paragraph" style:parent-style-name="Standard">
      <style:text-properties style:font-name="OpenDyslexic" style:text-underline-style="none" officeooo:rsid="00170ff1" officeooo:paragraph-rsid="00170ff1"/>
    </style:style>
    <style:style style:name="P15" style:family="paragraph" style:parent-style-name="Standard">
      <style:text-properties style:font-name="OpenDyslexic" style:text-underline-style="none" officeooo:rsid="0018e50a" officeooo:paragraph-rsid="0018e50a"/>
    </style:style>
    <style:style style:name="P16" style:family="paragraph" style:parent-style-name="Standard">
      <style:text-properties style:font-name="OpenDyslexic" style:text-underline-style="none" officeooo:rsid="001a5597" officeooo:paragraph-rsid="001a5597"/>
    </style:style>
    <style:style style:name="P17" style:family="paragraph" style:parent-style-name="Standard">
      <style:text-properties style:font-name="OpenDyslexic" style:text-underline-style="none" officeooo:rsid="001af81f" officeooo:paragraph-rsid="001af81f"/>
    </style:style>
    <style:style style:name="P18" style:family="paragraph" style:parent-style-name="Standard">
      <style:text-properties style:font-name="OpenDyslexic" style:text-underline-style="none" officeooo:rsid="001c35be" officeooo:paragraph-rsid="001c35be"/>
    </style:style>
    <style:style style:name="P19" style:family="paragraph" style:parent-style-name="Standard">
      <style:text-properties style:font-name="OpenDyslexic" style:text-underline-style="none" officeooo:rsid="001d5827" officeooo:paragraph-rsid="001d5827"/>
    </style:style>
    <style:style style:name="P20" style:family="paragraph" style:parent-style-name="Standard">
      <style:text-properties style:font-name="OpenDyslexic" style:text-underline-style="none" officeooo:rsid="001e692d" officeooo:paragraph-rsid="001e692d"/>
    </style:style>
    <style:style style:name="P21" style:family="paragraph" style:parent-style-name="Table_20_Contents">
      <style:text-properties style:font-name="OpenDyslexic" officeooo:rsid="0012c762" officeooo:paragraph-rsid="0012c762"/>
    </style:style>
    <style:style style:name="T1" style:family="text">
      <style:text-properties officeooo:rsid="00146b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Collège A.LEJEUNE <text:s text:c="65"/>6ème</text:p>
            <text:p text:style-name="P21">Exercices <text:s text:c="17"/>Chapitre 8 : Triangles et quadrilatères</text:p>
          </table:table-cell>
        </table:table-row>
      </table:table>
      <text:p text:style-name="P1"/>
      <text:p text:style-name="P1"/>
      <text:p text:style-name="P2">Exercice 1 :</text:p>
      <text:p text:style-name="P11">Sur la figure ci-dessous, les cercles ont pour centres O et B, et pour rayon 4 cm.</text:p>
      <text:p text:style-name="P11"><draw:frame draw:style-name="fr1" draw:name="Image1" text:anchor-type="paragraph" svg:width="17cm" svg:height="11.113cm" draw:z-index="0"><draw:image xlink:href="Pictures/10000000000002CF000001D6D49F2297F6850464.png" xlink:type="simple" xlink:show="embed" xlink:actuate="onLoad" loext:mime-type="image/png"/></draw:frame>1. Trace en rouge les segments [OC],[OD] et [CD].</text:p>
      <text:p text:style-name="P11">Comment s’appelle la figure obtenue ?</text:p>
      <text:p text:style-name="P11">Pour cette figure, comment s’appellent les points O,C et D ?</text:p>
      <text:p text:style-name="P11">2. Trace en bleu le triangle EFG et en vert le triangle OAB.</text:p>
      <text:p text:style-name="P11">3. Que peux-tu dire des côtés du triangle OCD ? Comment s’appelle un tel triangle ?</text:p>
      <text:p text:style-name="P11">4. Que peux-tu dire des côtés du triangle EFG ? Comment s’appelle un tel triangle ?</text:p>
      <text:p text:style-name="P11">5. Que peux-tu dire des côtés du triangle OAB ? Comment s’appelle un tel triangle ?</text:p>
      <text:p text:style-name="P2"/>
      <text:p text:style-name="P2"/>
      <text:p text:style-name="P2"><text:soft-page-break/>Exercice 2 :</text:p>
      <text:p text:style-name="P11">Complète les phrases en utilisant les mots : « côté », « sommet », « triangle » et « opposé ».</text:p>
      <text:p text:style-name="P11"><draw:frame draw:style-name="fr2" draw:name="Image2" text:anchor-type="paragraph" svg:x="-1.764cm" svg:y="0.159cm" svg:width="4.777cm" svg:height="4.842cm" draw:z-index="1"><draw:image xlink:href="Pictures/10000000000000DC000000DF806C796BB6DDED3A.png" xlink:type="simple" xlink:show="embed" xlink:actuate="onLoad" loext:mime-type="image/png"/></draw:frame><text:s/><text:span text:style-name="T1">a. ABC est un ……………………….</text:span></text:p>
      <text:p text:style-name="P11"/>
      <text:p text:style-name="P12">b. [AB] est un ……………………….</text:p>
      <text:p text:style-name="P12"/>
      <text:p text:style-name="P12">c. C est un …………………………..</text:p>
      <text:p text:style-name="P12"/>
      <text:p text:style-name="P12">d. [BC] est le ……….. <text:s text:c="2"/>…………. au ……………….. A.</text:p>
      <text:p text:style-name="P12"/>
      <text:p text:style-name="P12">e. B est le ………………….. <text:s text:c="3"/>………………… au …………………. [AC].</text:p>
      <text:p text:style-name="P12"/>
      <text:p text:style-name="P3">Exercice 3 :</text:p>
      <text:p text:style-name="P12">Pour chaque question, dessine une figure à main levée puis une autre en vraie grandeur.</text:p>
      <text:p text:style-name="P12">a. Construis un triangle ABC tel que : AB= 5,5 cm ; AC= 4cm et BC=2 cm.</text:p>
      <text:p text:style-name="P12"/>
      <text:p text:style-name="P12">b. Construis un triangle DEF tel que : DE= 3 cm ; DF= 7cm et EF= 5 cm.</text:p>
      <text:p text:style-name="P12"/>
      <text:p text:style-name="P12">c. Construis un triangle GHI tel que : HI = 5,8 cm ; IG= 3,3 cm et GH= 4,6 cm.</text:p>
      <text:p text:style-name="P4">Exercice 4 :</text:p>
      <text:p text:style-name="P13">a. Trace un segment [AB] tel que AB=10 cm.</text:p>
      <text:p text:style-name="P13">b. Trace le cercle de centre A et de rayon 7 cm et le cercle de centre B et de rayon 12cm.</text:p>
      <text:p text:style-name="P13">c. Combien y a-t-il d’emplacements différents pour un point C tel que le triangle ABC ait pour dimensions : AB= 10 cm, AC=7 cm et BC= 12 cm ? Justifie.</text:p>
      <text:p text:style-name="P13">d. Reprends les questions précédentes avec AB=20 cm. Que remarques-tu ?</text:p>
      <text:p text:style-name="P13">e. Quelle longueur peut-on donner au segment [AB] pour qu’une telle construction reste possible ?</text:p>
      <text:p text:style-name="P13"/>
      <text:p text:style-name="P5"><text:soft-page-break/>Exercice 5 :</text:p>
      <text:p text:style-name="P14"><draw:frame draw:style-name="fr3" draw:name="Image3" text:anchor-type="paragraph" svg:width="15.685cm" svg:height="4.286cm" draw:z-index="2"><draw:image xlink:href="Pictures/10000000000002AC000000BB546962FE23CDEBBE.png" xlink:type="simple" xlink:show="embed" xlink:actuate="onLoad" loext:mime-type="image/png"/></draw:frame></text:p>
      <text:p text:style-name="P14">a. Quelle est la nature du triangle GHI ? Du triangle DEF ? Du triangle JKL ? Justifie tes réponses.</text:p>
      <text:p text:style-name="P14"/>
      <text:p text:style-name="P14">b. Dans le triangle DEF, comment s’appelle le point E ? Comment s’appelle le côté [FD] ?</text:p>
      <text:p text:style-name="P14"/>
      <text:p text:style-name="P14">c. Dans le triangle JKL, comment s’appelle le côté [JK] ?</text:p>
      <text:p text:style-name="P5"/>
      <text:p text:style-name="P5">Exercice 6 :</text:p>
      <text:p text:style-name="P5"><draw:frame draw:style-name="fr2" draw:name="Image4" text:anchor-type="paragraph" svg:x="-0.238cm" svg:y="0.132cm" svg:width="10.386cm" svg:height="5.193cm" draw:z-index="3"><draw:image xlink:href="Pictures/10000000000001EE000000F73D010EE928CE5CCB.png" xlink:type="simple" xlink:show="embed" xlink:actuate="onLoad" loext:mime-type="image/png"/></draw:frame></text:p>
      <text:p text:style-name="P14">a. Nomme les triangles rectangles tracés sur la figure.</text:p>
      <text:p text:style-name="P14"/>
      <text:p text:style-name="P14">b. Précise, pour chacun, son hypoténuse.</text:p>
      <text:p text:style-name="P14"/>
      <text:p text:style-name="P6">Exercice 7 :</text:p>
      <text:p text:style-name="P15">a. Construis un triangle isocèle XYZ de sommet principal Z tel que : XZ=3,5 cm et XY=6cm.</text:p>
      <text:p text:style-name="P15"/>
      <text:p text:style-name="P15">b. Construis un triangle TRS rectangle en S tel que : TS=7,2 cm et SR=8,5 cm.</text:p>
      <text:p text:style-name="P15"/>
      <text:p text:style-name="P15">c. Construis un triangle GLU rectangle en L tel que : LG=8 cm et Gu=10 cm.</text:p>
      <text:p text:style-name="P7"><text:soft-page-break/>Exercice 8 :</text:p>
      <text:p text:style-name="P16"><draw:frame draw:style-name="fr2" draw:name="Image5" text:anchor-type="paragraph" svg:x="-1.263cm" svg:y="0.162cm" svg:width="7.581cm" svg:height="7.431cm" draw:z-index="4"><draw:image xlink:href="Pictures/10000000000001C7000001BE9EFCD219BF5C0712.png" xlink:type="simple" xlink:show="embed" xlink:actuate="onLoad" loext:mime-type="image/png"/></draw:frame>Observe attentivement le codage de la figure ci-contre.</text:p>
      <text:p text:style-name="P16">Déduis-en une méthode pour construire un hexagone régulier de 4 cm de côté puis effectue la construction sur ton cahier.</text:p>
      <text:p text:style-name="P16"/>
      <text:p text:style-name="P16"/>
      <text:p text:style-name="P16"/>
      <text:p text:style-name="P16"/>
      <text:p text:style-name="P16"/>
      <text:p text:style-name="P16"/>
      <text:p text:style-name="P7">Exercice 9 :</text:p>
      <text:p text:style-name="P16"><draw:frame draw:style-name="fr2" draw:name="Image6" text:anchor-type="paragraph" svg:x="-0.436cm" svg:y="0.212cm" svg:width="4.486cm" svg:height="5.496cm" draw:z-index="5"><draw:image xlink:href="Pictures/10000000000001060000014100405B868538A0C0.png" xlink:type="simple" xlink:show="embed" xlink:actuate="onLoad" loext:mime-type="image/png"/></draw:frame>Complète les phrases en utilisant les mots « côtés », « sommets », « diagonales », « opposés » et « consécutifs ».</text:p>
      <text:p text:style-name="P17">Dans le quadrilatère ABCD :</text:p>
      <text:p text:style-name="P17">a. [AB] et [CD] sont des ………………….. ;</text:p>
      <text:p text:style-name="P17"/>
      <text:p text:style-name="P17">b. C et D sont des ………………………………………. ;</text:p>
      <text:p text:style-name="P17"/>
      <text:p text:style-name="P17">c. [AD] et [BC] sont des ……………. <text:s text:c="5"/>……………………………………… ;</text:p>
      <text:p text:style-name="P17"/>
      <text:p text:style-name="P17">d. [AC] et [BD] sont les .…………………………………………………….. ;</text:p>
      <text:p text:style-name="P17"/>
      <text:p text:style-name="P17">e. A et C sont des ………………… <text:s text:c="2"/>……………………………………….. ;</text:p>
      <text:p text:style-name="P17"/>
      <text:p text:style-name="P17">f. [AB] et [BC] sont des ………………………. <text:s text:c="2"/>………………...…………………… ;</text:p>
      <text:p text:style-name="P17"/>
      <text:p text:style-name="P8">Exercice 10 :</text:p>
      <text:p text:style-name="P18">Complète chaque phrase.</text:p>
      <text:p text:style-name="P18">a. Dans le quadrilatère AGHF, ……………… est le côté opposé au côté [FH].</text:p>
      <text:p text:style-name="P18"/>
      <text:p text:style-name="P19"><text:soft-page-break/>b. Dans le quadrilatère ………………….,[BE] et [EF] sont des côtés consécutifs.</text:p>
      <text:p text:style-name="P19"/>
      <text:p text:style-name="P19">c. Dans le quadrilatère DCGE, [CD] et [GE] sont des côtés ………………….</text:p>
      <text:p text:style-name="P19"/>
      <text:p text:style-name="P19">d. Dans le quadrilatère FDCA, les côtés consécutifs au côté [CD] sont …………………. et ……………………..</text:p>
      <text:p text:style-name="P19"/>
      <text:p text:style-name="P9">Exercice 11 :</text:p>
      <text:p text:style-name="P19">Les quadrilatères sont tracés à main levée.</text:p>
      <text:p text:style-name="P19"><draw:frame draw:style-name="fr3" draw:name="Image7" text:anchor-type="paragraph" svg:width="12.372cm" svg:height="9.67cm" draw:z-index="6"><draw:image xlink:href="Pictures/10000000000002AF00000219CC71BCD901911B6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a. Donne la nature de chaque quadrilatère. Justifie.</text:p>
      <text:p text:style-name="P19">b. Construis chacun de ces quadrilatères en vraie grandeur.</text:p>
      <text:p text:style-name="P9"/>
      <text:p text:style-name="P9">Exercice 12 :</text:p>
      <text:p text:style-name="P19">Dans chaque cas, trace une figure à main levée puis réalise la figure en vraie grandeur.</text:p>
      <text:p text:style-name="P19">a. Construis un rectangle LOUP tel que : LO=8cm et LP=6 cm.</text:p>
      <text:p text:style-name="P19">b. Construis un rectangle GRIS tel que : GR=9 cm et GI=12 cm.</text:p>
      <text:p text:style-name="P19">c. Construis un carré BLEU de côté 4 cm.</text:p>
      <text:p text:style-name="P19"/>
      <text:p text:style-name="P10"><text:soft-page-break/>Exercice 13 :</text:p>
      <text:p text:style-name="P20">Réponds à chaque question en expliquant ta réponse.</text:p>
      <text:p text:style-name="P20">a. Un triangle équilatéral peut-il être rectangle ?</text:p>
      <text:p text:style-name="P20">b. Un losange peut-il être un rectangle ?</text:p>
      <text:p text:style-name="P20">c. Un quadrilatère a ses côtés opposés parallèles. Est-ce forcément un rectangle ?</text:p>
      <text:p text:style-name="P20">d. Un quadrilatère a ses côtés perpendiculaires deux à deux. Est-ce forcément un rectangle ?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6:35:50.452000000</meta:creation-date>
    <dc:date>2021-01-24T20:18:05.580000000</dc:date>
    <meta:editing-duration>PT1H29M20S</meta:editing-duration>
    <meta:editing-cycles>1</meta:editing-cycles>
    <meta:document-statistic meta:table-count="1" meta:image-count="7" meta:object-count="0" meta:page-count="6" meta:paragraph-count="73" meta:word-count="763" meta:character-count="4088" meta:non-whitespace-character-count="3301"/>
    <meta:generator>LibreOffice/6.2.3.2$Windows_X86_64 LibreOffice_project/aecc05fe267cc68dde00352a451aa867b3b546ac</meta:generator>
  </office:meta>
</office:document-meta>
</file>