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F5000000489B77C5ED51029BA9.png" manifest:media-type="image/png"/>
  <manifest:file-entry manifest:full-path="Pictures/100000000000013D000000747FD90D82CD8CE8BB.png" manifest:media-type="image/png"/>
  <manifest:file-entry manifest:full-path="Pictures/1000000000000197000000C8B9CFE2C6CF503E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201cm"/>
    </style:style>
    <style:style style:name="Tableau4.B" style:family="table-column">
      <style:table-column-properties style:column-width="7.408cm"/>
    </style:style>
    <style:style style:name="Tableau4.C" style:family="table-column">
      <style:table-column-properties style:column-width="6.40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OpenDyslexic" style:text-underline-style="solid" style:text-underline-width="auto" style:text-underline-color="font-color" officeooo:rsid="000f3824" officeooo:paragraph-rsid="000f3824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f3824" officeooo:paragraph-rsid="000f3824"/>
    </style:style>
    <style:style style:name="P3" style:family="paragraph" style:parent-style-name="Standard" style:list-style-name="L1">
      <style:text-properties style:font-name="OpenDyslexic" style:text-underline-style="solid" style:text-underline-width="auto" style:text-underline-color="font-color" officeooo:rsid="0013f73d" officeooo:paragraph-rsid="0013f73d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3f73d" officeooo:paragraph-rsid="0013f73d"/>
    </style:style>
    <style:style style:name="P5" style:family="paragraph" style:parent-style-name="Standard">
      <style:text-properties style:font-name="OpenDyslexic" style:text-underline-style="none" officeooo:rsid="000f3824" officeooo:paragraph-rsid="000f3824"/>
    </style:style>
    <style:style style:name="P6" style:family="paragraph" style:parent-style-name="Standard" style:list-style-name="L1">
      <style:text-properties style:font-name="OpenDyslexic" style:text-underline-style="none" officeooo:rsid="0012afdd" officeooo:paragraph-rsid="0012afdd"/>
    </style:style>
    <style:style style:name="P7" style:family="paragraph" style:parent-style-name="Table_20_Contents">
      <style:text-properties style:font-name="OpenDyslexic"/>
    </style:style>
    <style:style style:name="P8" style:family="paragraph" style:parent-style-name="Table_20_Contents">
      <style:text-properties style:font-name="OpenDyslexic" officeooo:rsid="000f3824" officeooo:paragraph-rsid="000f3824"/>
    </style:style>
    <style:style style:name="P9" style:family="paragraph" style:parent-style-name="Table_20_Contents">
      <style:paragraph-properties fo:text-align="center" style:justify-single-word="false"/>
      <style:text-properties style:font-name="OpenDyslexic" officeooo:rsid="00110be2" officeooo:paragraph-rsid="00110be2"/>
    </style:style>
    <style:style style:name="P10" style:family="paragraph" style:parent-style-name="Table_20_Contents">
      <style:paragraph-properties fo:text-align="start" style:justify-single-word="false"/>
      <style:text-properties style:font-name="OpenDyslexic" officeooo:rsid="0012afdd" officeooo:paragraph-rsid="0012afdd"/>
    </style:style>
    <style:style style:name="P11" style:family="paragraph" style:parent-style-name="Table_20_Contents">
      <style:text-properties style:font-name="OpenDyslexic" officeooo:rsid="000692c1" officeooo:paragraph-rsid="000d6c80"/>
    </style:style>
    <style:style style:name="T1" style:family="text">
      <style:text-properties officeooo:rsid="000d6c80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5671b" style:font-weight-asian="normal" style:font-weight-complex="normal"/>
    </style:style>
    <style:style style:name="T5" style:family="text">
      <style:text-properties style:text-underline-style="none" fo:font-weight="normal" officeooo:rsid="001712a4" style:font-weight-asian="normal" style:font-weight-complex="normal"/>
    </style:style>
    <style:style style:name="T6" style:family="text">
      <style:text-properties style:text-underline-style="none" fo:font-weight="normal" officeooo:rsid="001716b7" style:font-weight-asian="normal" style:font-weight-complex="normal"/>
    </style:style>
    <style:style style:name="T7" style:family="text">
      <style:text-properties style:text-underline-style="none" officeooo:rsid="0015671b"/>
    </style:style>
    <style:style style:name="T8" style:family="text">
      <style:text-properties style:text-underline-style="none" fo:font-weight="bold" officeooo:rsid="0015671b" style:font-weight-asian="bold" style:font-weight-complex="bold"/>
    </style:style>
    <style:style style:name="T9" style:family="text">
      <style:text-properties style:text-underline-style="none" fo:font-weight="bold" officeooo:rsid="001712a4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671b" style:font-weight-asian="normal" style:font-weight-complex="normal"/>
    </style:style>
    <style:style style:name="T13" style:family="text">
      <style:text-properties fo:font-weight="normal" officeooo:rsid="001712a4" style:font-weight-asian="normal" style:font-weight-complex="normal"/>
    </style:style>
    <style:style style:name="T14" style:family="text">
      <style:text-properties fo:font-weight="normal" officeooo:rsid="001716b7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officeooo:rsid="001567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ollège <text:span text:style-name="T1">Amiral Lejeune</text:span> <text:s text:c="60"/><text:span text:style-name="T1">6 </text:span>ème<text:line-break/><text:span text:style-name="T1">Cours </text:span><text:s text:c="17"/>Chapitre <text:span text:style-name="T1">2</text:span> :<text:span text:style-name="T1">Introduction à la</text:span> <text:span text:style-name="T1">Géométrie</text:span></text:p>
          </table:table-cell>
        </table:table-row>
      </table:table>
      <text:p text:style-name="Standard"/>
      <text:list xml:id="list2416355320" text:style-name="L1">
        <text:list-item>
          <text:p text:style-name="P1">Notion de point<text:line-break/>Définition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Un <text:span text:style-name="T10">point</text:span><text:span text:style-name="T11"> est un objet géométrique. C’est l’intersection de deux lignes. On le nomme par une lettre majuscule.</text:span></text:p>
          </table:table-cell>
        </table:table-row>
      </table:table>
      <text:p text:style-name="P2">Exemple :<text:span text:style-name="T2"> Représenter un point M.<text:line-break/><text:line-break/></text:span>Vocabulaire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Deux points sont ………….. s’ils occupent le même emplacement. Deux points sont distincts s’ils n’occupent pas le même emplacement.</text:p>
          </table:table-cell>
        </table:table-row>
      </table:table>
      <text:p text:style-name="P2">Exemple :</text:p>
      <text:p text:style-name="P5">Représenter la situation suivante :<text:line-break/>-les points A et B sont confondus ;<text:line-break/>-les points C et D sont distincts.<text:line-break/></text:p>
      <text:list xml:id="list181031262855964" text:continue-numbering="true" text:style-name="L1">
        <text:list-item>
          <text:p text:style-name="P1">Droite, demi-droite et segment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9">Notation</text:p>
          </table:table-cell>
          <table:table-cell table:style-name="Tableau4.A1" office:value-type="string">
            <text:p text:style-name="P9">Signification</text:p>
          </table:table-cell>
          <table:table-cell table:style-name="Tableau4.C1" office:value-type="string">
            <text:p text:style-name="P9">Figure</text:p>
          </table:table-cell>
        </table:table-row>
        <table:table-row>
          <table:table-cell table:style-name="Tableau4.A2" office:value-type="string">
            <text:p text:style-name="P9">[AB]</text:p>
          </table:table-cell>
          <table:table-cell table:style-name="Tableau4.A2" office:value-type="string">
            <text:p text:style-name="P9">Lire : « segment [AB] »<text:line-break/>C’est le segment d’extrémités A et B.</text:p>
          </table:table-cell>
          <table:table-cell table:style-name="Tableau4.C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9">(AB)</text:p>
          </table:table-cell>
          <table:table-cell table:style-name="Tableau4.A2" office:value-type="string">
            <text:p text:style-name="P9">Lire « droite (AB) »<text:line-break/>C’est la droite qui passe par les points A et B.</text:p>
          </table:table-cell>
          <table:table-cell table:style-name="Tableau4.C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9">[AB)</text:p>
          </table:table-cell>
          <table:table-cell table:style-name="Tableau4.A2" office:value-type="string">
            <text:p text:style-name="P9">Lire « demi-droite [AB) ».<text:line-break/>C’est la demi-droite d’origine A passant par le point B.</text:p>
          </table:table-cell>
          <table:table-cell table:style-name="Tableau4.C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9"><draw:frame draw:style-name="fr2" draw:name="Objet1" text:anchor-type="as-char" svg:y="-0.527cm" svg:width="1.462cm" svg:height="0.739cm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2" draw:name="Objet2" text:anchor-type="as-char" svg:y="-0.527cm" svg:width="1.471cm" svg:height="0.73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4.A2" office:value-type="string">
            <text:p text:style-name="P10">Le point A <text:span text:style-name="T10">appartient</text:span><text:span text:style-name="T11"> à la droite (d).<text:line-break/>Le point B </text:span><text:span text:style-name="T10">n’appartient pas</text:span><text:span text:style-name="T11"> à la droite (d).</text:span></text:p>
          </table:table-cell>
          <table:table-cell table:style-name="Tableau4.C2" office:value-type="string">
            <text:p text:style-name="P7"/>
          </table:table-cell>
        </table:table-row>
      </table:table>
      <text:list xml:id="list181031519691535" text:continue-numbering="true" text:style-name="L1">
        <text:list-header>
          <text:p text:style-name="P6"><text:soft-page-break/>Une <text:span text:style-name="T10">droite</text:span><text:span text:style-name="T11"> est un objet géométrique formé de points.</text:span></text:p>
          <text:p text:style-name="P6"><text:span text:style-name="T11">Une droite est illimitée.<text:line-break/></text:span><text:span text:style-name="T15">Remarques :</text:span></text:p>
          <text:p text:style-name="P6"><text:span text:style-name="T11">-Deux droites qui se coupent ont un seul …………..<text:line-break/>-Des points alignés sont des points qui appartiennent à …………………</text:span></text:p>
          <text:p text:style-name="P3"><text:span text:style-name="T11">Exemples :</text:span></text:p>
        </text:list-header>
      </text:list>
      <text:p text:style-name="P4"><draw:frame draw:style-name="fr1" draw:name="Image1" text:anchor-type="paragraph" svg:x="1.45cm" svg:y="0cm" svg:width="10.769cm" svg:height="5.292cm" draw:z-index="2"><draw:image xlink:href="Pictures/1000000000000197000000C8B9CFE2C6CF503E84.png" xlink:type="simple" xlink:show="embed" xlink:actuate="onLoad" loext:mime-type="image/png"/></draw:frame><text:span text:style-name="T3"><text:line-break/><text:line-break/><text:line-break/><text:line-break/><text:line-break/><text:line-break/><text:line-break/><text:line-break/></text:span></text:p>
      <text:p text:style-name="P4"><text:span text:style-name="T3"/></text:p>
      <text:list xml:id="list181030651153072" text:continue-numbering="true" text:style-name="L1">
        <text:list-item>
          <text:p text:style-name="P1"><draw:frame draw:style-name="fr1" draw:name="Image2" text:anchor-type="paragraph" svg:x="1.318cm" svg:y="4.392cm" svg:width="8.387cm" svg:height="3.069cm" draw:z-index="3"><draw:image xlink:href="Pictures/100000000000013D000000747FD90D82CD8CE8BB.png" xlink:type="simple" xlink:show="embed" xlink:actuate="onLoad" loext:mime-type="image/png"/></draw:frame><draw:frame draw:style-name="fr1" draw:name="Image3" text:anchor-type="paragraph" svg:x="0.286cm" svg:y="12.25cm" svg:width="6.482cm" svg:height="1.905cm" draw:z-index="4"><draw:image xlink:href="Pictures/10000000000000F5000000489B77C5ED51029BA9.png" xlink:type="simple" xlink:show="embed" xlink:actuate="onLoad" loext:mime-type="image/png"/></draw:frame>Longueur et milieu d’un segment<text:line-break/><text:span text:style-name="T16">Notation :</text:span><text:span text:style-name="T7"><text:line-break/>La </text:span><text:span text:style-name="T8">longueur</text:span><text:span text:style-name="T4"> du segment [AB] est notée …….<text:line-break/><text:line-break/></text:span><text:span text:style-name="T12">Exemple :</text:span><text:span text:style-name="T4"><text:line-break/></text:span><text:span text:style-name="T5">La longueur du segment [AB] est de ……………………<text:line-break/>……………………………………..<text:line-break/>……………………………………..<text:line-break/>……………………………………..<text:line-break/><text:line-break/><text:line-break/></text:span><text:span text:style-name="T13">Définition :</text:span><text:span text:style-name="T5"><text:line-break/>Le </text:span><text:span text:style-name="T9">milieu</text:span><text:span text:style-name="T5"> d’un segment est un point qui appartient au segment et qui est à égal distance de ses extrémités.<text:line-break/><text:line-break/></text:span><text:span text:style-name="T14">Exemple :</text:span><text:span text:style-name="T6"> <text:line-break/>………………………………………………………..<text:line-break/>………………………………………………………..<text:line-break/>………………………………………………………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6:42:23.323000000</meta:creation-date>
    <dc:date>2020-09-13T18:10:30.081000000</dc:date>
    <meta:editing-duration>PT3M43S</meta:editing-duration>
    <meta:editing-cycles>1</meta:editing-cycles>
    <meta:document-statistic meta:table-count="4" meta:image-count="3" meta:object-count="2" meta:page-count="2" meta:paragraph-count="25" meta:word-count="249" meta:character-count="1570" meta:non-whitespace-character-count="1254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A</mi>
      <mo stretchy="false">∈</mo>
      <mrow>
        <mo fence="true" stretchy="false">(</mo>
        <mrow>
          <mi>d</mi>
        </mrow>
        <mo fence="true" stretchy="false">)</mo>
      </mrow>
    </mrow>
    <annotation encoding="StarMath 5.0">A in ( d )</annotation>
  </semantics>
</math>
</file>

<file path=Object 2/content.xml><?xml version="1.0" encoding="utf-8"?>
<math xmlns="http://www.w3.org/1998/Math/MathML" display="block">
  <semantics>
    <mrow>
      <mi>B</mi>
      <mo stretchy="false">∉</mo>
      <mrow>
        <mo fence="true" stretchy="false">(</mo>
        <mrow>
          <mi>D</mi>
        </mrow>
        <mo fence="true" stretchy="false">)</mo>
      </mrow>
    </mrow>
    <annotation encoding="StarMath 5.0">B notin  ( D )</annotation>
  </semantics>
</math>
</file>