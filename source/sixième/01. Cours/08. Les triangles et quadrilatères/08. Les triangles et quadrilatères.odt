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300000105493FCEC881B4B4F3.png" manifest:media-type="image/png"/>
  <manifest:file-entry manifest:full-path="Pictures/10000000000001E2000000E225679E5A5DA4CACB.png" manifest:media-type="image/png"/>
  <manifest:file-entry manifest:full-path="Pictures/100000000000034900000099FF0F17F4C3D74B00.png" manifest:media-type="image/png"/>
  <manifest:file-entry manifest:full-path="Pictures/10000000000001780000012A2ACDAF6D09DB0DF8.png" manifest:media-type="image/png"/>
  <manifest:file-entry manifest:full-path="Pictures/10000000000001520000014B2597C624FCA84058.png" manifest:media-type="image/png"/>
  <manifest:file-entry manifest:full-path="Pictures/100000000000036B000000E4D67A457A12C5256A.png" manifest:media-type="image/png"/>
  <manifest:file-entry manifest:full-path="Pictures/100000000000036C0000011721456781D25F5E5E.png" manifest:media-type="image/png"/>
  <manifest:file-entry manifest:full-path="Pictures/100000000000036A000000E7FC50808F788B5F05.png" manifest:media-type="image/png"/>
  <manifest:file-entry manifest:full-path="Pictures/1000000000000152000000ED835BA85B24ECE45D.png" manifest:media-type="image/png"/>
  <manifest:file-entry manifest:full-path="Pictures/10000000000003690000012560E5F5052774C30E.png" manifest:media-type="image/png"/>
  <manifest:file-entry manifest:full-path="Pictures/100000000000013A0000011364E8962AD0A848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4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 style:list-style-name="L1">
      <style:text-properties style:font-name="OpenDyslexic" style:text-underline-style="solid" style:text-underline-width="auto" style:text-underline-color="font-color" officeooo:rsid="0010f497" officeooo:paragraph-rsid="0010f497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0f497" officeooo:paragraph-rsid="0010f497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2c49e" officeooo:paragraph-rsid="0012c49e"/>
    </style:style>
    <style:style style:name="P5" style:family="paragraph" style:parent-style-name="Standard" style:list-style-name="L1">
      <style:text-properties style:font-name="OpenDyslexic" style:text-underline-style="solid" style:text-underline-width="auto" style:text-underline-color="font-color" officeooo:rsid="0012c49e" officeooo:paragraph-rsid="0012c49e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2c49e" officeooo:paragraph-rsid="00167d71"/>
    </style:style>
    <style:style style:name="P7" style:family="paragraph" style:parent-style-name="Standard" style:list-style-name="L1">
      <style:text-properties style:font-name="OpenDyslexic" style:text-underline-style="solid" style:text-underline-width="auto" style:text-underline-color="font-color" officeooo:rsid="001482c1" officeooo:paragraph-rsid="001482c1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482c1" officeooo:paragraph-rsid="001482c1"/>
    </style:style>
    <style:style style:name="P9" style:family="paragraph" style:parent-style-name="Standard" style:list-style-name="L1">
      <style:text-properties style:font-name="OpenDyslexic" style:text-underline-style="solid" style:text-underline-width="auto" style:text-underline-color="font-color" officeooo:rsid="00167d71" officeooo:paragraph-rsid="00167d71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rsid="00167d71" officeooo:paragraph-rsid="00167d71"/>
    </style:style>
    <style:style style:name="P11" style:family="paragraph" style:parent-style-name="Standard" style:list-style-name="L1">
      <style:text-properties style:font-name="OpenDyslexic" style:text-underline-style="solid" style:text-underline-width="auto" style:text-underline-color="font-color" officeooo:rsid="00187c63" officeooo:paragraph-rsid="00187c63"/>
    </style:style>
    <style:style style:name="P12" style:family="paragraph" style:parent-style-name="Standard">
      <style:text-properties style:font-name="OpenDyslexic" style:text-underline-style="solid" style:text-underline-width="auto" style:text-underline-color="font-color" officeooo:rsid="00187c63" officeooo:paragraph-rsid="00187c63"/>
    </style:style>
    <style:style style:name="P13" style:family="paragraph" style:parent-style-name="Standard">
      <style:text-properties style:font-name="OpenDyslexic" style:text-underline-style="solid" style:text-underline-width="auto" style:text-underline-color="font-color" officeooo:rsid="001a6d40" officeooo:paragraph-rsid="001a6d40"/>
    </style:style>
    <style:style style:name="P14" style:family="paragraph" style:parent-style-name="Standard">
      <style:text-properties style:font-name="OpenDyslexic" style:text-underline-style="solid" style:text-underline-width="auto" style:text-underline-color="font-color" officeooo:rsid="001afd7d" officeooo:paragraph-rsid="001afd7d"/>
    </style:style>
    <style:style style:name="P15" style:family="paragraph" style:parent-style-name="Standard">
      <style:text-properties style:font-name="OpenDyslexic" style:text-underline-style="none" officeooo:rsid="0010f497" officeooo:paragraph-rsid="0010f497"/>
    </style:style>
    <style:style style:name="P16" style:family="paragraph" style:parent-style-name="Standard">
      <style:text-properties style:font-name="OpenDyslexic" style:text-underline-style="none" officeooo:rsid="001afd7d" officeooo:paragraph-rsid="001afd7d"/>
    </style:style>
    <style:style style:name="P17" style:family="paragraph" style:parent-style-name="Table_20_Contents">
      <style:text-properties style:font-name="OpenDyslexic" officeooo:rsid="0010f497" officeooo:paragraph-rsid="0010f497"/>
    </style:style>
    <style:style style:name="P18" style:family="paragraph" style:parent-style-name="Table_20_Contents">
      <style:text-properties style:font-name="OpenDyslexic" style:text-underline-style="solid" style:text-underline-width="auto" style:text-underline-color="font-color" officeooo:rsid="0010f497" officeooo:paragraph-rsid="0010f497"/>
    </style:style>
    <style:style style:name="P19" style:family="paragraph" style:parent-style-name="Table_20_Contents">
      <style:text-properties style:font-name="OpenDyslexic" style:text-underline-style="solid" style:text-underline-width="auto" style:text-underline-color="font-color" officeooo:rsid="0012c49e" officeooo:paragraph-rsid="00167d71"/>
    </style:style>
    <style:style style:name="P20" style:family="paragraph" style:parent-style-name="Table_20_Contents">
      <style:text-properties style:font-name="OpenDyslexic" style:text-underline-style="solid" style:text-underline-width="auto" style:text-underline-color="font-color" officeooo:rsid="00167d71" officeooo:paragraph-rsid="00167d71"/>
    </style:style>
    <style:style style:name="P21" style:family="paragraph" style:parent-style-name="Table_20_Contents">
      <style:text-properties style:font-name="OpenDyslexic" style:text-underline-style="solid" style:text-underline-width="auto" style:text-underline-color="font-color" officeooo:rsid="00187c63" officeooo:paragraph-rsid="00187c63"/>
    </style:style>
    <style:style style:name="P22" style:family="paragraph" style:parent-style-name="Table_20_Contents">
      <style:text-properties style:font-name="OpenDyslexic" style:text-underline-style="solid" style:text-underline-width="auto" style:text-underline-color="font-color" officeooo:rsid="001a6d40" officeooo:paragraph-rsid="001a6d40"/>
    </style:style>
    <style:style style:name="P23" style:family="paragraph" style:parent-style-name="Table_20_Contents">
      <style:text-properties style:font-name="OpenDyslexic" style:text-underline-style="solid" style:text-underline-width="auto" style:text-underline-color="font-color" officeooo:rsid="001afd7d" officeooo:paragraph-rsid="001afd7d"/>
    </style:style>
    <style:style style:name="P24" style:family="paragraph" style:parent-style-name="Table_20_Contents">
      <style:text-properties style:font-name="OpenDyslexic" style:text-underline-style="none" officeooo:rsid="0010f497" officeooo:paragraph-rsid="0010f497"/>
    </style:style>
    <style:style style:name="P25" style:family="paragraph" style:parent-style-name="Table_20_Contents" style:list-style-name="L2">
      <style:text-properties style:font-name="OpenDyslexic" style:text-underline-style="none" officeooo:rsid="0012c49e" officeooo:paragraph-rsid="00167d71"/>
    </style:style>
    <style:style style:name="P26" style:family="paragraph" style:parent-style-name="Table_20_Contents">
      <style:text-properties style:font-name="OpenDyslexic" style:text-underline-style="none" officeooo:rsid="0012c49e" officeooo:paragraph-rsid="00167d71"/>
    </style:style>
    <style:style style:name="P27" style:family="paragraph" style:parent-style-name="Table_20_Contents">
      <style:text-properties style:font-name="OpenDyslexic" style:text-underline-style="none" officeooo:rsid="00167d71" officeooo:paragraph-rsid="00167d71"/>
    </style:style>
    <style:style style:name="P28" style:family="paragraph" style:parent-style-name="Table_20_Contents">
      <style:text-properties style:font-name="OpenDyslexic" style:text-underline-style="none" officeooo:rsid="00187c63" officeooo:paragraph-rsid="00187c63"/>
    </style:style>
    <style:style style:name="P29" style:family="paragraph" style:parent-style-name="Table_20_Contents">
      <style:text-properties style:font-name="OpenDyslexic" style:text-underline-style="none" officeooo:rsid="001a6d40" officeooo:paragraph-rsid="001a6d40"/>
    </style:style>
    <style:style style:name="P30" style:family="paragraph" style:parent-style-name="Table_20_Contents">
      <style:text-properties style:font-name="OpenDyslexic" style:text-underline-style="none" officeooo:rsid="001afd7d" officeooo:paragraph-rsid="001afd7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ollège A.LEJEUNE <text:s text:c="65"/>6ème</text:p>
            <text:p text:style-name="P17">Cours <text:s text:c="16"/>Chapitre 8 : Les triangles et les quadrilatères</text:p>
          </table:table-cell>
        </table:table-row>
      </table:table>
      <text:p text:style-name="P1"/>
      <text:list xml:id="list1754656112" text:style-name="L1">
        <text:list-item>
          <text:p text:style-name="P2">Triangles</text:p>
          <text:list>
            <text:list-item>
              <text:p text:style-name="P2">Généralités</text:p>
            </text:list-item>
          </text:list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Définition :<text:line-break/><text:span text:style-name="T1">Un triangle est un polygone à trois côtés.</text:span></text:p>
          </table:table-cell>
        </table:table-row>
      </table:table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8">Vocabulaire :</text:p>
            <text:p text:style-name="P24">Un triangle a trois sommets et trois côtés.</text:p>
          </table:table-cell>
        </table:table-row>
      </table:table>
      <text:p text:style-name="P3"/>
      <text:p text:style-name="P3">Exemple :</text:p>
      <text:p text:style-name="P15">Dans un triangle ABC, quel est le sommet opposé au coté [AB] ? Et le côté opposé au sommet A ?</text:p>
      <text:p text:style-name="P15"><draw:frame draw:style-name="fr1" draw:name="Image1" text:anchor-type="paragraph" svg:x="2.18cm" svg:y="0.452cm" svg:width="10.943cm" svg:height="5.131cm" draw:z-index="0"><draw:image xlink:href="Pictures/10000000000001E2000000E225679E5A5DA4CAC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2" text:anchor-type="paragraph" svg:width="20.001cm" svg:height="3.092cm" draw:z-index="1"><draw:image xlink:href="Pictures/100000000000034900000099FF0F17F4C3D74B00.png" xlink:type="simple" xlink:show="embed" xlink:actuate="onLoad" loext:mime-type="image/png"/></draw:frame></text:p>
      <text:list xml:id="list163541885217020" text:continue-numbering="true" text:style-name="L1">
        <text:list-item>
          <text:list>
            <text:list-item>
              <text:p text:style-name="P2">Construction d’un triangle</text:p>
            </text:list-item>
          </text:list>
        </text:list-item>
      </text:list>
      <text:p text:style-name="P3">Exemple :<text:span text:style-name="T1"> Construis un triangle K,L,M tel que KL=6cm ; LM=5 cm et KM=4,5 cm.</text:span></text:p>
      <text:p text:style-name="P4"><draw:frame draw:style-name="fr3" draw:name="Image3" text:anchor-type="paragraph" svg:width="17cm" svg:height="5.413cm" draw:z-index="2"><draw:image xlink:href="Pictures/100000000000036C0000011721456781D25F5E5E.png" xlink:type="simple" xlink:show="embed" xlink:actuate="onLoad" loext:mime-type="image/png"/></draw:frame><text:soft-page-break/><text:span text:style-name="T1">À toi !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list xml:id="list163541624947040" text:continue-numbering="true" text:style-name="L1">
        <text:list-item>
          <text:p text:style-name="P2">Triangles particuliers</text:p>
          <text:list>
            <text:list-item>
              <text:p text:style-name="P5">Triangle isocèle</text:p>
            </text:list-item>
          </text:list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9">Définition :</text:p>
            <text:p text:style-name="P26">Un triangle isocèle est un triangle qui a deux côtés de même longueur.</text:p>
          </table:table-cell>
        </table:table-row>
      </table:table>
      <text:p text:style-name="P4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9">Vocabulaire :</text:p>
            <text:list xml:id="list1615949725" text:style-name="L2">
              <text:list-item>
                <text:p text:style-name="P25">Le sommet commun aux côtés de même longueur est appelé le sommet principal.</text:p>
              </text:list-item>
              <text:list-item>
                <text:p text:style-name="P25">Le côté opposé au sommet principal est appelé la base.</text:p>
              </text:list-item>
            </text:list>
          </table:table-cell>
        </table:table-row>
      </table:table>
      <text:p text:style-name="P6">Exemple:<text:span text:style-name="T1"> Le triangle ISO est isocèle en S. Quel est son sommet principal et quelle est sa base ?</text:span></text:p>
      <text:p text:style-name="P6"><draw:frame draw:style-name="fr1" draw:name="Image6" text:anchor-type="paragraph" svg:x="0.82cm" svg:y="0.086cm" svg:width="6.847cm" svg:height="5.272cm" draw:z-index="4"><draw:image xlink:href="Pictures/100000000000015300000105493FCEC881B4B4F3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Image5" text:anchor-type="paragraph" svg:x="-1cm" svg:y="0.552cm" svg:width="20.001cm" svg:height="3.092cm" draw:z-index="3"><draw:image xlink:href="Pictures/100000000000034900000099FF0F17F4C3D74B00.png" xlink:type="simple" xlink:show="embed" xlink:actuate="onLoad" loext:mime-type="image/png"/></draw:frame><text:soft-page-break/><text:span text:style-name="T1"/></text:p>
      <text:list xml:id="list163541966069362" text:continue-list="list163541624947040" text:style-name="L1">
        <text:list-item>
          <text:list>
            <text:list-item>
              <text:p text:style-name="P7">Triangle équilatéral</text:p>
            </text:list-item>
          </text:list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0">Définition :</text:p>
            <text:p text:style-name="P27">Un triangle équilatéral est un triangle qui a ses trois côtés de même longueur.</text:p>
          </table:table-cell>
        </table:table-row>
      </table:table>
      <text:p text:style-name="P8"><draw:frame draw:style-name="fr1" draw:name="Image4" text:anchor-type="paragraph" svg:x="-0.019cm" svg:y="0.423cm" svg:width="8.943cm" svg:height="6.271cm" draw:z-index="5"><draw:image xlink:href="Pictures/1000000000000152000000ED835BA85B24ECE45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63541690170666" text:continue-numbering="true" text:style-name="L1">
        <text:list-item>
          <text:list>
            <text:list-item>
              <text:p text:style-name="P9">Triangle rectangle</text:p>
            </text:list-item>
          </text:list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0">Définition :</text:p>
            <text:p text:style-name="P27">Un triangle rectangle est un triangle qui a un angle droit.</text:p>
          </table:table-cell>
        </table:table-row>
      </table:table>
      <text:p text:style-name="P4"><text:span text:style-name="T1"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0">Vocabulaire :</text:p>
            <text:p text:style-name="P27">Le côté opposé à l’angle droit est appelé hypoténuse.</text:p>
          </table:table-cell>
        </table:table-row>
      </table:table>
      <text:p text:style-name="P4"><text:span text:style-name="T1"/></text:p>
      <text:p text:style-name="P10">Exemple :<text:span text:style-name="T1"> Construis un triangle KHI rectangle en K tel que KI=5 cm et HI=7cm.</text:span></text:p>
      <text:p text:style-name="P10"><draw:frame draw:style-name="fr4" draw:name="Image7" text:anchor-type="paragraph" svg:width="17cm" svg:height="4.493cm" draw:z-index="6"><draw:image xlink:href="Pictures/100000000000036A000000E7FC50808F788B5F05.png" xlink:type="simple" xlink:show="embed" xlink:actuate="onLoad" loext:mime-type="image/png"/></draw:frame><text:soft-page-break/><text:span text:style-name="T1"/></text:p>
      <text:p text:style-name="P10"><text:span text:style-name="T1">À toi !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list xml:id="list163541785289043" text:continue-numbering="true" text:style-name="L1">
        <text:list-item>
          <text:p text:style-name="P2">Quadrilatères</text:p>
        </text:list-item>
      </text:list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0">Définition :</text:p>
            <text:p text:style-name="P27">Un quadrilatère est un polygone à quatre côtés.</text:p>
          </table:table-cell>
        </table:table-row>
      </table:table>
      <text:p text:style-name="P3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0">Vocabulaire :</text:p>
            <text:p text:style-name="P27">Un quadrilatère a quatre sommets, quatre côtés et deux diagonales.</text:p>
          </table:table-cell>
        </table:table-row>
      </table:table>
      <text:p text:style-name="P3"/>
      <text:p text:style-name="P10">Exemple :<text:span text:style-name="T1"> Dans un quadrilatère EFGH, quel est le sommet opposé au sommet E ? Et un côté consécutif au côté [FG] ? Quelles sont ses diagonales ?</text:span></text:p>
      <text:p text:style-name="P10"><draw:frame draw:style-name="fr1" draw:name="Image8" text:anchor-type="paragraph" svg:x="0.139cm" svg:y="0cm" svg:width="9.948cm" svg:height="7.885cm" draw:z-index="7"><draw:image xlink:href="Pictures/10000000000001780000012A2ACDAF6D09DB0DF8.png" xlink:type="simple" xlink:show="embed" xlink:actuate="onLoad" loext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draw:frame draw:style-name="fr1" draw:name="Image9" text:anchor-type="paragraph" svg:x="-1cm" svg:y="0.552cm" svg:width="20.001cm" svg:height="3.092cm" draw:z-index="8"><draw:image xlink:href="Pictures/100000000000034900000099FF0F17F4C3D74B00.png" xlink:type="simple" xlink:show="embed" xlink:actuate="onLoad" loext:mime-type="image/png"/></draw:frame><text:soft-page-break/><text:span text:style-name="T1"/></text:p>
      <text:list xml:id="list163541445819377" text:continue-numbering="true" text:style-name="L1">
        <text:list-item>
          <text:p text:style-name="P2">Quadrilatères particuliers</text:p>
          <text:list>
            <text:list-item>
              <text:p text:style-name="P11">Losange</text:p>
            </text:list-item>
          </text:list>
        </text:list-item>
      </text:list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1">Définition :</text:p>
            <text:p text:style-name="P28">Un losange est un quadrilatère qui a ses quatre côtés de même longueur.</text:p>
          </table:table-cell>
        </table:table-row>
      </table:table>
      <text:p text:style-name="P12"><draw:frame draw:style-name="fr1" draw:name="Image10" text:anchor-type="paragraph" svg:x="0.007cm" svg:y="0.377cm" svg:width="7.449cm" svg:height="7.295cm" draw:z-index="9"><draw:image xlink:href="Pictures/10000000000001520000014B2597C624FCA8405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Exemple :<text:span text:style-name="T1"> Construis un losange ABCD tel que AB=6cm et BD=4,2 cm.</text:span></text:p>
      <text:p text:style-name="P13"><draw:frame draw:style-name="fr4" draw:name="Image11" text:anchor-type="paragraph" svg:width="17cm" svg:height="4.429cm" draw:z-index="10"><draw:image xlink:href="Pictures/100000000000036B000000E4D67A457A12C5256A.png" xlink:type="simple" xlink:show="embed" xlink:actuate="onLoad" loext:mime-type="image/png"/></draw:frame><text:span text:style-name="T1"/></text:p>
      <text:p text:style-name="P13"><text:span text:style-name="T1">À toi !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list xml:id="list163541570448269" text:continue-numbering="true" text:style-name="L1">
        <text:list-item>
          <text:list>
            <text:list-item>
              <text:p text:style-name="P11"><text:soft-page-break/>Rectangle</text:p>
            </text:list-item>
          </text:list>
        </text:list-item>
      </text:list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22">Définition :</text:p>
            <text:p text:style-name="P29">Un rectangle est un quadrilatère qui a ses quatre angles droits.</text:p>
          </table:table-cell>
        </table:table-row>
      </table:table>
      <text:p text:style-name="P13">Exemple :</text:p>
      <text:p text:style-name="P16">Construis un rectangle CHOU tel que CH=12 cm et HO=10 cm.</text:p>
      <text:p text:style-name="P16"><draw:frame draw:style-name="fr4" draw:name="Image12" text:anchor-type="paragraph" svg:width="17cm" svg:height="5.704cm" draw:z-index="11"><draw:image xlink:href="Pictures/10000000000003690000012560E5F5052774C30E.png" xlink:type="simple" xlink:show="embed" xlink:actuate="onLoad" loext:mime-type="image/png"/></draw:frame></text:p>
      <text:p text:style-name="P16">À toi !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63541379099451" text:continue-numbering="true" text:style-name="L1">
        <text:list-item>
          <text:list>
            <text:list-item>
              <text:p text:style-name="P11">Carré</text:p>
            </text:list-item>
          </text:list>
        </text:list-item>
      </text:list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3">Définition :</text:p>
            <text:p text:style-name="P30">Un carré est un quadrilatère qui a ses quatre côtés de même longueur et ses quatre angles droits.</text:p>
          </table:table-cell>
        </table:table-row>
      </table:table>
      <text:p text:style-name="P12"><draw:frame draw:style-name="fr1" draw:name="Image13" text:anchor-type="paragraph" svg:x="10.693cm" svg:y="0.249cm" svg:width="8.308cm" svg:height="7.276cm" draw:z-index="12"><draw:image xlink:href="Pictures/100000000000013A0000011364E8962AD0A84829.png" xlink:type="simple" xlink:show="embed" xlink:actuate="onLoad" loext:mime-type="image/png"/></draw:frame></text:p>
      <text:p text:style-name="P12"/>
      <text:p text:style-name="P14">Remarque :<text:span text:style-name="T1"> Un carré est à la fois un losange et un rectangle.</text:span></text:p>
      <text:p text:style-name="P1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5:11:22.027000000</meta:creation-date>
    <dc:date>2021-01-24T16:35:40.216000000</dc:date>
    <meta:editing-duration>PT1S</meta:editing-duration>
    <meta:editing-cycles>1</meta:editing-cycles>
    <meta:document-statistic meta:table-count="13" meta:image-count="13" meta:object-count="0" meta:page-count="6" meta:paragraph-count="52" meta:word-count="365" meta:character-count="2051" meta:non-whitespace-character-count="1671"/>
    <meta:generator>LibreOffice/6.2.3.2$Windows_X86_64 LibreOffice_project/aecc05fe267cc68dde00352a451aa867b3b546ac</meta:generator>
  </office:meta>
</office:document-meta>
</file>