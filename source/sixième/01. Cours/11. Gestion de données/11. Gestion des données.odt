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1000000E6692C1489310D1113.png" manifest:media-type="image/png"/>
  <manifest:file-entry manifest:full-path="Pictures/10000201000001F4000001FFD7561E036477042E.png" manifest:media-type="image/png"/>
  <manifest:file-entry manifest:full-path="Pictures/10000201000002570000017056FAC1644D3D4DCF.png" manifest:media-type="image/png"/>
  <manifest:file-entry manifest:full-path="Pictures/100002010000034F00000060B2DEA3EBAE96E01E.png" manifest:media-type="image/png"/>
  <manifest:file-entry manifest:full-path="Pictures/100002010000034B00000081F0E812D690AD115D.png" manifest:media-type="image/png"/>
  <manifest:file-entry manifest:full-path="Pictures/10000201000001CC00000187AA83DAB5796E26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1ae9b9" officeooo:paragraph-rsid="001ae9b9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ae9b9" officeooo:paragraph-rsid="001ae9b9"/>
    </style:style>
    <style:style style:name="P4" style:family="paragraph" style:parent-style-name="Standard" style:list-style-name="L2">
      <style:text-properties style:font-name="OpenDyslexic" style:text-underline-style="solid" style:text-underline-width="auto" style:text-underline-color="font-color" officeooo:rsid="001ae9b9" officeooo:paragraph-rsid="001ae9b9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bd901" officeooo:paragraph-rsid="001bd901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da0e0" officeooo:paragraph-rsid="001da0e0"/>
    </style:style>
    <style:style style:name="P7" style:family="paragraph" style:parent-style-name="Standard">
      <style:text-properties style:font-name="OpenDyslexic" style:text-underline-style="none" officeooo:rsid="001bd901" officeooo:paragraph-rsid="001bd901"/>
    </style:style>
    <style:style style:name="P8" style:family="paragraph" style:parent-style-name="Standard">
      <style:text-properties style:font-name="OpenDyslexic" style:text-underline-style="none" officeooo:rsid="001da0e0" officeooo:paragraph-rsid="001da0e0"/>
    </style:style>
    <style:style style:name="P9" style:family="paragraph" style:parent-style-name="Table_20_Contents">
      <style:text-properties style:font-name="OpenDyslexic" officeooo:rsid="001ae9b9" officeooo:paragraph-rsid="001ae9b9"/>
    </style:style>
    <style:style style:name="P10" style:family="paragraph" style:parent-style-name="Table_20_Contents">
      <style:paragraph-properties fo:text-align="center" style:justify-single-word="false"/>
      <style:text-properties style:font-name="OpenDyslexic" officeooo:rsid="001ae9b9" officeooo:paragraph-rsid="001ae9b9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1ae9b9" officeooo:paragraph-rsid="001ae9b9"/>
    </style:style>
    <style:style style:name="P12" style:family="paragraph" style:parent-style-name="Table_20_Contents">
      <style:text-properties style:font-name="OpenDyslexic" style:text-underline-style="solid" style:text-underline-width="auto" style:text-underline-color="font-color" officeooo:rsid="001bd901" officeooo:paragraph-rsid="001bd901"/>
    </style:style>
    <style:style style:name="P13" style:family="paragraph" style:parent-style-name="Table_20_Contents">
      <style:text-properties style:font-name="OpenDyslexic" style:text-underline-style="solid" style:text-underline-width="auto" style:text-underline-color="font-color" officeooo:rsid="001da0e0" officeooo:paragraph-rsid="001da0e0"/>
    </style:style>
    <style:style style:name="P14" style:family="paragraph" style:parent-style-name="Table_20_Contents">
      <style:text-properties style:font-name="OpenDyslexic" style:text-underline-style="none" officeooo:rsid="001bd901" officeooo:paragraph-rsid="001bd901"/>
    </style:style>
    <style:style style:name="P15" style:family="paragraph" style:parent-style-name="Table_20_Contents">
      <style:text-properties style:font-name="OpenDyslexic" style:text-underline-style="none" officeooo:rsid="001da0e0" officeooo:paragraph-rsid="001da0e0"/>
    </style:style>
    <style:style style:name="T1" style:family="text">
      <style:text-properties style:text-underline-style="none"/>
    </style:style>
    <style:style style:name="T2" style:family="text">
      <style:text-properties officeooo:rsid="001da0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ollège A.Lejeune <text:s text:c="67"/>6ème</text:p>
            <text:p text:style-name="P9">Cours <text:s text:c="25"/>Chapitre 11 : Gestion des données</text:p>
          </table:table-cell>
        </table:table-row>
      </table:table>
      <text:p text:style-name="P1"/>
      <text:list xml:id="list3336343868" text:style-name="L1">
        <text:list-item>
          <text:p text:style-name="P2">Tableaux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Règle :</text:p>
            <text:p text:style-name="P11"><text:span text:style-name="T1">Un tableau permet de regrouper des données, de lire facilement des informations.</text:span></text:p>
          </table:table-cell>
        </table:table-row>
      </table:table>
      <text:p text:style-name="P3"/>
      <text:p text:style-name="P3">Exemple :<text:span text:style-name="T1"> Les tableaux ci-dessous sont des tableaux à simple entrée.</text:span>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0">Continent</text:p>
          </table:table-cell>
          <table:table-cell table:style-name="Tableau3.B1" office:value-type="string">
            <text:p text:style-name="P10">Population en 2008 en million d’habitants</text:p>
          </table:table-cell>
        </table:table-row>
        <table:table-row>
          <table:table-cell table:style-name="Tableau3.A7" office:value-type="string">
            <text:p text:style-name="P10">Afrique</text:p>
          </table:table-cell>
          <table:table-cell table:style-name="Tableau3.B7" office:value-type="string">
            <text:p text:style-name="P10">987</text:p>
          </table:table-cell>
        </table:table-row>
        <table:table-row>
          <table:table-cell table:style-name="Tableau3.A7" office:value-type="string">
            <text:p text:style-name="P10">Asie</text:p>
          </table:table-cell>
          <table:table-cell table:style-name="Tableau3.B7" office:value-type="string">
            <text:p text:style-name="P10">4 075</text:p>
          </table:table-cell>
        </table:table-row>
        <table:table-row>
          <table:table-cell table:style-name="Tableau3.A7" office:value-type="string">
            <text:p text:style-name="P10">Europe</text:p>
          </table:table-cell>
          <table:table-cell table:style-name="Tableau3.B7" office:value-type="string">
            <text:p text:style-name="P10">731</text:p>
          </table:table-cell>
        </table:table-row>
        <table:table-row>
          <table:table-cell table:style-name="Tableau3.A7" office:value-type="string">
            <text:p text:style-name="P10">Amérique Latine</text:p>
          </table:table-cell>
          <table:table-cell table:style-name="Tableau3.B7" office:value-type="string">
            <text:p text:style-name="P10">579</text:p>
          </table:table-cell>
        </table:table-row>
        <table:table-row>
          <table:table-cell table:style-name="Tableau3.A7" office:value-type="string">
            <text:p text:style-name="P10">Amérique du Nord</text:p>
          </table:table-cell>
          <table:table-cell table:style-name="Tableau3.B7" office:value-type="string">
            <text:p text:style-name="P10">342</text:p>
          </table:table-cell>
        </table:table-row>
        <table:table-row>
          <table:table-cell table:style-name="Tableau3.A7" office:value-type="string">
            <text:p text:style-name="P10">Océanie</text:p>
          </table:table-cell>
          <table:table-cell table:style-name="Tableau3.B7" office:value-type="string">
            <text:p text:style-name="P10">35</text:p>
          </table:table-cell>
        </table:table-row>
      </table:table>
      <text:p text:style-name="P3"><text:span text:style-name="T1">a. Que signifie les nombres 731 et 35 ?</text:span></text:p>
      <text:p text:style-name="P3"><draw:frame draw:style-name="fr1" draw:name="Image1" text:anchor-type="paragraph" svg:width="19.001cm" svg:height="4.022cm" draw:z-index="0"><draw:image xlink:href="Pictures/1000020100000361000000E6692C1489310D1113.png" xlink:type="simple" xlink:show="embed" xlink:actuate="onLoad" loext:mime-type="image/png"/></draw:frame><text:span text:style-name="T1"/></text:p>
      <text:list xml:id="list94047361370276" text:continue-numbering="true" text:style-name="L1">
        <text:list-item>
          <text:p text:style-name="P2">Représentations graphiques et interprétation</text:p>
        </text:list-item>
      </text:list>
      <text:list xml:id="list2559895586" text:style-name="L2">
        <text:list-item>
          <text:list>
            <text:list-item>
              <text:p text:style-name="P4">Graphique cartésien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">Règle :</text:p>
            <text:p text:style-name="P14">Un graphique cartésien permet de représenter l’évolution d’une grandeur en fonction d’une autre.</text:p>
          </table:table-cell>
        </table:table-row>
      </table:table>
      <text:p text:style-name="P5"><draw:frame draw:style-name="fr2" draw:name="Image2" text:anchor-type="paragraph" svg:width="15.85cm" svg:height="9.738cm" draw:z-index="1"><draw:image xlink:href="Pictures/10000201000002570000017056FAC1644D3D4DCF.png" xlink:type="simple" xlink:show="embed" xlink:actuate="onLoad" loext:mime-type="image/png"/></draw:frame><text:soft-page-break/>Exemple :<text:span text:style-name="T1"> Voici un diagramme qui donne l’évolution de la population mondiale en fonction de l’année.</text:span></text:p>
      <text:p text:style-name="P5"><text:span text:style-name="T1">En quelle année les 3 milliards d’habitants ont-ils été atteints ?</text:span></text:p>
      <text:list xml:id="list94047699833960" text:continue-numbering="true" text:style-name="L2">
        <text:list-item>
          <text:list>
            <text:list-item>
              <text:p text:style-name="P4"><draw:frame draw:style-name="fr3" draw:name="Image3" text:anchor-type="paragraph" svg:x="-1.177cm" svg:y="0.141cm" svg:width="19.001cm" svg:height="2.6cm" draw:z-index="2"><draw:image xlink:href="Pictures/100002010000034B00000081F0E812D690AD115D.png" xlink:type="simple" xlink:show="embed" xlink:actuate="onLoad" loext:mime-type="image/png"/></draw:frame>Diagramme en bâton</text:p>
            </text:list-item>
          </text:list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">Règle :<text:span text:style-name="T1"> Dans un diagramme en bâton, les hauteurs des bâtons sont proportionnelles aux quantités représentées.</text:span></text:p>
          </table:table-cell>
        </table:table-row>
      </table:table>
      <text:p text:style-name="P7"><draw:frame draw:style-name="fr2" draw:name="Image4" text:anchor-type="paragraph" svg:width="13.231cm" svg:height="13.522cm" draw:z-index="3"><draw:image xlink:href="Pictures/10000201000001F4000001FFD7561E036477042E.png" xlink:type="simple" xlink:show="embed" xlink:actuate="onLoad" loext:mime-type="image/png"/></draw:frame><text:soft-page-break/>a) <text:span text:style-name="T2">Que permet de visualiser d’un premier coup d’œil ce diagramme ?</text:span></text:p>
      <text:p text:style-name="P8"><draw:frame draw:style-name="fr2" draw:name="Image5" text:anchor-type="paragraph" svg:width="19.893cm" svg:height="1.926cm" draw:z-index="4"><draw:image xlink:href="Pictures/100002010000034F00000060B2DEA3EBAE96E01E.png" xlink:type="simple" xlink:show="embed" xlink:actuate="onLoad" loext:mime-type="image/png"/></draw:frame>b) Quel est le continent où il y a le plus d’écart de population entre 1995 et 2008 ?</text:p>
      <text:p text:style-name="P8"><draw:frame draw:style-name="fr2" draw:name="Image6" text:anchor-type="paragraph" svg:width="19.893cm" svg:height="1.926cm" draw:z-index="5"><draw:image xlink:href="Pictures/100002010000034F00000060B2DEA3EBAE96E01E.png" xlink:type="simple" xlink:show="embed" xlink:actuate="onLoad" loext:mime-type="image/png"/></draw:frame></text:p>
      <text:list xml:id="list94049262829397" text:continue-numbering="true" text:style-name="L2">
        <text:list-item>
          <text:list>
            <text:list-item>
              <text:p text:style-name="P4">Diagramme circulaire</text:p>
            </text:list-item>
          </text:list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">Règle :</text:p>
            <text:p text:style-name="P15">Dans un diagramme circulaire (ou semi-circulaire), les mesures des angles sont proportionnelles aux quantités représentées.</text:p>
          </table:table-cell>
        </table:table-row>
      </table:table>
      <text:p text:style-name="P3"><draw:frame draw:style-name="fr2" draw:name="Image7" text:anchor-type="paragraph" svg:width="12.173cm" svg:height="10.345cm" draw:z-index="6"><draw:image xlink:href="Pictures/10000201000001CC00000187AA83DAB5796E26D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Exemple :<text:span text:style-name="T1"> Ci-contre on a construit un diagramme circulaire représentant la population en 2008, en millions d’habitants, par continent.</text:span></text:p>
      <text:p text:style-name="P6"><text:span text:style-name="T1">a. Classe les continents du moins peuplé au plus peuplé en 2008.</text:span></text:p>
      <text:p text:style-name="P6"><draw:frame draw:style-name="fr2" draw:name="Image8" text:anchor-type="paragraph" svg:width="19.893cm" svg:height="1.926cm" draw:z-index="7"><draw:image xlink:href="Pictures/100002010000034F00000060B2DEA3EBAE96E01E.png" xlink:type="simple" xlink:show="embed" xlink:actuate="onLoad" loext:mime-type="image/png"/></draw:frame><text:span text:style-name="T1">b. Est-il vrai que plus de la moitié de la population mondiale en 2008 se trouve en Asie ?</text:span></text:p>
      <text:p text:style-name="P6"><draw:frame draw:style-name="fr2" draw:name="Image9" text:anchor-type="paragraph" svg:width="19.893cm" svg:height="1.926cm" draw:z-index="8"><draw:image xlink:href="Pictures/100002010000034F00000060B2DEA3EBAE96E01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09:09:19.982000000</meta:creation-date>
    <dc:date>2021-06-03T09:40:46.801000000</dc:date>
    <meta:editing-duration>PT15S</meta:editing-duration>
    <meta:editing-cycles>1</meta:editing-cycles>
    <meta:document-statistic meta:table-count="6" meta:image-count="9" meta:object-count="0" meta:page-count="4" meta:paragraph-count="37" meta:word-count="240" meta:character-count="1538" meta:non-whitespace-character-count="1248"/>
    <meta:generator>LibreOffice/6.2.3.2$Windows_X86_64 LibreOffice_project/aecc05fe267cc68dde00352a451aa867b3b546ac</meta:generator>
  </office:meta>
</office:document-meta>
</file>