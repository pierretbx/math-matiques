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D3000001166B712622AD8E92D5.png" manifest:media-type="image/png"/>
  <manifest:file-entry manifest:full-path="Pictures/100000000000013E000000DF2F52109D3A918D57.png" manifest:media-type="image/png"/>
  <manifest:file-entry manifest:full-path="Pictures/100000000000018E000000D0AFF13A964BDFAC2A.png" manifest:media-type="image/png"/>
  <manifest:file-entry manifest:full-path="Pictures/100000000000035D0000007BB77DD5818CD7DF93.png" manifest:media-type="image/png"/>
  <manifest:file-entry manifest:full-path="Pictures/100000000000037600000154F3A759B874F43890.png" manifest:media-type="image/png"/>
  <manifest:file-entry manifest:full-path="Pictures/1000000000000145000000D33A7294409B4BDFF0.png" manifest:media-type="image/png"/>
  <manifest:file-entry manifest:full-path="Pictures/100000000000038000000146E93DB52067564BD2.png" manifest:media-type="image/png"/>
  <manifest:file-entry manifest:full-path="Pictures/100000000000015E000000D85F5A41805FB22DB8.png" manifest:media-type="image/png"/>
  <manifest:file-entry manifest:full-path="Pictures/10000000000001BD0000014705F048BE074B943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eece6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eece6" officeooo:paragraph-rsid="000eece6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eece6" officeooo:paragraph-rsid="00127346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27346" officeooo:paragraph-rsid="00127346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5525c" officeooo:paragraph-rsid="0015525c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64a61" officeooo:paragraph-rsid="00164a61"/>
    </style:style>
    <style:style style:name="P8" style:family="paragraph" style:parent-style-name="Table_20_Contents">
      <style:text-properties style:font-name="OpenDyslexic" officeooo:rsid="000eece6" officeooo:paragraph-rsid="000eece6"/>
    </style:style>
    <style:style style:name="P9" style:family="paragraph" style:parent-style-name="Table_20_Contents">
      <style:text-properties style:font-name="OpenDyslexic" style:text-underline-style="solid" style:text-underline-width="auto" style:text-underline-color="font-color" officeooo:rsid="000eece6" officeooo:paragraph-rsid="000eece6"/>
    </style:style>
    <style:style style:name="P10" style:family="paragraph" style:parent-style-name="Table_20_Contents">
      <style:text-properties style:font-name="OpenDyslexic" style:text-underline-style="solid" style:text-underline-width="auto" style:text-underline-color="font-color" officeooo:rsid="0010daa9" officeooo:paragraph-rsid="0010daa9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15525c" officeooo:paragraph-rsid="0015525c"/>
    </style:style>
    <style:style style:name="P12" style:family="paragraph" style:parent-style-name="Standard" style:list-style-name="L1">
      <style:text-properties style:font-name="OpenDyslexic" style:text-underline-style="solid" style:text-underline-width="auto" style:text-underline-color="font-color" officeooo:rsid="000eece6" officeooo:paragraph-rsid="000eece6"/>
    </style:style>
    <style:style style:name="P13" style:family="paragraph" style:parent-style-name="Standard">
      <style:text-properties style:font-name="OpenDyslexic" style:text-underline-style="none" officeooo:rsid="000f5f48" officeooo:paragraph-rsid="000eece6"/>
    </style:style>
    <style:style style:name="P14" style:family="paragraph" style:parent-style-name="Standard">
      <style:text-properties style:font-name="OpenDyslexic" style:text-underline-style="none" officeooo:rsid="00127346" officeooo:paragraph-rsid="00127346"/>
    </style:style>
    <style:style style:name="P15" style:family="paragraph" style:parent-style-name="Standard">
      <style:text-properties style:font-name="OpenDyslexic" style:text-underline-style="none" officeooo:rsid="0015525c" officeooo:paragraph-rsid="0015525c"/>
    </style:style>
    <style:style style:name="P16" style:family="paragraph" style:parent-style-name="Standard" style:list-style-name="L2">
      <style:text-properties style:font-name="OpenDyslexic" style:text-underline-style="none" officeooo:rsid="0015525c" officeooo:paragraph-rsid="0015525c"/>
    </style:style>
    <style:style style:name="P17" style:family="paragraph" style:parent-style-name="Standard">
      <style:text-properties style:font-name="OpenDyslexic" style:text-underline-style="none" officeooo:rsid="00164a61" officeooo:paragraph-rsid="00164a61"/>
    </style:style>
    <style:style style:name="P18" style:family="paragraph" style:parent-style-name="Standard">
      <style:text-properties style:font-name="OpenDyslexic" style:text-underline-style="none" officeooo:rsid="0016a438" officeooo:paragraph-rsid="0016a438"/>
    </style:style>
    <style:style style:name="P19" style:family="paragraph" style:parent-style-name="Standard">
      <style:text-properties style:text-position="0% 100%" style:font-name="OpenDyslexic" style:text-underline-style="none" officeooo:rsid="001d0d90" officeooo:paragraph-rsid="001d0d90"/>
    </style:style>
    <style:style style:name="P20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1d0d90" officeooo:paragraph-rsid="001d0d90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0f5f48"/>
    </style:style>
    <style:style style:name="T4" style:family="text">
      <style:text-properties style:text-underline-style="none" officeooo:rsid="0013a955"/>
    </style:style>
    <style:style style:name="T5" style:family="text">
      <style:text-properties officeooo:rsid="001d0d9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Collège A.LEJEUNE <text:s text:c="66"/>6eme</text:p>
            <text:p text:style-name="P8">Cours <text:s text:c="14"/>Chapitre 6 : Droites perpendiculaires et parallèles</text:p>
          </table:table-cell>
        </table:table-row>
      </table:table>
      <text:p text:style-name="P2"/>
      <text:list xml:id="list1566552978" text:style-name="L1">
        <text:list-item>
          <text:p text:style-name="P12">Définitions et notations</text:p>
          <text:list>
            <text:list-item>
              <text:p text:style-name="P12"><text:s/>Droites sécantes</text:p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Définition :<text:span text:style-name="T1"> Deux droites sécantes sont deux droites qui ont un seul point commun. Ce point est le _____________________________________</text:span></text:p>
          </table:table-cell>
        </table:table-row>
      </table:table>
      <text:p text:style-name="P3"/>
      <text:p text:style-name="P3">Exemple :<text:span text:style-name="T1"> </text:span><text:span text:style-name="T3">Est ce que les droites (d) et (d’) sont elles sécantes ? Si oui, quel est le point d’intersection ?</text:span></text:p>
      <text:p text:style-name="P13"><draw:frame draw:style-name="fr1" draw:name="Image1" text:anchor-type="paragraph" svg:x="-0.363cm" svg:y="0cm" svg:width="10.53cm" svg:height="5.503cm" draw:z-index="0"><draw:image xlink:href="Pictures/100000000000018E000000D0AFF13A964BDFAC2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" text:anchor-type="paragraph" svg:width="20.502cm" svg:height="2.427cm" draw:z-index="1"><draw:image xlink:href="Pictures/100000000000035D0000007BB77DD5818CD7DF93.png" xlink:type="simple" xlink:show="embed" xlink:actuate="onLoad" loext:mime-type="image/png"/></draw:frame></text:p>
      <text:list xml:id="list185003714970919" text:continue-numbering="true" text:style-name="L1">
        <text:list-item>
          <text:list>
            <text:list-item>
              <text:p text:style-name="P12">Droites perpendiculaires<text:line-break/><text:line-break/></text:p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Définition :<text:span text:style-name="T1"> Deux droites </text:span><text:span text:style-name="T2">perpendiculaires</text:span><text:span text:style-name="T1"> sont deux droites qui se coupent en formant __________________________________________<text:line-break/>___________________________________________________________</text:span></text:p>
          </table:table-cell>
        </table:table-row>
      </table:table>
      <text:p text:style-name="P3"/>
      <text:p text:style-name="P5">Exemple :<text:span text:style-name="T1"> Que peut-on dire des droites (d) et (d’) ?</text:span></text:p>
      <text:p text:style-name="P14"/>
      <text:p text:style-name="P14"/>
      <text:p text:style-name="P14"><text:soft-page-break/></text:p>
      <text:p text:style-name="P5"><draw:frame draw:style-name="fr1" draw:name="Image3" text:anchor-type="paragraph" svg:x="0.113cm" svg:y="-0.146cm" svg:width="8.414cm" svg:height="5.9cm" draw:z-index="2"><draw:image xlink:href="Pictures/100000000000013E000000DF2F52109D3A918D57.png" xlink:type="simple" xlink:show="embed" xlink:actuate="onLoad" loext:mime-type="image/png"/></draw:frame><text:span text:style-name="T1"><text:s text:c="19"/></text:span><text:span text:style-name="T4"><text:s text:c="32"/>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width="20.502cm" svg:height="2.427cm" draw:z-index="3"><draw:image xlink:href="Pictures/100000000000035D0000007BB77DD5818CD7DF93.png" xlink:type="simple" xlink:show="embed" xlink:actuate="onLoad" loext:mime-type="image/png"/></draw:frame></text:p>
      <text:p text:style-name="P6">Notation :<text:span text:style-name="T1"> Le symbole </text:span><text:span text:style-name="T1"><draw:frame draw:style-name="fr6" draw:name="Objet1" text:anchor-type="as-char" svg:y="-0.527cm" svg:width="1.887cm" svg:height="0.73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">signifie que « (d) est perpendiculaire à (d’) ».</text:span></text:p>
      <text:p text:style-name="P15"/>
      <text:p text:style-name="P6">Remarques :<text:span text:style-name="T1"> </text:span></text:p>
      <text:list xml:id="list475696518" text:style-name="L2">
        <text:list-item>
          <text:p text:style-name="P16">Deux droites perpendiculaires sont sécantes.</text:p>
        </text:list-item>
        <text:list-item>
          <text:p text:style-name="P16">Pour indiquer que deux droites sont perpendiculaires, on code un seul des quatre angles droites.</text:p>
        </text:list-item>
        <text:list-item>
          <text:p text:style-name="P16">On utilise une équerre pour tracer une droite perpendiculaire à une autre.</text:p>
        </text:list-item>
      </text:list>
      <text:p text:style-name="P15"/>
      <text:p text:style-name="P6"><text:span text:style-name="T1"><text:s text:c="6"/>(3) </text:span>Droites parallèles</text:p>
      <text:p text:style-name="P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Définition :<text:span text:style-name="T1"> Deux droites parallèles sont deux droites qui ne sont pas </text:span><text:span text:style-name="T2">_______________________</text:span></text:p>
          </table:table-cell>
        </table:table-row>
      </table:table>
      <text:p text:style-name="P6"/>
      <text:p text:style-name="P6"><draw:frame draw:style-name="fr3" draw:name="Image5" text:anchor-type="paragraph" svg:x="-0.984cm" svg:y="0.628cm" svg:width="8.599cm" svg:height="5.583cm" draw:z-index="5"><draw:image xlink:href="Pictures/1000000000000145000000D33A7294409B4BDFF0.png" xlink:type="simple" xlink:show="embed" xlink:actuate="onLoad" loext:mime-type="image/png"/></draw:frame>Exemple :<text:span text:style-name="T1"> </text:span></text:p>
      <text:p text:style-name="P17">Que peut-on dire des droites (d) et (d’) ?</text:p>
      <text:p text:style-name="P17"/>
      <text:p text:style-name="P17"/>
      <text:p text:style-name="P17"><text:soft-page-break/></text:p>
      <text:p text:style-name="P17"><draw:frame draw:style-name="fr3" draw:name="Image6" text:anchor-type="paragraph" svg:x="-1.75cm" svg:y="0.265cm" svg:width="20.502cm" svg:height="2.427cm" draw:z-index="6"><draw:image xlink:href="Pictures/100000000000035D0000007BB77DD5818CD7DF93.png" xlink:type="simple" xlink:show="embed" xlink:actuate="onLoad" loext:mime-type="image/png"/></draw:frame></text:p>
      <text:p text:style-name="P17"/>
      <text:p text:style-name="P17"/>
      <text:p text:style-name="P7">Notation :<text:span text:style-name="T1"> Le symbole // signifie « est parallèle à ».</text:span></text:p>
      <text:p text:style-name="P18"/>
      <text:p text:style-name="P18">Cas particulier :<text:line-break/>Lorsque les points A,B et C sont alignés, les droites (AB) et (BC) ont ne infinité de points communs : elles sont confondues.</text:p>
      <text:p text:style-name="P18">Elles ne sont pas sécantes : les droites (AB) et (BC) sont donc parallèles.</text:p>
      <text:p text:style-name="P18"><draw:frame draw:style-name="fr3" draw:name="Image7" text:anchor-type="paragraph" svg:x="-0.125cm" svg:y="0cm" svg:width="9.26cm" svg:height="5.715cm" draw:z-index="7"><draw:image xlink:href="Pictures/100000000000015E000000D85F5A41805FB22DB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85004998777612" text:continue-list="list185003714970919" text:style-name="L1">
        <text:list-item>
          <text:p text:style-name="P12">Pr<text:span text:style-name="T5">ogrammes de constructions</text:span></text:p>
        </text:list-item>
      </text:list>
      <text:p text:style-name="P19"/>
      <text:p text:style-name="P19">- Construire la droite perpendiculaire à (d) passant par le point M.</text:p>
      <text:p text:style-name="P19"><draw:frame draw:style-name="fr4" draw:name="Image8" text:anchor-type="paragraph" svg:width="17cm" svg:height="6.184cm" draw:z-index="8"><draw:image xlink:href="Pictures/100000000000038000000146E93DB52067564BD2.png" xlink:type="simple" xlink:show="embed" xlink:actuate="onLoad" loext:mime-type="image/png"/></draw:frame></text:p>
      <text:p text:style-name="P20"><text:soft-page-break/>Exemple 1 :<text:span text:style-name="T1"> Construire (d’) la perpendiculaire à (d) passant par M.</text:span></text:p>
      <text:p text:style-name="P20"><draw:frame draw:style-name="fr5" draw:name="Image9" text:anchor-type="paragraph" svg:width="12.356cm" svg:height="7.355cm" draw:z-index="9"><draw:image xlink:href="Pictures/10000000000001D3000001166B712622AD8E92D5.png" xlink:type="simple" xlink:show="embed" xlink:actuate="onLoad" loext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>- Construire la droite parallèle à (d) passant par le point N.</text:span></text:p>
      <text:p text:style-name="P20"><draw:frame draw:style-name="fr4" draw:name="Image10" text:anchor-type="paragraph" svg:width="17cm" svg:height="6.523cm" draw:z-index="10"><draw:image xlink:href="Pictures/100000000000037600000154F3A759B874F43890.png" xlink:type="simple" xlink:show="embed" xlink:actuate="onLoad" loext:mime-type="image/png"/></draw:frame>Exemple 2 :<text:span text:style-name="T1"> Construire (d’) la droite parallèle à (d) passant par N.</text:span></text:p>
      <text:p text:style-name="P20"><draw:frame draw:style-name="fr5" draw:name="Image11" text:anchor-type="paragraph" svg:width="11.774cm" svg:height="8.652cm" draw:z-index="11"><draw:image xlink:href="Pictures/10000000000001BD0000014705F048BE074B94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7:43:48.706000000</meta:creation-date>
    <dc:date>2020-12-13T18:50:03.129000000</dc:date>
    <meta:editing-duration>PT20M45S</meta:editing-duration>
    <meta:editing-cycles>3</meta:editing-cycles>
    <meta:generator>LibreOffice/6.2.3.2$Windows_X86_64 LibreOffice_project/aecc05fe267cc68dde00352a451aa867b3b546ac</meta:generator>
    <meta:document-statistic meta:table-count="4" meta:image-count="11" meta:object-count="1" meta:page-count="4" meta:paragraph-count="28" meta:word-count="270" meta:character-count="1812" meta:non-whitespace-character-count="143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i>d</mi>
        </mrow>
        <mo fence="true" stretchy="false">)</mo>
      </mrow>
      <mo stretchy="false">⊥</mo>
      <mrow>
        <mo fence="true" stretchy="false">(</mo>
        <mrow>
          <mrow>
            <mi>d</mi>
            <mi>'</mi>
          </mrow>
        </mrow>
        <mo fence="true" stretchy="false">)</mo>
      </mrow>
    </mrow>
    <annotation encoding="StarMath 5.0">(d) ortho ( d' ) </annotation>
  </semantics>
</math>
</file>