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CF000000BA7C79FF88E7125F76.png" manifest:media-type="image/png"/>
  <manifest:file-entry manifest:full-path="Pictures/10000000000002D900000079A2A812C8E0F82BBE.png" manifest:media-type="image/png"/>
  <manifest:file-entry manifest:full-path="Pictures/10000000000000EC000000F3EB7F741AE11066F5.png" manifest:media-type="image/png"/>
  <manifest:file-entry manifest:full-path="Pictures/10000000000003070000011AC770BC003AD0BEF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OpenDyslexic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OpenDyslexic" officeooo:paragraph-rsid="00104e5a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104e5a" officeooo:paragraph-rsid="00104e5a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120bb1" officeooo:paragraph-rsid="00120bb1"/>
    </style:style>
    <style:style style:name="P6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120bb1" officeooo:paragraph-rsid="00120bb1"/>
    </style:style>
    <style:style style:name="P7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125de3" officeooo:paragraph-rsid="00125de3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125de3" officeooo:paragraph-rsid="00125de3"/>
    </style:style>
    <style:style style:name="P9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12f046" officeooo:paragraph-rsid="0012f046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12f046" officeooo:paragraph-rsid="0012f046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144a74" officeooo:paragraph-rsid="00144a74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15ce0d" officeooo:paragraph-rsid="0015ce0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OpenDyslexic" officeooo:rsid="00125de3" officeooo:paragraph-rsid="00125de3"/>
    </style:style>
    <style:style style:name="P14" style:family="paragraph" style:parent-style-name="Table_20_Contents">
      <style:paragraph-properties fo:text-align="start" style:justify-single-word="false"/>
      <style:text-properties style:font-name="OpenDyslexic" officeooo:rsid="00104e5a" officeooo:paragraph-rsid="00104e5a"/>
    </style:style>
    <style:style style:name="P15" style:family="paragraph" style:parent-style-name="Table_20_Contents">
      <style:paragraph-properties fo:text-align="start" style:justify-single-word="false"/>
      <style:text-properties style:font-name="OpenDyslexic" officeooo:rsid="00120bb1" officeooo:paragraph-rsid="00120bb1"/>
    </style:style>
    <style:style style:name="P16" style:family="paragraph" style:parent-style-name="Table_20_Contents" style:list-style-name="L2">
      <style:paragraph-properties fo:text-align="start" style:justify-single-word="false"/>
      <style:text-properties style:font-name="OpenDyslexic" officeooo:rsid="0012f046" officeooo:paragraph-rsid="0012f046"/>
    </style:style>
    <style:style style:name="P17" style:family="paragraph" style:parent-style-name="Table_20_Contents" style:list-style-name="L3">
      <style:paragraph-properties fo:text-align="start" style:justify-single-word="false"/>
      <style:text-properties style:font-name="OpenDyslexic" officeooo:rsid="00144a74" officeooo:paragraph-rsid="00144a7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0bb1"/>
    </style:style>
    <style:style style:name="T3" style:family="text">
      <style:text-properties style:text-underline-style="none" officeooo:rsid="00144a7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25de3"/>
    </style:style>
    <style:style style:name="T6" style:family="text">
      <style:text-properties style:text-underline-style="solid" style:text-underline-width="auto" style:text-underline-color="font-color" officeooo:rsid="00104e5a"/>
    </style:style>
    <style:style style:name="T7" style:family="text">
      <style:text-properties officeooo:rsid="00120bb1"/>
    </style:style>
    <style:style style:name="T8" style:family="text">
      <style:text-properties officeooo:rsid="00144a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Collège A.Lejeune <text:s text:c="66"/>6ème</text:p>
            <text:p text:style-name="P14">Cours <text:s text:c="17"/>Chapitre 2 : Les nombres entiers 2</text:p>
          </table:table-cell>
        </table:table-row>
      </table:table>
      <text:p text:style-name="P2"/>
      <text:list xml:id="list1899033422" text:style-name="L1">
        <text:list-item>
          <text:p text:style-name="P4">Multiplication<text:line-break/>Définitions :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>Les nombres que l’on multiplie s’appellent les ………….<text:line-break/>Le résultat d’une multiplication s’appelle le ……………..</text:p>
          </table:table-cell>
        </table:table-row>
      </table:table>
      <text:list xml:id="list172658321306814" text:continue-numbering="true" text:style-name="L1">
        <text:list-header>
          <text:p text:style-name="P4"><draw:frame draw:style-name="fr1" draw:name="Image1" text:anchor-type="paragraph" svg:x="-1.118cm" svg:y="1.535cm" svg:width="18.364cm" svg:height="4.921cm" draw:z-index="1"><draw:image xlink:href="Pictures/10000000000001CF000000BA7C79FF88E7125F76.png" xlink:type="simple" xlink:show="embed" xlink:actuate="onLoad" loext:mime-type="image/png"/></draw:frame><text:line-break/>Exemple 1 :<text:span text:style-name="T1"> Pose et calcule </text:span><text:span text:style-name="T1"><draw:frame draw:style-name="fr3" draw:name="Objet1" text:anchor-type="as-char" svg:y="-0.527cm" svg:width="1.845cm" svg:height="0.7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line-break/>Les nombres 83 et 117 sont les ……………..... de la multiplication.<text:line-break/>Le résultat <text:s/>………… est le …………<text:line-break/></text:span>Propriété :</text:p>
        </text:list-header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Dans une multiplication, on a le droit de regrouper des facteurs ou de changer des facteurs de place.</text:p>
          </table:table-cell>
        </table:table-row>
      </table:table>
      <text:list xml:id="list172658974890085" text:continue-numbering="true" text:style-name="L1">
        <text:list-header>
          <text:p text:style-name="P4"><draw:frame draw:style-name="fr1" draw:name="Image2" text:anchor-type="paragraph" svg:x="-1.595cm" svg:y="1.72cm" svg:width="20.586cm" svg:height="2.715cm" draw:z-index="3"><draw:image xlink:href="Pictures/10000000000002D900000079A2A812C8E0F82BBE.png" xlink:type="simple" xlink:show="embed" xlink:actuate="onLoad" loext:mime-type="image/png"/></draw:frame><text:span text:style-name="T1"><text:line-break/></text:span><text:span text:style-name="T7">Exemple 2 :</text:span><text:span text:style-name="T2"> Calcule astucieusement </text:span><text:span text:style-name="T2"><draw:frame draw:style-name="fr3" draw:name="Objet2" text:anchor-type="as-char" svg:y="-0.527cm" svg:width="2.244cm" svg:height="0.73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line-break/></text:span></text:p>
        </text:list-header>
        <text:list-item>
          <text:p text:style-name="P4">Division euclidienne<text:line-break/><text:span text:style-name="T7">Règle :</text:span></text:p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5">Dans une division euclidienne on a toujours :<text:line-break/><draw:frame draw:style-name="fr3" draw:name="Objet3" text:anchor-type="as-char" svg:y="-0.527cm" svg:width="9.379cm" svg:height="0.739cm" draw:z-index="4"><draw:object xlink:href="./Object 3" xlink:type="simple" xlink:show="embed" xlink:actuate="onLoad"/><draw:image xlink:href="./ObjectReplacements/Object 3" xlink:type="simple" xlink:show="embed" xlink:actuate="onLoad"/></draw:frame> avec …..……………………………..</text:p>
          </table:table-cell>
        </table:table-row>
      </table:table>
      <text:list xml:id="list172657470307814" text:continue-numbering="true" text:style-name="L1">
        <text:list-header>
          <text:p text:style-name="P5"><text:soft-page-break/>Exemple 1 :<text:span text:style-name="T1"> Pose la division de 893 par 13.</text:span></text:p>
        </text:list-header>
      </text:list>
      <text:p text:style-name="P6"><draw:frame draw:style-name="fr1" draw:name="Image3" text:anchor-type="paragraph" svg:x="1.277cm" svg:y="0.238cm" svg:width="7.317cm" svg:height="7.156cm" draw:z-index="5"><draw:image xlink:href="Pictures/10000000000000EC000000F3EB7F741AE11066F5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draw:frame draw:style-name="fr1" draw:name="Image4" text:anchor-type="paragraph" svg:x="-1.595cm" svg:y="1.72cm" svg:width="20.586cm" svg:height="2.715cm" draw:z-index="6"><draw:image xlink:href="Pictures/10000000000002D900000079A2A812C8E0F82BBE.png" xlink:type="simple" xlink:show="embed" xlink:actuate="onLoad" loext:mime-type="image/png"/></draw:frame>Exemple 2 :<text:span text:style-name="T1"> Un fleuriste a reçu 260 roses. Il prépare des corbeilles de 12 roses chacune. Combien de corbeilles peut-il préparer ?<text:line-break/></text:span></text:p>
      <text:list xml:id="list172657532810232" text:continue-numbering="true" text:style-name="L1">
        <text:list-item>
          <text:p text:style-name="P3"><text:span text:style-name="T6">Divisibilité</text:span></text:p>
          <text:list>
            <text:list-item>
              <text:p text:style-name="P13"><text:span text:style-name="T5">M</text:span><text:span text:style-name="T4">ultiples et diviseurs d’un nombre entier<text:line-break/></text:span><text:span text:style-name="T1">- Après avoir effectué la division euclidienne de 3 577 par 49, on obtient </text:span><text:span text:style-name="T1"><draw:frame draw:style-name="fr3" draw:name="Objet4" text:anchor-type="as-char" svg:y="-0.527cm" svg:width="3.023cm" svg:height="0.739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">.<text:line-break/>- Le reste étant nul, 3 577 est un m……………… <text:s text:c="4"/>de 49 ( est de 73 aussi !).<text:line-break/>- On dit également que 3 577 est d………………. par 49 ou que 49 est un d…………….. de 3 577 ou que 49 d………………… <text:s/>3577.</text:span></text:p>
            </text:list-item>
            <text:list-item>
              <text:p text:style-name="P8">Critères de divisibilité<text:line-break/>Règles :</text:p>
            </text:list-item>
          </text:list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list xml:id="list2134515849" text:style-name="L2">
              <text:list-item>
                <text:p text:style-name="P16">Un nombre entier est divisible par 2 si son chiffre des unités est ……<text:line-break/>……………………………………………………….</text:p>
              </text:list-item>
              <text:list-item>
                <text:p text:style-name="P16">Un nombre entier est divisible par 5 si son chiffre des unités est ……<text:line-break/>……………….</text:p>
              </text:list-item>
              <text:list-item>
                <text:p text:style-name="P16">Un nombre entier est divisible par 4 si le nombre formé par son <text:soft-page-break/>chiffre des dizaines et son chiffre des unités (dans cet ordre) est un multiple de 4.</text:p>
              </text:list-item>
              <text:list-item>
                <text:p text:style-name="P16">Un nombre entier est divisible par 3 si la ……………………………………..<text:line-break/>………………………</text:p>
              </text:list-item>
              <text:list-item>
                <text:p text:style-name="P16">Un nombre entier est divisible par 9 si la ………………………………………<text:line-break/>……………………...</text:p>
              </text:list-item>
            </text:list>
          </table:table-cell>
        </table:table-row>
      </table:table>
      <text:p text:style-name="P9">Exemple :<text:span text:style-name="T1"> On considère le nombre 23 928. Est-il divisible par 2, 5, 4, 3 et 9 ?</text:span></text:p>
      <text:p text:style-name="P9"><draw:frame draw:style-name="fr2" draw:name="Image5" text:anchor-type="paragraph" svg:width="17cm" svg:height="6.184cm" draw:z-index="8"><draw:image xlink:href="Pictures/10000000000003070000011AC770BC003AD0BEF8.png" xlink:type="simple" xlink:show="embed" xlink:actuate="onLoad" loext:mime-type="image/png"/></draw:frame><text:span text:style-name="T1"/></text:p>
      <text:list xml:id="list172659102803781" text:continue-list="list172657532810232" text:style-name="L1">
        <text:list-item>
          <text:p text:style-name="P4">Opérations sur les durées</text:p>
          <text:list>
            <text:list-item>
              <text:p text:style-name="P10">Conversion en minutes ou en secondes</text:p>
            </text:list-item>
          </text:list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list xml:id="list3397100559" text:style-name="L3">
              <text:list-item>
                <text:p text:style-name="P17">Dans une minute, il y a ……………………… secondes</text:p>
              </text:list-item>
              <text:list-item>
                <text:p text:style-name="P17">Dans une heure, il y a ……………………….. minutes</text:p>
              </text:list-item>
              <text:list-item>
                <text:p text:style-name="P17">Dans une journée, il y a …………………….. heures</text:p>
              </text:list-item>
              <text:list-item>
                <text:p text:style-name="P17">Dans une semaine, il y a ……………………. jours</text:p>
              </text:list-item>
            </text:list>
          </table:table-cell>
        </table:table-row>
      </table:table>
      <text:list xml:id="list172658775519442" text:continue-list="list172659102803781" text:style-name="L1">
        <text:list-item>
          <text:list>
            <text:list-header>
              <text:p text:style-name="P11">Exemples :<text:span text:style-name="T1"><text:line-break/>a. Combien y-a-t-il de minutes dans 5h 27 min ?</text:span></text:p>
              <text:p text:style-name="P11"><text:span text:style-name="T1">b. Combien y-a-t-il de secondes dans 2h 47 min 53 s ?<text:line-break/></text:span></text:p>
              <text:p text:style-name="P11"><text:span text:style-name="T1"/></text:p>
            </text:list-header>
            <text:list-item>
              <text:p text:style-name="P10"><draw:frame draw:style-name="fr1" draw:name="Image6" text:anchor-type="paragraph" svg:x="-2.02cm" svg:y="0.392cm" svg:width="20.886cm" svg:height="5.41cm" draw:z-index="9"><draw:image xlink:href="Pictures/10000000000003070000011AC770BC003AD0BEF8.png" xlink:type="simple" xlink:show="embed" xlink:actuate="onLoad" loext:mime-type="image/png"/></draw:frame><draw:frame draw:style-name="fr1" draw:name="Image7" text:anchor-type="paragraph" svg:x="-2cm" svg:y="8.461cm" svg:width="20.886cm" svg:height="5.41cm" draw:z-index="10"><draw:image xlink:href="Pictures/10000000000003070000011AC770BC003AD0BEF8.png" xlink:type="simple" xlink:show="embed" xlink:actuate="onLoad" loext:mime-type="image/png"/></draw:frame><text:soft-page-break/>Conversion en heures, minutes et secondes<text:line-break/><text:span text:style-name="T8">Exemple :</text:span><text:span text:style-name="T3">Combien y-a-t-il d’heures, minutes et secondes dans 41000 secondes ?</text:span></text:p>
            </text:list-item>
            <text:list-item>
              <text:p text:style-name="P12"><draw:frame draw:style-name="fr1" draw:name="Image8" text:anchor-type="paragraph" svg:x="-1.887cm" svg:y="8.34cm" svg:width="20.886cm" svg:height="4.801cm" draw:z-index="11"><draw:image xlink:href="Pictures/10000000000003070000011AC770BC003AD0BEF8.png" xlink:type="simple" xlink:show="embed" xlink:actuate="onLoad" loext:mime-type="image/png"/></draw:frame><text:span text:style-name="T8">A</text:span>ddition de durées<text:line-break/>Exemple :<text:span text:style-name="T1"> Un match dure 3h 38 min et le suivant dure 2h 49 min. Quelle est la durée totale de ces deux matchs ?</text:span></text:p>
              <text:p text:style-name="P12"><text:span text:style-name="T1"/></text:p>
            </text:list-item>
            <text:list-item>
              <text:p text:style-name="P12">Soustraction de durées<text:line-break/>Exemple :<text:span text:style-name="T1"> Un film débute à 15h 27 et finit à 18h 14. Quelle est la durée de ce film 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6:27:39.002000000</meta:creation-date>
    <dc:date>2020-10-04T17:26:56.620000000</dc:date>
    <meta:editing-duration>PT7M53S</meta:editing-duration>
    <meta:editing-cycles>2</meta:editing-cycles>
    <meta:generator>LibreOffice/6.2.3.2$Windows_X86_64 LibreOffice_project/aecc05fe267cc68dde00352a451aa867b3b546ac</meta:generator>
    <meta:document-statistic meta:table-count="6" meta:image-count="8" meta:object-count="4" meta:page-count="4" meta:paragraph-count="32" meta:word-count="448" meta:character-count="2436" meta:non-whitespace-character-count="1942"/>
  </office:meta>
</office:document-meta>
</file>

<file path=Object 1/content.xml><?xml version="1.0" encoding="utf-8"?>
<math xmlns="http://www.w3.org/1998/Math/MathML" display="block">
  <semantics>
    <mrow>
      <mn>83</mn>
      <mo stretchy="false">×</mo>
      <mn>117</mn>
    </mrow>
    <annotation encoding="StarMath 5.0">83 times 117</annotation>
  </semantics>
</math>
</file>

<file path=Object 2/content.xml><?xml version="1.0" encoding="utf-8"?>
<math xmlns="http://www.w3.org/1998/Math/MathML" display="block">
  <semantics>
    <mrow>
      <mn>4</mn>
      <mo stretchy="false">×</mo>
      <mn>56</mn>
      <mo stretchy="false">×</mo>
      <mn>25</mn>
    </mrow>
    <annotation encoding="StarMath 5.0">4 times 56 times 25</annotation>
  </semantics>
</math>
</file>

<file path=Object 3/content.xml><?xml version="1.0" encoding="utf-8"?>
<math xmlns="http://www.w3.org/1998/Math/MathML" display="block">
  <semantics>
    <mrow>
      <mi>d</mi>
      <mrow>
        <mn>...............</mn>
        <mo stretchy="false">=</mo>
        <mrow>
          <mrow>
            <mo fence="true" stretchy="false">(</mo>
            <mrow>
              <mrow>
                <mi>d</mi>
                <mrow>
                  <mn>..............</mn>
                  <mo stretchy="false">×</mo>
                  <mi>q</mi>
                </mrow>
                <mn>................</mn>
              </mrow>
            </mrow>
            <mo fence="true" stretchy="false">)</mo>
          </mrow>
          <mo stretchy="false">+</mo>
          <mi>r</mi>
        </mrow>
      </mrow>
      <mn>........</mn>
      <mi>.</mi>
    </mrow>
    <annotation encoding="StarMath 5.0">d...............= ( d.............. times q................ ) + r.........</annotation>
  </semantics>
</math>
</file>

<file path=Object 4/content.xml><?xml version="1.0" encoding="utf-8"?>
<math xmlns="http://www.w3.org/1998/Math/MathML" display="block">
  <semantics>
    <mrow>
      <mn>3577</mn>
      <mo stretchy="false">=</mo>
      <mrow>
        <mn>49</mn>
        <mo stretchy="false">×</mo>
        <mn>73</mn>
      </mrow>
    </mrow>
    <annotation encoding="StarMath 5.0">3577 = 49 times 73</annotation>
  </semantics>
</math>
</file>