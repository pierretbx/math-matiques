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E000000A707FA35CD7A8B65BF.png" manifest:media-type="image/png"/>
  <manifest:file-entry manifest:full-path="Pictures/1000020100000125000000874F8F646FE99233F9.png" manifest:media-type="image/png"/>
  <manifest:file-entry manifest:full-path="Pictures/1000020100000121000000F5FD6A80C771B81DA7.png" manifest:media-type="image/png"/>
  <manifest:file-entry manifest:full-path="Pictures/1000020100000370000001497659DC3C4268D303.png" manifest:media-type="image/png"/>
  <manifest:file-entry manifest:full-path="Pictures/1000020100000362000000D195C0862C44349E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 style:list-style-name="L1">
      <style:text-properties style:font-name="OpenDyslexic" style:text-underline-style="solid" style:text-underline-width="auto" style:text-underline-color="font-color" officeooo:rsid="001015d4" officeooo:paragraph-rsid="001015d4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1015d4" officeooo:paragraph-rsid="001015d4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2ed9b" officeooo:paragraph-rsid="0012ed9b"/>
    </style:style>
    <style:style style:name="P5" style:family="paragraph" style:parent-style-name="Standard" style:list-style-name="L2">
      <style:text-properties style:font-name="OpenDyslexic" style:text-underline-style="solid" style:text-underline-width="auto" style:text-underline-color="font-color" officeooo:rsid="0012ed9b" officeooo:paragraph-rsid="0012ed9b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14e1f4" officeooo:paragraph-rsid="0014e1f4"/>
    </style:style>
    <style:style style:name="P7" style:family="paragraph" style:parent-style-name="Standard">
      <style:text-properties style:font-name="OpenDyslexic" style:text-underline-style="none" officeooo:rsid="001015d4" officeooo:paragraph-rsid="001015d4"/>
    </style:style>
    <style:style style:name="P8" style:family="paragraph" style:parent-style-name="Standard">
      <style:text-properties style:font-name="OpenDyslexic" style:text-underline-style="none" officeooo:rsid="0012ed9b" officeooo:paragraph-rsid="0012ed9b"/>
    </style:style>
    <style:style style:name="P9" style:family="paragraph" style:parent-style-name="Standard">
      <style:text-properties style:font-name="OpenDyslexic" style:text-underline-style="none" officeooo:rsid="0014e1f4" officeooo:paragraph-rsid="0014e1f4"/>
    </style:style>
    <style:style style:name="P10" style:family="paragraph" style:parent-style-name="Table_20_Contents">
      <style:text-properties style:font-name="OpenDyslexic" officeooo:rsid="001015d4" officeooo:paragraph-rsid="001015d4"/>
    </style:style>
    <style:style style:name="P11" style:family="paragraph" style:parent-style-name="Table_20_Contents">
      <style:text-properties style:font-name="OpenDyslexic" officeooo:rsid="00113749" officeooo:paragraph-rsid="00113749"/>
    </style:style>
    <style:style style:name="P12" style:family="paragraph" style:parent-style-name="Table_20_Contents">
      <style:text-properties style:font-name="OpenDyslexic" officeooo:rsid="0012ed9b" officeooo:paragraph-rsid="0012ed9b"/>
    </style:style>
    <style:style style:name="P13" style:family="paragraph" style:parent-style-name="Table_20_Contents">
      <style:text-properties style:font-name="OpenDyslexic" officeooo:rsid="0014e1f4" officeooo:paragraph-rsid="0014e1f4"/>
    </style:style>
    <style:style style:name="P14" style:family="paragraph" style:parent-style-name="Table_20_Contents">
      <style:text-properties style:font-name="OpenDyslexic" style:text-underline-style="solid" style:text-underline-width="auto" style:text-underline-color="font-color"/>
    </style:style>
    <style:style style:name="P15" style:family="paragraph" style:parent-style-name="Table_20_Contents">
      <style:text-properties style:font-name="OpenDyslexic" style:text-underline-style="solid" style:text-underline-width="auto" style:text-underline-color="font-color" officeooo:rsid="0014e1f4" officeooo:paragraph-rsid="0014e1f4"/>
    </style:style>
    <style:style style:name="P16" style:family="paragraph" style:parent-style-name="Table_20_Contents">
      <style:text-properties style:font-name="OpenDyslexic" style:text-underline-style="solid" style:text-underline-width="auto" style:text-underline-color="font-color" officeooo:rsid="001524f9" officeooo:paragraph-rsid="001524f9"/>
    </style:style>
    <style:style style:name="P17" style:family="paragraph" style:parent-style-name="Table_20_Contents">
      <style:text-properties style:font-name="OpenDyslexic" style:text-underline-style="none" officeooo:rsid="0014e1f4" officeooo:paragraph-rsid="0014e1f4"/>
    </style:style>
    <style:style style:name="P18" style:family="paragraph" style:parent-style-name="Table_20_Contents">
      <style:text-properties style:font-name="OpenDyslexic" style:text-underline-style="none" officeooo:rsid="001524f9" officeooo:paragraph-rsid="001524f9"/>
    </style:style>
    <style:style style:name="T1" style:family="text">
      <style:text-properties officeooo:rsid="0012ed9b"/>
    </style:style>
    <style:style style:name="T2" style:family="text">
      <style:text-properties style:text-underline-style="none"/>
    </style:style>
    <style:style style:name="T3" style:family="text">
      <style:text-properties officeooo:rsid="0014e1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Collège A.Lejeune <text:s text:c="64"/>6ème</text:p>
            <text:p text:style-name="P10">Cours <text:s text:c="26"/>Chapitre 12 : La symétrie axiale</text:p>
          </table:table-cell>
        </table:table-row>
      </table:table>
      <text:p text:style-name="P1"/>
      <text:list xml:id="list4163892563" text:style-name="L1">
        <text:list-item>
          <text:p text:style-name="P2">Figures symétriques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Définitions :</text:p>
            <text:p text:style-name="P10">Deux figures sont symétriques par rapport à une droite si elles se superposent par pliage le long de cette droite. Cette droite est appelée l’…………………………..</text:p>
          </table:table-cell>
        </table:table-row>
      </table:table>
      <text:p text:style-name="P7"/>
      <text:p text:style-name="P3">Exemple :</text:p>
      <text:p text:style-name="P7"><draw:frame draw:style-name="fr1" draw:name="Image1" text:anchor-type="paragraph" svg:x="-0.6cm" svg:y="0.176cm" svg:width="7.144cm" svg:height="4.419cm" draw:z-index="0"><draw:image xlink:href="Pictures/100002010000010E000000A707FA35CD7A8B65BF.png" xlink:type="simple" xlink:show="embed" xlink:actuate="onLoad" loext:mime-type="image/png"/></draw:frame><text:s/>Les figures 1 et 2 se superposent par pliage le long de la droite (d) donc elles sont symétriques par rapport à la droite (d).</text:p>
      <text:p text:style-name="P7">On dit également que la figure 2 est le symétrique de la figure 1 dans la symétrie axiale d’axe (d).</text:p>
      <text:p text:style-name="P7"/>
      <text:p text:style-name="P7">Deux points sont symétriques par rapport à une droite s’ils se superposent par pliage le long de cette droite.</text:p>
      <text:p text:style-name="P7">Ici, les points A et M sont symétriques par rapport à la droite (d).</text:p>
      <text:p text:style-name="P7"/>
      <text:list xml:id="list212717425227206" text:continue-numbering="true" text:style-name="L1">
        <text:list-item>
          <text:p text:style-name="P2">Symétrique d’un point</text:p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1">Définition :</text:p>
            <text:p text:style-name="P11">Le symétrique d’un point <text:span text:style-name="T1">A par rapport à une droite (d) est le point M tel que la droite (d) soit la médiatrice du segment [AM] (tel que (d) soit la perpendiculaire au segment [AM] en son milieu).</text:span></text:p>
          </table:table-cell>
        </table:table-row>
      </table:table>
      <text:p text:style-name="P3"/>
      <text:p text:style-name="P4">Remarque :<text:span text:style-name="T2"> Si un point appartient à une droite alors son symétrique par rapport à cette droite est le point lui-même.</text:span></text:p>
      <text:p text:style-name="P4">Exemple :<text:span text:style-name="T2"> Construis le point S, symétrique du point P par rapport à la droite (d).</text:span></text:p>
      <text:list xml:id="list1549621753" text:style-name="L2">
        <text:list-item>
          <text:p text:style-name="P5">Dans un quadrillage</text:p>
        </text:list-item>
      </text:list>
      <text:p text:style-name="P4"/>
      <text:p text:style-name="P8"><text:soft-page-break/>Axe de symétrie horizontal ou vertical</text:p>
      <text:p text:style-name="P8"><draw:frame draw:style-name="fr1" draw:name="Image2" text:anchor-type="paragraph" svg:x="2.185cm" svg:y="0cm" svg:width="7.752cm" svg:height="3.572cm" draw:z-index="1"><draw:image xlink:href="Pictures/1000020100000125000000874F8F646FE99233F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Axe de symétrie en diagonale</text:p>
      <text:p text:style-name="P8"><draw:frame draw:style-name="fr1" draw:name="Image3" text:anchor-type="paragraph" svg:x="0.855cm" svg:y="0.416cm" svg:width="7.646cm" svg:height="6.482cm" draw:z-index="2"><draw:image xlink:href="Pictures/1000020100000121000000F5FD6A80C771B81DA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12718225384847" text:continue-numbering="true" text:style-name="L2">
        <text:list-item>
          <text:p text:style-name="P5">Avec le compas</text:p>
        </text:list-item>
      </text:list>
      <text:p text:style-name="P4"><draw:frame draw:style-name="fr2" draw:name="Image4" text:anchor-type="paragraph" svg:width="17cm" svg:height="6.355cm" draw:z-index="3"><draw:image xlink:href="Pictures/1000020100000370000001497659DC3C4268D303.png" xlink:type="simple" xlink:show="embed" xlink:actuate="onLoad" loext:mime-type="image/png"/></draw:frame></text:p>
      <text:list xml:id="list212718976825151" text:continue-list="list212717425227206" text:style-name="L1">
        <text:list-item>
          <text:p text:style-name="P2">Symétrique de figures usuelles et propriétés de la symétrie axiale</text:p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2">Propriétés :</text:p>
            <text:p text:style-name="P12">Le symétrique d’une droite par rapport à un axe est une droite.</text:p>
            <text:p text:style-name="P12">La symétrie axiale conserve l’alignement.</text:p>
          </table:table-cell>
        </table:table-row>
      </table:table>
      <text:p text:style-name="P3"/>
      <text:p text:style-name="P6"><text:soft-page-break/>Remarque :<text:span text:style-name="T2"> Le symétrique du milieu d’un segment est le milieu du segment symétrique.</text:span></text:p>
      <text:p text:style-name="P6"><text:span text:style-name="T2"/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5">Propriété :</text:p>
            <text:p text:style-name="P13">Le symétrique d’un cercle par rapport à un axe est un cercle de m^me rayon.</text:p>
            <text:p text:style-name="P13">Les centres des cercles sont symétriques par rapport à cet axe.</text:p>
          </table:table-cell>
        </table:table-row>
      </table:table>
      <text:p text:style-name="P9"/>
      <text:p text:style-name="P6">Exemples :</text:p>
      <text:p text:style-name="P9"><draw:frame draw:style-name="fr2" draw:name="Image5" text:anchor-type="paragraph" svg:width="17cm" svg:height="4.101cm" draw:z-index="4"><draw:image xlink:href="Pictures/1000020100000362000000D195C0862C44349ED5.png" xlink:type="simple" xlink:show="embed" xlink:actuate="onLoad" loext:mime-type="image/png"/></draw:frame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4">P<text:span text:style-name="T3">ropriété :</text:span></text:p>
            <text:p text:style-name="P17">La symétrie axiale conserve les mesures des angles, les périmètres et les aires.</text:p>
          </table:table-cell>
        </table:table-row>
      </table:table>
      <text:p text:style-name="P9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6">Propriété :</text:p>
            <text:p text:style-name="P18">Pour construire le symétrique d’une figure complexe, on la décompose en figures usuelles et on construit le symétrique de chacune d’elles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0T18:22:18.947000000</meta:creation-date>
    <dc:date>2021-06-20T21:27:16.950000000</dc:date>
    <meta:editing-duration>PT1M32S</meta:editing-duration>
    <meta:editing-cycles>1</meta:editing-cycles>
    <meta:document-statistic meta:table-count="7" meta:image-count="5" meta:object-count="0" meta:page-count="3" meta:paragraph-count="32" meta:word-count="332" meta:character-count="1955" meta:non-whitespace-character-count="1569"/>
    <meta:generator>LibreOffice/6.2.3.2$Windows_X86_64 LibreOffice_project/aecc05fe267cc68dde00352a451aa867b3b546ac</meta:generator>
  </office:meta>
</office:document-meta>
</file>