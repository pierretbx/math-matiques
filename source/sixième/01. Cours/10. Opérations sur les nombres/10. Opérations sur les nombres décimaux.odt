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260000009A5CB3C9FE8CB5758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429cm" style:rel-column-width="9362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429cm" style:rel-column-width="9362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G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P1" style:family="paragraph" style:parent-style-name="Standard" style:list-style-name="L1">
      <style:text-properties style:font-name="OpenDyslexic" style:text-underline-style="solid" style:text-underline-width="auto" style:text-underline-color="font-color" officeooo:rsid="000f49f4" officeooo:paragraph-rsid="000f49f4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f49f4" officeooo:paragraph-rsid="000f49f4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f67a3" officeooo:paragraph-rsid="000f67a3"/>
    </style:style>
    <style:style style:name="P4" style:family="paragraph" style:parent-style-name="Standard" style:list-style-name="L1">
      <style:text-properties style:font-name="OpenDyslexic" style:text-underline-style="solid" style:text-underline-width="auto" style:text-underline-color="font-color" officeooo:rsid="00111ede" officeooo:paragraph-rsid="00111ede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11ede" officeooo:paragraph-rsid="00111ede"/>
    </style:style>
    <style:style style:name="P6" style:family="paragraph" style:parent-style-name="Standard">
      <style:text-properties style:font-name="OpenDyslexic" style:text-underline-style="none" officeooo:rsid="000f67a3" officeooo:paragraph-rsid="000f67a3"/>
    </style:style>
    <style:style style:name="P7" style:family="paragraph" style:parent-style-name="Standard" style:list-style-name="L2">
      <style:text-properties style:font-name="OpenDyslexic" style:text-underline-style="none" officeooo:rsid="000f67a3" officeooo:paragraph-rsid="000f67a3"/>
    </style:style>
    <style:style style:name="P8" style:family="paragraph" style:parent-style-name="Table_20_Contents">
      <style:text-properties style:font-name="OpenDyslexic"/>
    </style:style>
    <style:style style:name="P9" style:family="paragraph" style:parent-style-name="Table_20_Contents">
      <style:text-properties style:font-name="OpenDyslexic" officeooo:rsid="000f49f4" officeooo:paragraph-rsid="000f49f4"/>
    </style:style>
    <style:style style:name="P10" style:family="paragraph" style:parent-style-name="Table_20_Contents">
      <style:text-properties style:font-name="OpenDyslexic" style:text-underline-style="solid" style:text-underline-width="auto" style:text-underline-color="font-color" officeooo:rsid="000f49f4" officeooo:paragraph-rsid="000f49f4"/>
    </style:style>
    <style:style style:name="P11" style:family="paragraph" style:parent-style-name="Table_20_Contents">
      <style:text-properties style:font-name="OpenDyslexic" style:text-underline-style="solid" style:text-underline-width="auto" style:text-underline-color="font-color" officeooo:rsid="00111ede" officeooo:paragraph-rsid="00111ede"/>
    </style:style>
    <style:style style:name="P12" style:family="paragraph" style:parent-style-name="Table_20_Contents">
      <style:text-properties style:font-name="OpenDyslexic" style:text-underline-style="none" officeooo:rsid="000f49f4" officeooo:paragraph-rsid="000f49f4"/>
    </style:style>
    <style:style style:name="P13" style:family="paragraph" style:parent-style-name="Table_20_Contents">
      <style:text-properties style:font-name="OpenDyslexic" style:text-underline-style="none" officeooo:rsid="00111ede" officeooo:paragraph-rsid="00111ede"/>
    </style:style>
    <style:style style:name="P14" style:family="paragraph" style:parent-style-name="Table_20_Contents" style:list-style-name="L5">
      <style:text-properties style:font-name="OpenDyslexic" style:text-underline-style="none" officeooo:rsid="00111ede" officeooo:paragraph-rsid="00111ede"/>
    </style:style>
    <style:style style:name="P15" style:family="paragraph" style:parent-style-name="Table_20_Contents">
      <style:paragraph-properties fo:text-align="center" style:justify-single-word="false"/>
      <style:text-properties style:font-name="OpenDyslexic"/>
    </style:style>
    <style:style style:name="P16" style:family="paragraph" style:parent-style-name="Table_20_Contents">
      <style:paragraph-properties fo:text-align="center" style:justify-single-word="false"/>
      <style:text-properties style:font-name="OpenDyslexic" officeooo:rsid="000f67a3" officeooo:paragraph-rsid="000f67a3"/>
    </style:style>
    <style:style style:name="P17" style:family="paragraph" style:parent-style-name="Table_20_Contents">
      <style:paragraph-properties fo:text-align="center" style:justify-single-word="false"/>
      <style:text-properties style:font-name="OpenDyslexic" officeooo:rsid="00111ede" officeooo:paragraph-rsid="00111ede"/>
    </style:style>
    <style:style style:name="T1" style:family="text">
      <style:text-properties style:text-underline-style="none"/>
    </style:style>
    <style:style style:name="T2" style:family="text">
      <style:text-properties officeooo:rsid="000f67a3"/>
    </style:style>
    <style:style style:name="T3" style:family="text">
      <style:text-properties officeooo:rsid="00111e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ollège A.Lejeune <text:s text:c="65"/>6ème</text:p>
            <text:p text:style-name="P9">Cours <text:s text:c="11"/>Chapitre 10 : Opérations avec les nombres décimaux</text:p>
          </table:table-cell>
        </table:table-row>
      </table:table>
      <text:p text:style-name="Standard"/>
      <text:p text:style-name="Standard"/>
      <text:p text:style-name="Standard"/>
      <text:list xml:id="list76913009" text:style-name="L1">
        <text:list-item>
          <text:p text:style-name="P1">Ordre de grandeur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Définition :</text:p>
            <text:p text:style-name="P12">Un ordre de grandeur d’un nombre est une valeur approchée simple de ce nombre.</text:p>
          </table:table-cell>
        </table:table-row>
      </table:table>
      <text:p text:style-name="P2"/>
      <text:p text:style-name="P2">Remarque :<text:span text:style-name="T1"> Calculer un ordre de grandeur permet de vérifier la cohérence d’un résultat.</text:span></text:p>
      <text:p text:style-name="P2"><text:span text:style-name="T1"/></text:p>
      <text:p text:style-name="P2">Exemples :<text:span text:style-name="T1"> Détermine un ordre de grandeur de chaque calcul.</text:span></text:p>
      <text:p text:style-name="P2"><text:span text:style-name="T1">a. 546,3+52 <text:s text:c="13"/>b. </text:span><text:span text:style-name="T1"><draw:frame draw:style-name="fr3" draw:name="Objet1" text:anchor-type="as-char" svg:y="-0.527cm" svg:width="2.23cm" svg:height="0.7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draw:frame draw:style-name="fr1" draw:name="Image1" text:anchor-type="paragraph" svg:width="20.001cm" svg:height="3.247cm" draw:z-index="1"><draw:image xlink:href="Pictures/10000201000003260000009A5CB3C9FE8CB5758B.png" xlink:type="simple" xlink:show="embed" xlink:actuate="onLoad" loext:mime-type="image/png"/></draw:frame>Remarque :<text:span text:style-name="T1"> Un ordre de grandeur n’est pas unique.</text:span></text:p>
      <text:p text:style-name="P2"><text:span text:style-name="T1">Pour le deuxième exemple, on aurait pu prendre 70 comme valeur proche de 65,7 et 4 comme valeur proche de 4,1. Ce qui aurait donné </text:span><text:span text:style-name="T1"><draw:frame draw:style-name="fr3" draw:name="Objet2" text:anchor-type="as-char" svg:y="-0.527cm" svg:width="2.535cm" svg:height="0.73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comme ordre de grandeur du produit </text:span><text:span text:style-name="T1"><draw:frame draw:style-name="fr3" draw:name="Objet3" text:anchor-type="as-char" svg:y="-0.527cm" svg:width="2.23cm" svg:height="0.739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list xml:id="list90450303882770" text:continue-numbering="true" text:style-name="L1">
        <text:list-item>
          <text:p text:style-name="P1">Addition et soustraction de nombres décimaux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Règle <text:span text:style-name="T1">: Pour poser et effectuer une addition ou une soustraction de nombres décimaux, on place les nombres les uns en dessous des autres, de sorte que les virgules soient alignées verticalement.</text:span></text:p>
          </table:table-cell>
        </table:table-row>
      </table:table>
      <text:p text:style-name="P2"/>
      <text:p text:style-name="P2">Exemple :<text:span text:style-name="T1"> Calculer 15,2 + 0,57 <text:s text:c="3"/>et 12-6,7</text:span></text:p>
      <text:p text:style-name="P2"><draw:frame draw:style-name="fr1" draw:name="Image2" text:anchor-type="paragraph" svg:width="20.001cm" svg:height="3.247cm" draw:z-index="4"><draw:image xlink:href="Pictures/10000201000003260000009A5CB3C9FE8CB5758B.png" xlink:type="simple" xlink:show="embed" xlink:actuate="onLoad" loext:mime-type="image/png"/></draw:frame><text:span text:style-name="T1"/></text:p>
      <text:list xml:id="list90451294104313" text:continue-numbering="true" text:style-name="L1">
        <text:list-item>
          <text:p text:style-name="P1"><text:soft-page-break/>Multiplication et division par 10 ; 100 ; 1000…</text:p>
        </text:list-item>
      </text:list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6">Pour multiplier par :</text:p>
          </table:table-cell>
          <table:table-cell table:style-name="Tableau4.B1" office:value-type="string">
            <text:p text:style-name="P15">O<text:span text:style-name="T2">n décale les chiffres de :</text:span></text:p>
          </table:table-cell>
        </table:table-row>
        <table:table-row>
          <table:table-cell table:style-name="Tableau4.A2" office:value-type="string">
            <text:p text:style-name="P15">1<text:span text:style-name="T2">0</text:span></text:p>
          </table:table-cell>
          <table:table-cell table:style-name="Tableau4.B2" office:value-type="string">
            <text:p text:style-name="P16">1 rang vers la gauche</text:p>
          </table:table-cell>
        </table:table-row>
        <table:table-row>
          <table:table-cell table:style-name="Tableau4.A2" office:value-type="string">
            <text:p text:style-name="P16">100</text:p>
          </table:table-cell>
          <table:table-cell table:style-name="Tableau4.B2" office:value-type="string">
            <text:p text:style-name="P16">2 rangs vers la gauche</text:p>
          </table:table-cell>
        </table:table-row>
        <table:table-row>
          <table:table-cell table:style-name="Tableau4.A2" office:value-type="string">
            <text:p text:style-name="P16">1 000</text:p>
          </table:table-cell>
          <table:table-cell table:style-name="Tableau4.B2" office:value-type="string">
            <text:p text:style-name="P16">3 rangs vers la gauche</text:p>
          </table:table-cell>
        </table:table-row>
      </table:table>
      <text:p text:style-name="P2"/>
      <text:p text:style-name="P3">Exemples :</text:p>
      <text:p text:style-name="P3"><draw:frame draw:style-name="fr2" draw:name="Image3" text:anchor-type="paragraph" svg:x="-1.736cm" svg:y="0.903cm" svg:width="20.001cm" svg:height="3.247cm" draw:z-index="8"><draw:image xlink:href="Pictures/10000201000003260000009A5CB3C9FE8CB5758B.png" xlink:type="simple" xlink:show="embed" xlink:actuate="onLoad" loext:mime-type="image/png"/></draw:frame><text:span text:style-name="T1">Calculer </text:span><text:span text:style-name="T1"><draw:frame draw:style-name="fr3" draw:name="Objet4" text:anchor-type="as-char" svg:y="-0.527cm" svg:width="2.066cm" svg:height="0.73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 ; </text:span><text:span text:style-name="T1"><draw:frame draw:style-name="fr3" draw:name="Objet5" text:anchor-type="as-char" svg:y="-0.527cm" svg:width="1.871cm" svg:height="0.73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"> ;</text:span><text:span text:style-name="T1"><draw:frame draw:style-name="fr3" draw:name="Objet6" text:anchor-type="as-char" svg:y="-0.527cm" svg:width="2.609cm" svg:height="0.739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><text:span text:style-name="T1"/></text:p>
      <text:p text:style-name="P3"><text:span text:style-name="T1"/>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16">Pour diviser par :</text:p>
          </table:table-cell>
          <table:table-cell table:style-name="Tableau5.B1" office:value-type="string">
            <text:p text:style-name="P16">On décale les chiffres de :</text:p>
          </table:table-cell>
        </table:table-row>
        <table:table-row>
          <table:table-cell table:style-name="Tableau5.A2" office:value-type="string">
            <text:p text:style-name="P15">1<text:span text:style-name="T2">0</text:span></text:p>
          </table:table-cell>
          <table:table-cell table:style-name="Tableau5.B2" office:value-type="string">
            <text:p text:style-name="P15">1 <text:span text:style-name="T2">rang vers la droite</text:span></text:p>
          </table:table-cell>
        </table:table-row>
        <table:table-row>
          <table:table-cell table:style-name="Tableau5.A2" office:value-type="string">
            <text:p text:style-name="P16">100</text:p>
          </table:table-cell>
          <table:table-cell table:style-name="Tableau5.B2" office:value-type="string">
            <text:p text:style-name="P16">2 rangs vers la droite</text:p>
          </table:table-cell>
        </table:table-row>
        <table:table-row>
          <table:table-cell table:style-name="Tableau5.A2" office:value-type="string">
            <text:p text:style-name="P16">1 000</text:p>
          </table:table-cell>
          <table:table-cell table:style-name="Tableau5.B2" office:value-type="string">
            <text:p text:style-name="P16">3 rangs vers la droite</text:p>
          </table:table-cell>
        </table:table-row>
      </table:table>
      <text:p text:style-name="P3"><text:span text:style-name="T1"/></text:p>
      <text:p text:style-name="P3">Exemples :</text:p>
      <text:p text:style-name="P6">Calculer <draw:frame draw:style-name="fr3" draw:name="Objet7" text:anchor-type="as-char" svg:y="-0.527cm" svg:width="1.586cm" svg:height="0.739cm" draw:z-index="9"><draw:object xlink:href="./Object 7" xlink:type="simple" xlink:show="embed" xlink:actuate="onLoad"/><draw:image xlink:href="./ObjectReplacements/Object 7" xlink:type="simple" xlink:show="embed" xlink:actuate="onLoad"/></draw:frame> ; <draw:frame draw:style-name="fr3" draw:name="Objet8" text:anchor-type="as-char" svg:y="-0.527cm" svg:width="2.605cm" svg:height="0.739cm" draw:z-index="10"><draw:object xlink:href="./Object 8" xlink:type="simple" xlink:show="embed" xlink:actuate="onLoad"/><draw:image xlink:href="./ObjectReplacements/Object 8" xlink:type="simple" xlink:show="embed" xlink:actuate="onLoad"/></draw:frame> ; <draw:frame draw:style-name="fr3" draw:name="Objet9" text:anchor-type="as-char" svg:y="-0.527cm" svg:width="2.378cm" svg:height="0.739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6"><draw:frame draw:style-name="fr2" draw:name="Image4" text:anchor-type="paragraph" svg:x="-1.884cm" svg:y="0.316cm" svg:width="20.001cm" svg:height="3.247cm" draw:z-index="12"><draw:image xlink:href="Pictures/10000201000003260000009A5CB3C9FE8CB5758B.png" xlink:type="simple" xlink:show="embed" xlink:actuate="onLoad" loext:mime-type="image/png"/></draw:frame></text:p>
      <text:list xml:id="list90450107106875" text:continue-numbering="true" text:style-name="L1">
        <text:list-item>
          <text:p text:style-name="P1">Conversion des unités de longueur et de masse</text:p>
        </text:list-item>
      </text:list>
      <text:p text:style-name="P3">Unités de longueur :</text:p>
      <table:table table:name="Tableau6" table:style-name="Tableau6">
        <table:table-column table:style-name="Tableau6.A" table:number-columns-repeated="7"/>
        <table:table-row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G1" office:value-type="string">
            <text:p text:style-name="P8"/>
          </table:table-cell>
        </table:table-row>
        <table:table-row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G2" office:value-type="string">
            <text:p text:style-name="P8"/>
          </table:table-cell>
        </table:table-row>
      </table:table>
      <text:p text:style-name="P3"><text:soft-page-break/>Unités de masse :</text:p>
      <table:table table:name="Tableau7" table:style-name="Tableau7">
        <table:table-column table:style-name="Tableau7.A" table:number-columns-repeated="7"/>
        <table:table-row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G1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/>
          </table:table-cell>
          <table:table-cell table:style-name="Tableau7.A2" office:value-type="string">
            <text:p text:style-name="P8"/>
          </table:table-cell>
          <table:table-cell table:style-name="Tableau7.A2" office:value-type="string">
            <text:p text:style-name="P8"/>
          </table:table-cell>
          <table:table-cell table:style-name="Tableau7.A2" office:value-type="string">
            <text:p text:style-name="P8"/>
          </table:table-cell>
          <table:table-cell table:style-name="Tableau7.A2" office:value-type="string">
            <text:p text:style-name="P8"/>
          </table:table-cell>
          <table:table-cell table:style-name="Tableau7.A2" office:value-type="string">
            <text:p text:style-name="P8"/>
          </table:table-cell>
          <table:table-cell table:style-name="Tableau7.G2" office:value-type="string">
            <text:p text:style-name="P8"/>
          </table:table-cell>
        </table:table-row>
      </table:table>
      <text:p text:style-name="P6"/>
      <text:p text:style-name="P6">à savoir : On utilise également d’autres unités de masse :</text:p>
      <text:list xml:id="list3610620329" text:style-name="L2">
        <text:list-item>
          <text:p text:style-name="P7">Le quintal (q) qui équivaut à 100 kg : 1q=100kg ;</text:p>
        </text:list-item>
        <text:list-item>
          <text:p text:style-name="P7">La tonne (t) qui équivaut à 1 000 kg : 1t= 1 000 kg.</text:p>
        </text:list-item>
      </text:list>
      <text:list xml:id="list90450791794024" text:continue-list="list90450107106875" text:style-name="L1">
        <text:list-item>
          <text:p text:style-name="P1">Multiplication de deux nombres décimaux</text:p>
          <text:list>
            <text:list-item>
              <text:p text:style-name="P4">Multiplication par 0,1 ; 0,01 ; 0,001</text:p>
            </text:list-item>
          </text:list>
        </text:list-item>
      </text:list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17">Multiplier par :</text:p>
          </table:table-cell>
          <table:table-cell table:style-name="Tableau8.B1" office:value-type="string">
            <text:p text:style-name="P17">c’est diviser par :</text:p>
          </table:table-cell>
        </table:table-row>
        <table:table-row>
          <table:table-cell table:style-name="Tableau8.A2" office:value-type="string">
            <text:p text:style-name="P15">0,<text:span text:style-name="T3">1</text:span></text:p>
          </table:table-cell>
          <table:table-cell table:style-name="Tableau8.B2" office:value-type="string">
            <text:p text:style-name="P15">1<text:span text:style-name="T3">0 car </text:span><text:span text:style-name="T3"><draw:frame draw:style-name="fr3" draw:name="Objet10" text:anchor-type="as-char" svg:y="-0.891cm" svg:width="1.85cm" svg:height="1.54cm" draw:z-index="13"><draw:object xlink:href="./Object 10" xlink:type="simple" xlink:show="embed" xlink:actuate="onLoad"/><draw:image xlink:href="./ObjectReplacements/Object 10" xlink:type="simple" xlink:show="embed" xlink:actuate="onLoad"/></draw:frame></text:span></text:p>
          </table:table-cell>
        </table:table-row>
        <table:table-row>
          <table:table-cell table:style-name="Tableau8.A2" office:value-type="string">
            <text:p text:style-name="P17">0,01</text:p>
          </table:table-cell>
          <table:table-cell table:style-name="Tableau8.B2" office:value-type="string">
            <text:p text:style-name="P17">100 car <draw:frame draw:style-name="fr3" draw:name="Objet11" text:anchor-type="as-char" svg:y="-0.891cm" svg:width="2.401cm" svg:height="1.54cm" draw:z-index="1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au8.A2" office:value-type="string">
            <text:p text:style-name="P17">0,001</text:p>
          </table:table-cell>
          <table:table-cell table:style-name="Tableau8.B2" office:value-type="string">
            <text:p text:style-name="P17">1000 car <draw:frame draw:style-name="fr3" draw:name="Objet12" text:anchor-type="as-char" svg:y="-0.891cm" svg:width="2.947cm" svg:height="1.54cm" draw:z-index="1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5"><text:span text:style-name="T1"/></text:p>
      <text:p text:style-name="P5">Exemples :<text:span text:style-name="T1"> </text:span><text:span text:style-name="T1"><draw:frame draw:style-name="fr3" draw:name="Objet13" text:anchor-type="as-char" svg:y="-0.527cm" svg:width="1.787cm" svg:height="0.739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1"> ; </text:span><text:span text:style-name="T1"><draw:frame draw:style-name="fr3" draw:name="Objet14" text:anchor-type="as-char" svg:y="-0.527cm" svg:width="2.223cm" svg:height="0.739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"> ; </text:span><text:span text:style-name="T1"><draw:frame draw:style-name="fr3" draw:name="Objet15" text:anchor-type="as-char" svg:y="-0.527cm" svg:width="2.766cm" svg:height="0.739cm" draw:z-index="18"><draw:object xlink:href="./Object 15" xlink:type="simple" xlink:show="embed" xlink:actuate="onLoad"/><draw:image xlink:href="./ObjectReplacements/Object 15" xlink:type="simple" xlink:show="embed" xlink:actuate="onLoad"/></draw:frame></text:span></text:p>
      <text:list xml:id="list90451530849879" text:continue-numbering="true" text:style-name="L1">
        <text:list-item>
          <text:list>
            <text:list-item>
              <text:p text:style-name="P4"><draw:frame draw:style-name="fr2" draw:name="Image5" text:anchor-type="paragraph" svg:x="-1.884cm" svg:y="0.316cm" svg:width="20.001cm" svg:height="3.247cm" draw:z-index="19"><draw:image xlink:href="Pictures/10000201000003260000009A5CB3C9FE8CB5758B.png" xlink:type="simple" xlink:show="embed" xlink:actuate="onLoad" loext:mime-type="image/png"/></draw:frame>Multiplication de deux nombres décimaux</text:p>
            </text:list-item>
          </text:list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1">Règle :</text:p>
            <text:p text:style-name="P13">Pour effectuer la multiplication de deux nombres décimaux,</text:p>
            <text:list xml:id="list1764229516" text:style-name="L5">
              <text:list-item>
                <text:p text:style-name="P14">on effectue d’abord la multiplication sans tenir compte des virgules ;</text:p>
              </text:list-item>
              <text:list-item>
                <text:p text:style-name="P14">on place la virgule dans le produit en utilisant la méthode décrite ci-dessous.</text:p>
              </text:list-item>
            </text:list>
          </table:table-cell>
        </table:table-row>
      </table:table>
      <text:p text:style-name="P5">Exemple :<text:span text:style-name="T1"> Effectue la multiplication de 2,34 par 1,2</text:span></text:p>
      <text:p text:style-name="P5"><draw:frame draw:style-name="fr2" draw:name="Image6" text:anchor-type="paragraph" svg:x="-1.884cm" svg:y="0.316cm" svg:width="20.001cm" svg:height="3.247cm" draw:z-index="20"><draw:image xlink:href="Pictures/10000201000003260000009A5CB3C9FE8CB5758B.png" xlink:type="simple" xlink:show="embed" xlink:actuate="onLoad" loext:mime-type="image/png"/></draw:frame><text:soft-page-break/><text:span text:style-name="T1"/></text:p>
      <text:list xml:id="list90451267181870" text:continue-list="list90451530849879" text:style-name="L1">
        <text:list-item>
          <text:p text:style-name="P1">Division d’un nombre décimal par un nombre entier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">Règle :<text:span text:style-name="T1"> Effectuer la division décimale de deux nombres, c’est trouver la valeur exacte ou une valeur approchée du quotient de ces deux nombres.</text:span></text:p>
          </table:table-cell>
        </table:table-row>
      </table:table>
      <text:p text:style-name="P2"/>
      <text:p text:style-name="P5">Exemples :<text:span text:style-name="T1"> Effectue la division de 75,8 par 4 pis celle de 4,9 par 9.</text:span></text:p>
      <text:p text:style-name="P5"><draw:frame draw:style-name="fr2" draw:name="Image7" text:anchor-type="paragraph" svg:x="-1.884cm" svg:y="0.316cm" svg:width="20.001cm" svg:height="3.247cm" draw:z-index="21"><draw:image xlink:href="Pictures/10000201000003260000009A5CB3C9FE8CB5758B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2:23:02.711000000</meta:creation-date>
    <dc:date>2021-04-01T09:04:49.654000000</dc:date>
    <meta:editing-duration>PT8M7S</meta:editing-duration>
    <meta:editing-cycles>1</meta:editing-cycles>
    <meta:document-statistic meta:table-count="10" meta:image-count="7" meta:object-count="15" meta:page-count="4" meta:paragraph-count="60" meta:word-count="412" meta:character-count="2266" meta:non-whitespace-character-count="1821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n>65</mn>
      <mrow>
        <mn>,7</mn>
        <mo stretchy="false">×</mo>
        <mn>4</mn>
      </mrow>
      <mn>,1</mn>
    </mrow>
    <annotation encoding="StarMath 5.0">65,7 times 4,1</annotation>
  </semantics>
</math>
</file>

<file path=Object 10/content.xml><?xml version="1.0" encoding="utf-8"?>
<math xmlns="http://www.w3.org/1998/Math/MathML" display="block">
  <semantics>
    <mrow>
      <mn>0</mn>
      <mrow>
        <mn>,1</mn>
        <mo stretchy="false">=</mo>
        <mfrac>
          <mn>1</mn>
          <mn>10</mn>
        </mfrac>
      </mrow>
    </mrow>
    <annotation encoding="StarMath 5.0">0,1 = 1 over 10</annotation>
  </semantics>
</math>
</file>

<file path=Object 11/content.xml><?xml version="1.0" encoding="utf-8"?>
<math xmlns="http://www.w3.org/1998/Math/MathML" display="block">
  <semantics>
    <mrow>
      <mn>0</mn>
      <mrow>
        <mn>,01</mn>
        <mo stretchy="false">=</mo>
        <mfrac>
          <mn>1</mn>
          <mn>100</mn>
        </mfrac>
      </mrow>
    </mrow>
    <annotation encoding="StarMath 5.0">0,01 = 1 over 100</annotation>
  </semantics>
</math>
</file>

<file path=Object 12/content.xml><?xml version="1.0" encoding="utf-8"?>
<math xmlns="http://www.w3.org/1998/Math/MathML" display="block">
  <semantics>
    <mrow>
      <mn>0</mn>
      <mrow>
        <mn>,001</mn>
        <mo stretchy="false">=</mo>
        <mfrac>
          <mn>1</mn>
          <mn>1000</mn>
        </mfrac>
      </mrow>
    </mrow>
    <annotation encoding="StarMath 5.0">0,001 = 1 over 1000</annotation>
  </semantics>
</math>
</file>

<file path=Object 13/content.xml><?xml version="1.0" encoding="utf-8"?>
<math xmlns="http://www.w3.org/1998/Math/MathML" display="block">
  <semantics>
    <mrow>
      <mrow>
        <mn>78</mn>
        <mo stretchy="false">×</mo>
        <mn>0</mn>
      </mrow>
      <mn>,1</mn>
    </mrow>
    <annotation encoding="StarMath 5.0">78 times 0,1</annotation>
  </semantics>
</math>
</file>

<file path=Object 14/content.xml><?xml version="1.0" encoding="utf-8"?>
<math xmlns="http://www.w3.org/1998/Math/MathML" display="block">
  <semantics>
    <mrow>
      <mn>3</mn>
      <mrow>
        <mn>,5</mn>
        <mo stretchy="false">×</mo>
        <mn>0</mn>
      </mrow>
      <mn>,01</mn>
    </mrow>
    <annotation encoding="StarMath 5.0">3,5 times 0,01</annotation>
  </semantics>
</math>
</file>

<file path=Object 15/content.xml><?xml version="1.0" encoding="utf-8"?>
<math xmlns="http://www.w3.org/1998/Math/MathML" display="block">
  <semantics>
    <mrow>
      <mn>56</mn>
      <mrow>
        <mn>,2</mn>
        <mo stretchy="false">×</mo>
        <mn>0</mn>
      </mrow>
      <mn>,001</mn>
    </mrow>
    <annotation encoding="StarMath 5.0">56,2 times 0,001</annotation>
  </semantics>
</math>
</file>

<file path=Object 2/content.xml><?xml version="1.0" encoding="utf-8"?>
<math xmlns="http://www.w3.org/1998/Math/MathML" display="block">
  <semantics>
    <mrow>
      <mrow>
        <mn>70</mn>
        <mo stretchy="false">×</mo>
        <mn>4</mn>
      </mrow>
      <mo stretchy="false">=</mo>
      <mn>280</mn>
    </mrow>
    <annotation encoding="StarMath 5.0">70 times 4 = 280</annotation>
  </semantics>
</math>
</file>

<file path=Object 3/content.xml><?xml version="1.0" encoding="utf-8"?>
<math xmlns="http://www.w3.org/1998/Math/MathML" display="block">
  <semantics>
    <mrow>
      <mn>65</mn>
      <mrow>
        <mn>,7</mn>
        <mo stretchy="false">×</mo>
        <mn>4</mn>
      </mrow>
      <mn>,1</mn>
    </mrow>
    <annotation encoding="StarMath 5.0">65,7 times 4,1</annotation>
  </semantics>
</math>
</file>

<file path=Object 4/content.xml><?xml version="1.0" encoding="utf-8"?>
<math xmlns="http://www.w3.org/1998/Math/MathML" display="block">
  <semantics>
    <mrow>
      <mn>0</mn>
      <mrow>
        <mn>,47</mn>
        <mo stretchy="false">×</mo>
        <mn>10</mn>
      </mrow>
    </mrow>
    <annotation encoding="StarMath 5.0">0,47 times 10</annotation>
  </semantics>
</math>
</file>

<file path=Object 5/content.xml><?xml version="1.0" encoding="utf-8"?>
<math xmlns="http://www.w3.org/1998/Math/MathML" display="block">
  <semantics>
    <mrow>
      <mn>35</mn>
      <mo stretchy="false">×</mo>
      <mn>100</mn>
    </mrow>
    <annotation encoding="StarMath 5.0">35 times 100</annotation>
  </semantics>
</math>
</file>

<file path=Object 6/content.xml><?xml version="1.0" encoding="utf-8"?>
<math xmlns="http://www.w3.org/1998/Math/MathML" display="block">
  <semantics>
    <mrow>
      <mn>9</mn>
      <mrow>
        <mn>,82</mn>
        <mo stretchy="false">×</mo>
        <mn>1000</mn>
      </mrow>
    </mrow>
    <annotation encoding="StarMath 5.0">9,82 times 1000</annotation>
  </semantics>
</math>
</file>

<file path=Object 7/content.xml><?xml version="1.0" encoding="utf-8"?>
<math xmlns="http://www.w3.org/1998/Math/MathML" display="block">
  <semantics>
    <mrow>
      <mn>27</mn>
      <mo stretchy="false">÷</mo>
      <mn>10</mn>
    </mrow>
    <annotation encoding="StarMath 5.0">27 div 10 </annotation>
  </semantics>
</math>
</file>

<file path=Object 8/content.xml><?xml version="1.0" encoding="utf-8"?>
<math xmlns="http://www.w3.org/1998/Math/MathML" display="block">
  <semantics>
    <mrow>
      <mn>456</mn>
      <mrow>
        <mn>,5</mn>
        <mo stretchy="false">÷</mo>
        <mn>100</mn>
      </mrow>
    </mrow>
    <annotation encoding="StarMath 5.0">456,5  div 100 </annotation>
  </semantics>
</math>
</file>

<file path=Object 9/content.xml><?xml version="1.0" encoding="utf-8"?>
<math xmlns="http://www.w3.org/1998/Math/MathML" display="block">
  <semantics>
    <mrow>
      <mn>0</mn>
      <mrow>
        <mn>,3</mn>
        <mo stretchy="false">÷</mo>
        <mn>1</mn>
      </mrow>
      <mn>000</mn>
    </mrow>
    <annotation encoding="StarMath 5.0">0,3  div 1 000 </annotation>
  </semantics>
</math>
</file>