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50000017E195822CC19EE90D8.png" manifest:media-type="image/png"/>
  <manifest:file-entry manifest:full-path="Pictures/10000000000001C20000017E2EA02C79E1C65A35.png" manifest:media-type="image/png"/>
  <manifest:file-entry manifest:full-path="Pictures/1000000000000385000001E283B254B7AC1F6C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Graphecrit" svg:font-family="Graphecrit" style:font-pitch="variable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20.399cm" fo:margin-left="-1.55cm" table:align="left"/>
    </style:style>
    <style:style style:name="Tableau3.A" style:family="table-column">
      <style:table-column-properties style:column-width="8.599cm"/>
    </style:style>
    <style:style style:name="Tableau3.B" style:family="table-column">
      <style:table-column-properties style:column-width="6.509cm"/>
    </style:style>
    <style:style style:name="Tableau3.C" style:family="table-column">
      <style:table-column-properties style:column-width="5.2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"/>
    </style:style>
    <style:style style:name="P2" style:family="paragraph" style:parent-style-name="Table_20_Contents">
      <style:text-properties style:font-name="OpenDyslexic" officeooo:rsid="00058319" officeooo:paragraph-rsid="00058319"/>
    </style:style>
    <style:style style:name="P3" style:family="paragraph" style:parent-style-name="Table_20_Contents">
      <style:text-properties style:font-name="OpenDyslexic" officeooo:rsid="00059512" officeooo:paragraph-rsid="00059512"/>
    </style:style>
    <style:style style:name="P4" style:family="paragraph" style:parent-style-name="Table_20_Contents">
      <style:text-properties style:font-name="OpenDyslexic" officeooo:rsid="00063ce8" officeooo:paragraph-rsid="00063ce8"/>
    </style:style>
    <style:style style:name="P5" style:family="paragraph" style:parent-style-name="Table_20_Contents">
      <style:paragraph-properties fo:text-align="start" style:justify-single-word="false"/>
      <style:text-properties style:font-name="OpenDyslexic" officeooo:rsid="00104e5a" officeooo:paragraph-rsid="00058319"/>
    </style:style>
    <style:style style:name="P6" style:family="paragraph" style:parent-style-name="Standard">
      <style:text-properties style:font-name="OpenDyslexic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59512" officeooo:paragraph-rsid="00059512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063ce8" officeooo:paragraph-rsid="00063ce8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fo:font-weight="normal" officeooo:rsid="00063ce8" officeooo:paragraph-rsid="00063ce8" style:font-weight-asian="normal" style:font-weight-complex="normal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15097d" officeooo:paragraph-rsid="0015097d"/>
    </style:style>
    <style:style style:name="P11" style:family="paragraph" style:parent-style-name="Standard">
      <style:text-properties style:font-name="OpenDyslexic" style:text-underline-style="solid" style:text-underline-width="auto" style:text-underline-color="font-color" officeooo:rsid="00151209" officeooo:paragraph-rsid="00151209"/>
    </style:style>
    <style:style style:name="P12" style:family="paragraph" style:parent-style-name="Standard">
      <style:text-properties style:font-name="OpenDyslexic" style:text-underline-style="none" officeooo:rsid="0015097d" officeooo:paragraph-rsid="0015097d"/>
    </style:style>
    <style:style style:name="P13" style:family="paragraph" style:parent-style-name="Standard">
      <style:text-properties style:font-name="OpenDyslexic" style:text-underline-style="none" fo:font-weight="normal" officeooo:rsid="0015097d" officeooo:paragraph-rsid="0015097d" style:font-weight-asian="normal" style:font-weight-complex="normal"/>
    </style:style>
    <style:style style:name="P14" style:family="paragraph" style:parent-style-name="Standard">
      <style:text-properties style:font-name="OpenDyslexic" style:text-underline-style="none" fo:font-weight="normal" officeooo:rsid="00151209" officeooo:paragraph-rsid="00151209" style:font-weight-asian="normal" style:font-weight-complex="normal"/>
    </style:style>
    <style:style style:name="P15" style:family="paragraph" style:parent-style-name="Standard" style:list-style-name="L1">
      <style:text-properties style:font-name="OpenDyslexic" style:text-underline-style="solid" style:text-underline-width="auto" style:text-underline-color="font-color" officeooo:rsid="00058319" officeooo:paragraph-rsid="00058319"/>
    </style:style>
    <style:style style:name="P16" style:family="paragraph" style:parent-style-name="Standard" style:list-style-name="L2">
      <style:text-properties style:font-name="OpenDyslexic" style:text-underline-style="solid" style:text-underline-width="auto" style:text-underline-color="font-color" officeooo:rsid="00063ce8" officeooo:paragraph-rsid="00063ce8"/>
    </style:style>
    <style:style style:name="P17" style:family="paragraph" style:parent-style-name="Standard" style:list-style-name="L2">
      <style:text-properties style:font-name="OpenDyslexic" style:text-underline-style="solid" style:text-underline-width="auto" style:text-underline-color="font-color" fo:font-weight="bold" officeooo:rsid="00063ce8" officeooo:paragraph-rsid="00063ce8" style:font-weight-asian="bold" style:font-weight-complex="bold"/>
    </style:style>
    <style:style style:name="P18" style:family="paragraph" style:parent-style-name="Standard" style:list-style-name="L1">
      <style:text-properties style:font-name="OpenDyslexic" style:text-underline-style="solid" style:text-underline-width="auto" style:text-underline-color="font-color" officeooo:rsid="0015097d" officeooo:paragraph-rsid="0015097d"/>
    </style:style>
    <style:style style:name="P19" style:family="paragraph" style:parent-style-name="Table_20_Contents">
      <style:text-properties style:font-name="OpenDyslexic" fo:font-weight="normal" officeooo:rsid="00063ce8" officeooo:paragraph-rsid="00059512" style:font-weight-asian="normal" style:font-weight-complex="normal"/>
    </style:style>
    <style:style style:name="T1" style:family="text">
      <style:text-properties officeooo:rsid="00058319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Graphecrit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Graphecrit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Graphecrit" fo:font-size="16pt" style:font-size-asian="16pt" style:font-size-complex="16pt"/>
    </style:style>
    <style:style style:name="T8" style:family="text">
      <style:text-properties style:font-name="Graphecrit" fo:font-size="16pt" officeooo:rsid="00063ce8" style:font-size-asian="16pt" style:font-size-complex="16pt"/>
    </style:style>
    <style:style style:name="T9" style:family="text">
      <style:text-properties style:font-name="Graphecrit" fo:font-size="16pt" officeooo:rsid="00079090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63ce8" style:font-weight-asian="normal" style:font-weight-complex="normal"/>
    </style:style>
    <style:style style:name="T13" style:family="text">
      <style:text-properties officeooo:rsid="00063ce8"/>
    </style:style>
    <style:style style:name="T14" style:family="text">
      <style:text-properties officeooo:rsid="000790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Collège A.Lejeune <text:s text:c="66"/>6ème</text:p>
            <text:p text:style-name="P5">Cours <text:s text:c="23"/>Chapitre <text:span text:style-name="T1">4</text:span> : <text:span text:style-name="T1">Cercles</text:span></text:p>
          </table:table-cell>
        </table:table-row>
      </table:table>
      <text:p text:style-name="P6"/>
      <text:list xml:id="list2418344741" text:style-name="L1">
        <text:list-item>
          <text:p text:style-name="P15">Vocabulaire du cercle<text:line-break/>Définition :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Un cercle (<text:span text:style-name="T6">C</text:span><text:span text:style-name="T5"> </text:span>) de centre O est formé de tous les points situés _________<text:line-break/>___________________________. Cette distance commune est appelée ___________________________________.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table:number-rows-spanned="5" office:value-type="string">
            <text:p text:style-name="P1"><draw:frame draw:style-name="fr1" draw:name="Image1" text:anchor-type="paragraph" svg:x="0.393cm" svg:y="0.661cm" svg:width="7.722cm" svg:height="6.74cm" draw:z-index="0"><draw:image xlink:href="Pictures/10000000000001A50000017E195822CC19EE90D8.png" xlink:type="simple" xlink:show="embed" xlink:actuate="onLoad" loext:mime-type="image/png"/></draw:frame></text:p>
            <text:p text:style-name="P1"><text:s text:c="17"/></text:p>
          </table:table-cell>
          <table:table-cell table:style-name="Tableau3.A1" office:value-type="string">
            <text:p text:style-name="P3">Le <text:span text:style-name="T10">centre </text:span><text:span text:style-name="T12">d’un cercle est le point _________________<text:line-break/>____________________________________________</text:span></text:p>
          </table:table-cell>
          <table:table-cell table:style-name="Tableau3.C1" office:value-type="string">
            <text:p text:style-name="P3">Le point ___ est <text:span text:style-name="T13">le centre du cercle (</text:span><text:span text:style-name="T8">C</text:span><text:span text:style-name="T13">).</text:span></text:p>
          </table:table-cell>
        </table:table-row>
        <table:table-row>
          <table:covered-table-cell/>
          <table:table-cell table:style-name="Tableau3.B2" office:value-type="string">
            <text:p text:style-name="P3">Un <text:span text:style-name="T10">rayon </text:span><text:span text:style-name="T12">d’un cercle est un ______________________<text:line-break/>______________________<text:line-break/>______________________</text:span></text:p>
          </table:table-cell>
          <table:table-cell table:style-name="Tableau3.C2" office:value-type="string">
            <text:p text:style-name="P4">Le segment ____ est un rayon du cercle (<text:span text:style-name="T7">C</text:span>).</text:p>
          </table:table-cell>
        </table:table-row>
        <table:table-row>
          <table:covered-table-cell/>
          <table:table-cell table:style-name="Tableau3.B2" office:value-type="string">
            <text:p text:style-name="P3">Un <text:span text:style-name="T10">diamètre</text:span><text:span text:style-name="T11"> </text:span><text:span text:style-name="T12">d’un cercle est ______________________<text:line-break/>______________________<text:line-break/>______________________</text:span></text:p>
          </table:table-cell>
          <table:table-cell table:style-name="Tableau3.C2" office:value-type="string">
            <text:p text:style-name="P4">Le segment _____ est un diamètre du cercle (<text:span text:style-name="T7">C</text:span>).</text:p>
          </table:table-cell>
        </table:table-row>
        <table:table-row>
          <table:covered-table-cell/>
          <table:table-cell table:style-name="Tableau3.B2" office:value-type="string">
            <text:p text:style-name="P3">Une <text:span text:style-name="T10">corde</text:span><text:span text:style-name="T11"> </text:span><text:span text:style-name="T12">d’un cercle est un segment ____________</text:span></text:p>
            <text:p text:style-name="P19">________________________________________________________________________________________</text:p>
          </table:table-cell>
          <table:table-cell table:style-name="Tableau3.C2" office:value-type="string">
            <text:p text:style-name="P4">Le segment _____ est une corde du cercle (<text:span text:style-name="T7">C</text:span>).</text:p>
          </table:table-cell>
        </table:table-row>
        <table:table-row>
          <table:covered-table-cell/>
          <table:table-cell table:style-name="Tableau3.B2" office:value-type="string">
            <text:p text:style-name="P3">Un <text:span text:style-name="T10">arc de cercle</text:span><text:span text:style-name="T11"> </text:span><text:span text:style-name="T12">est _____<text:line-break/>________________________________________________________________________________________</text:span></text:p>
          </table:table-cell>
          <table:table-cell table:style-name="Tableau3.C2" office:value-type="string">
            <text:p text:style-name="P4">La portion de cercle _____<text:span text:style-name="T14">comprise entre M et N est un arc du cercle (</text:span><text:span text:style-name="T9">C</text:span><text:span text:style-name="T14">).</text:span></text:p>
          </table:table-cell>
        </table:table-row>
      </table:table>
      <text:p text:style-name="P7"><text:soft-page-break/></text:p>
      <text:p text:style-name="P8">Remarque :<text:span text:style-name="T2"> Le segment [OM] est </text:span><text:span text:style-name="T3">un</text:span><text:span text:style-name="T2"> </text:span><text:span text:style-name="T3">rayon</text:span><text:span text:style-name="T4"> du cercle. La longueur OM est </text:span><text:span text:style-name="T3">le rayon</text:span><text:span text:style-name="T4"> du cercle. Le rayon d’un cercle est un nombre tandis qu’un rayon du cercle est un segment.</text:span></text:p>
      <text:p text:style-name="P9">Définitions :</text:p>
      <text:list xml:id="list1288687456" text:style-name="L2">
        <text:list-item>
          <text:p text:style-name="P16"><text:span text:style-name="T4">Une </text:span><text:span text:style-name="T3">corde</text:span><text:span text:style-name="T4"> est un segment dont les extrémités sont deux points du cercle.</text:span></text:p>
        </text:list-item>
        <text:list-item>
          <text:p text:style-name="P17"><text:span text:style-name="T2">Un diamètre </text:span><text:span text:style-name="T4">est une _____________________________________.</text:span></text:p>
        </text:list-item>
        <text:list-item>
          <text:p text:style-name="P17"><text:span text:style-name="T2">Le diamètre</text:span><text:span text:style-name="T4"> du cercle est la longueur commune de tous ses diamètres.<text:line-break/></text:span></text:p>
        </text:list-item>
      </text:list>
      <text:list xml:id="list213228025735667" text:continue-list="list2418344741" text:style-name="L1">
        <text:list-item>
          <text:p text:style-name="P18">Construction</text:p>
        </text:list-item>
      </text:list>
      <text:p text:style-name="P10"/>
      <text:p text:style-name="P10">Remarque 1 :<text:span text:style-name="T2"> Par commodité de langage, on appelle « rayon » la longueur du rayon d’un cercle, et on appelle « diamètre » la longueur de son diamètre.</text:span></text:p>
      <text:p text:style-name="P12"/>
      <text:p text:style-name="P10">Remarque 2 :<text:span text:style-name="T2"> Le diamètre d’un cercle est égal ______________________</text:span></text:p>
      <text:p text:style-name="P12"/>
      <text:p text:style-name="P10">Exemple :<text:span text:style-name="T2"> Trace le cercle de centre T passant par le point U.</text:span></text:p>
      <text:p text:style-name="P12"/>
      <text:p text:style-name="P10"><text:span text:style-name="T2">On utilise le </text:span><text:span text:style-name="T3">Compas</text:span></text:p>
      <text:p text:style-name="P13"><draw:frame draw:style-name="fr1" draw:name="Image2" text:anchor-type="paragraph" svg:x="2.547cm" svg:y="0.291cm" svg:width="11.906cm" svg:height="10.107cm" draw:z-index="1"><draw:image xlink:href="Pictures/10000000000001C20000017E2EA02C79E1C65A3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0"><text:span text:style-name="T11">Exemple 2 :</text:span><text:span text:style-name="T4"> Trace le cercle de centre H de rayon 2,5 cm.</text:span></text:p>
      <text:p text:style-name="P13"/>
      <text:p text:style-name="P10"><text:span text:style-name="T4">Pour tracer, on utilise le </text:span><text:span text:style-name="T3">Compas </text:span><text:span text:style-name="T4"><text:s/>et la </text:span><text:span text:style-name="T3">règle</text:span><text:span text:style-name="T4">.</text:span></text:p>
      <text:p text:style-name="P13"/>
      <text:p text:style-name="P13"><draw:frame draw:style-name="fr2" draw:name="Image3" text:anchor-type="paragraph" svg:width="17cm" svg:height="9.093cm" draw:z-index="2"><draw:image xlink:href="Pictures/1000000000000385000001E283B254B7AC1F6C66.png" xlink:type="simple" xlink:show="embed" xlink:actuate="onLoad" loext:mime-type="image/png"/></draw:frame></text:p>
      <text:p text:style-name="P11"><text:span text:style-name="T11">Exemple 3 :</text:span><text:span text:style-name="T4"> Trace une rosace </text:span></text:p>
      <text:p text:style-name="P14">Le dessin géométrique d'une rosace s’obtient sans changer l’écartement des branches du compas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Graphecrit" svg:font-family="Graphecrit" style:font-pitch="variable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21:52:13.247000000</meta:creation-date>
    <dc:date>2020-11-15T21:32:27.510000000</dc:date>
    <meta:editing-duration>PT19M15S</meta:editing-duration>
    <meta:editing-cycles>5</meta:editing-cycles>
    <meta:generator>LibreOffice/6.2.3.2$Windows_X86_64 LibreOffice_project/aecc05fe267cc68dde00352a451aa867b3b546ac</meta:generator>
    <meta:document-statistic meta:table-count="3" meta:image-count="3" meta:object-count="0" meta:page-count="3" meta:paragraph-count="30" meta:word-count="296" meta:character-count="2077" meta:non-whitespace-character-count="1705"/>
  </office:meta>
</office:document-meta>
</file>