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1D00000099A72B1564AB87C7D1.png" manifest:media-type="image/png"/>
  <manifest:file-entry manifest:full-path="Pictures/10000201000001560000010AB0DAC3EE02F62749.png" manifest:media-type="image/png"/>
  <manifest:file-entry manifest:full-path="Pictures/100002010000017D000000C8B4B7933860AB137B.png" manifest:media-type="image/png"/>
  <manifest:file-entry manifest:full-path="Pictures/100002010000019D000000A45374ED0B998ADA1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26135" officeooo:paragraph-rsid="00126135"/>
    </style:style>
    <style:style style:name="P3" style:family="paragraph" style:parent-style-name="Standard">
      <style:text-properties style:font-name="OpenDyslexic" style:text-underline-style="none" officeooo:rsid="00126135" officeooo:paragraph-rsid="00126135"/>
    </style:style>
    <style:style style:name="P4" style:family="paragraph" style:parent-style-name="Table_20_Contents">
      <style:text-properties style:font-name="OpenDyslexic" officeooo:rsid="00126135" officeooo:paragraph-rsid="00126135"/>
    </style:style>
    <style:style style:name="P5" style:family="paragraph" style:parent-style-name="Table_20_Contents">
      <style:text-properties style:font-name="OpenDyslexic" style:text-underline-style="none" officeooo:rsid="00126135" officeooo:paragraph-rsid="00126135"/>
    </style:style>
    <style:style style:name="P6" style:family="paragraph" style:parent-style-name="Table_20_Contents">
      <style:text-properties style:font-name="OpenDyslexic"/>
    </style:style>
    <style:style style:name="P7" style:family="paragraph" style:parent-style-name="Table_20_Contents">
      <style:text-properties style:font-name="OpenDyslexic" style:text-underline-style="solid" style:text-underline-width="auto" style:text-underline-color="font-color"/>
    </style:style>
    <style:style style:name="P8" style:family="paragraph" style:parent-style-name="Table_20_Contents">
      <style:text-properties style:font-name="OpenDyslexic" style:text-underline-style="none" officeooo:rsid="0015af9a" officeooo:paragraph-rsid="0015af9a"/>
    </style:style>
    <style:style style:name="P9" style:family="paragraph" style:parent-style-name="Table_20_Contents">
      <style:text-properties style:font-name="OpenDyslexic" officeooo:rsid="0016d282" officeooo:paragraph-rsid="0016d282"/>
    </style:style>
    <style:style style:name="P10" style:family="paragraph" style:parent-style-name="Table_20_Contents">
      <style:paragraph-properties fo:text-align="center" style:justify-single-word="false"/>
      <style:text-properties style:font-name="OpenDyslexic" officeooo:rsid="0016d282" officeooo:paragraph-rsid="0016d282"/>
    </style:style>
    <style:style style:name="P11" style:family="paragraph" style:parent-style-name="Standard" style:list-style-name="L1">
      <style:text-properties style:font-name="OpenDyslexic" style:text-underline-style="solid" style:text-underline-width="auto" style:text-underline-color="font-color" officeooo:rsid="00126135" officeooo:paragraph-rsid="00126135"/>
    </style:style>
    <style:style style:name="P12" style:family="paragraph" style:parent-style-name="Standard">
      <style:text-properties style:font-name="OpenDyslexic" style:text-underline-style="solid" style:text-underline-width="auto" style:text-underline-color="font-color" officeooo:rsid="0015af9a" officeooo:paragraph-rsid="0015af9a"/>
    </style:style>
    <style:style style:name="P13" style:family="paragraph" style:parent-style-name="Standard" style:list-style-name="L2">
      <style:text-properties style:font-name="OpenDyslexic" style:text-underline-style="solid" style:text-underline-width="auto" style:text-underline-color="font-color" officeooo:rsid="0015af9a" officeooo:paragraph-rsid="0015af9a"/>
    </style:style>
    <style:style style:name="P14" style:family="paragraph" style:parent-style-name="Standard">
      <style:text-properties style:font-name="OpenDyslexic" style:text-underline-style="solid" style:text-underline-width="auto" style:text-underline-color="font-color" officeooo:rsid="0016d282" officeooo:paragraph-rsid="0016d282"/>
    </style:style>
    <style:style style:name="P15" style:family="paragraph" style:parent-style-name="Standard">
      <style:text-properties style:font-name="OpenDyslexic" style:text-underline-style="solid" style:text-underline-width="auto" style:text-underline-color="font-color" officeooo:rsid="0017ccc5" officeooo:paragraph-rsid="0017ccc5"/>
    </style:style>
    <style:style style:name="P16" style:family="paragraph" style:parent-style-name="Standard">
      <style:text-properties style:font-name="OpenDyslexic" style:text-underline-style="none" officeooo:rsid="00126135" officeooo:paragraph-rsid="00126135"/>
    </style:style>
    <style:style style:name="P17" style:family="paragraph" style:parent-style-name="Standard">
      <style:text-properties style:font-name="OpenDyslexic" style:text-underline-style="none" officeooo:rsid="0015af9a" officeooo:paragraph-rsid="0015af9a"/>
    </style:style>
    <style:style style:name="P18" style:family="paragraph" style:parent-style-name="Standard">
      <style:text-properties style:font-name="OpenDyslexic" style:text-underline-style="none" officeooo:rsid="0017ccc5" officeooo:paragraph-rsid="0017ccc5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 draw:opacity="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5af9a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3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ollège A.Lejeune <text:s text:c="67"/>6ème</text:p>
            <text:p text:style-name="P4">Cours <text:s text:c="28"/>chapitre 12 : Les angles</text:p>
          </table:table-cell>
        </table:table-row>
      </table:table>
      <text:p text:style-name="P1"/>
      <text:list xml:id="list127036408" text:style-name="L1">
        <text:list-item>
          <text:p text:style-name="P11">Notion d’angle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1">Définition :</text:span> Un angle est une proportion de plan qui est délimitée par deux demi-droites de même origine.</text:p>
          </table:table-cell>
        </table:table-row>
      </table:table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<text:span text:style-name="T1">Vocabulaire : </text:span>L’origine de ces deux demi-droites est le sommet de l’angle.</text:p>
            <text:p text:style-name="P5">Ces deux demi-droites sont les côtés de l’angle.</text:p>
          </table:table-cell>
        </table:table-row>
      </table:table>
      <text:p text:style-name="P3"><draw:frame draw:style-name="fr1" draw:name="Image1" text:anchor-type="paragraph" svg:x="-0.552cm" svg:y="0.534cm" svg:width="9.051cm" svg:height="7.038cm" draw:z-index="0"><draw:image xlink:href="Pictures/10000201000001560000010AB0DAC3EE02F62749.png" xlink:type="simple" xlink:show="embed" xlink:actuate="onLoad" loext:mime-type="image/png"/></draw:frame></text:p>
      <text:p text:style-name="P2">Exemple :</text:p>
      <text:p text:style-name="P3">Le point O est le sommet de l’angle bleu.</text:p>
      <text:p text:style-name="P3">Les demi-droites [OA) et [OB) sont les côtés de l’angle vert</text:p>
      <text:p text:style-name="P3"/>
      <text:p text:style-name="P2">Notation :<text:span text:style-name="T2"> Un angle se note à l’aide de trois lettres. La lettre entre les deux autres est celle qui désigne le sommet de l’angle</text:span></text:p>
      <text:p text:style-name="P3"/>
      <text:p text:style-name="P2">Exemple :</text:p>
      <text:p text:style-name="P3">L’angle vert se note <draw:frame draw:style-name="fr4" draw:name="Objet1" text:anchor-type="as-char" svg:y="-0.527cm" svg:width="0.94cm" svg:height="0.739cm" draw:z-index="1"><draw:object xlink:href="./Object 1" xlink:type="simple" xlink:show="embed" xlink:actuate="onLoad"/><draw:image xlink:href="./ObjectReplacements/Object 1" xlink:type="simple" xlink:show="embed" xlink:actuate="onLoad"/><svg:desc>CID</svg:desc></draw:frame> ; <draw:frame draw:style-name="fr4" draw:name="Objet2" text:anchor-type="as-char" svg:y="-0.527cm" svg:width="0.81cm" svg:height="0.758cm" draw:z-index="2"><draw:object xlink:href="./Object 2" xlink:type="simple" xlink:show="embed" xlink:actuate="onLoad"/><draw:image xlink:href="./ObjectReplacements/Object 2" xlink:type="simple" xlink:show="embed" xlink:actuate="onLoad"/><svg:desc>EIF</svg:desc></draw:frame><text:span text:style-name="T3"> ; </text:span><text:span text:style-name="T3"><draw:frame draw:style-name="fr4" draw:name="Objet3" text:anchor-type="as-char" svg:y="-0.527cm" svg:width="0.861cm" svg:height="0.758cm" draw:z-index="3"><draw:object xlink:href="./Object 3" xlink:type="simple" xlink:show="embed" xlink:actuate="onLoad"/><draw:image xlink:href="./ObjectReplacements/Object 3" xlink:type="simple" xlink:show="embed" xlink:actuate="onLoad"/><svg:desc>CIF</svg:desc></draw:frame></text:span><text:span text:style-name="T3"> ; </text:span><text:span text:style-name="T3"><draw:frame draw:style-name="fr4" draw:name="Objet4" text:anchor-type="as-char" svg:y="-0.527cm" svg:width="0.94cm" svg:height="0.739cm" draw:z-index="4"><draw:object xlink:href="./Object 4" xlink:type="simple" xlink:show="embed" xlink:actuate="onLoad"/><draw:image xlink:href="./ObjectReplacements/Object 4" xlink:type="simple" xlink:show="embed" xlink:actuate="onLoad"/><svg:desc>DIC</svg:desc></draw:frame></text:span><text:span text:style-name="T3"> ; </text:span><text:span text:style-name="T3"><draw:frame draw:style-name="fr4" draw:name="Objet5" text:anchor-type="as-char" svg:y="-0.527cm" svg:width="0.893cm" svg:height="0.739cm" draw:z-index="5"><draw:object xlink:href="./Object 5" xlink:type="simple" xlink:show="embed" xlink:actuate="onLoad"/><draw:image xlink:href="./ObjectReplacements/Object 5" xlink:type="simple" xlink:show="embed" xlink:actuate="onLoad"/><svg:desc>DIE</svg:desc></draw:frame></text:span><text:span text:style-name="T3"> ; </text:span><text:span text:style-name="T3"><draw:frame draw:style-name="fr4" draw:name="Objet6" text:anchor-type="as-char" svg:y="-0.527cm" svg:width="0.861cm" svg:height="0.758cm" draw:z-index="6"><draw:object xlink:href="./Object 6" xlink:type="simple" xlink:show="embed" xlink:actuate="onLoad"/><draw:image xlink:href="./ObjectReplacements/Object 6" xlink:type="simple" xlink:show="embed" xlink:actuate="onLoad"/><svg:desc>FIC</svg:desc></draw:frame></text:span><text:span text:style-name="T3"> ; </text:span><text:span text:style-name="T3"><draw:frame draw:style-name="fr4" draw:name="Objet7" text:anchor-type="as-char" svg:y="-0.527cm" svg:width="0.81cm" svg:height="0.758cm" draw:z-index="7"><draw:object xlink:href="./Object 7" xlink:type="simple" xlink:show="embed" xlink:actuate="onLoad"/><draw:image xlink:href="./ObjectReplacements/Object 7" xlink:type="simple" xlink:show="embed" xlink:actuate="onLoad"/><svg:desc>FIE</svg:desc></draw:frame></text:span><text:span text:style-name="T3"><text:s/>…</text:span></text:p>
      <text:p text:style-name="P17">Dans toutes ces notations, la lettre I désigne le sommet de l’angle.</text:p>
      <text:p text:style-name="P17"><draw:frame draw:style-name="fr2" draw:name="Image2" text:anchor-type="paragraph" svg:width="10.927cm" svg:height="4.339cm" draw:z-index="8"><draw:image xlink:href="Pictures/100002010000019D000000A45374ED0B998ADA1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61247224294308" text:continue-numbering="true" text:style-name="L1">
        <text:list-item>
          <text:p text:style-name="P11"><text:soft-page-break/>Mesure d’un angle</text:p>
        </text:list-item>
      </text:list>
      <text:p text:style-name="P17">a) Unité : le degré</text:p>
      <text:p text:style-name="P17"/>
      <text:p text:style-name="P17">Au collège, l’unité de mesure d’angle est le degré.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D<text:span text:style-name="T3">éfinition :</text:span></text:p>
            <text:p text:style-name="P8">Un angle plat peut être partagé en 180 parties égales.</text:p>
            <text:p text:style-name="P8">Un degré (noté 1°) est la mesure de chacune de ces parties.</text:p>
          </table:table-cell>
        </table:table-row>
      </table:table>
      <text:p text:style-name="P12"/>
      <text:p text:style-name="P12">Notation :<text:span text:style-name="T2"> Lorsque la mesure d’un angle </text:span><text:span text:style-name="T2"><draw:frame draw:style-name="fr4" draw:name="Objet8" text:anchor-type="as-char" svg:y="-0.527cm" svg:width="1.154cm" svg:height="0.739cm" draw:z-index="9"><draw:object xlink:href="./Object 8" xlink:type="simple" xlink:show="embed" xlink:actuate="onLoad"/><draw:image xlink:href="./ObjectReplacements/Object 8" xlink:type="simple" xlink:show="embed" xlink:actuate="onLoad"/><svg:desc>AOB</svg:desc></draw:frame></text:span><text:span text:style-name="T2"><text:s/>est égale à 40°, on note : </text:span><text:span text:style-name="T2"><draw:frame draw:style-name="fr4" draw:name="Objet9" text:anchor-type="as-char" svg:y="-0.527cm" svg:width="1.154cm" svg:height="0.739cm" draw:z-index="10"><draw:object xlink:href="./Object 9" xlink:type="simple" xlink:show="embed" xlink:actuate="onLoad"/><draw:image xlink:href="./ObjectReplacements/Object 9" xlink:type="simple" xlink:show="embed" xlink:actuate="onLoad"/><svg:desc>AOB</svg:desc></draw:frame></text:span><text:span text:style-name="T2">=40°</text:span></text:p>
      <text:p text:style-name="P12"><text:span text:style-name="T2"/></text:p>
      <text:p text:style-name="P12">Remarques :</text:p>
      <text:list xml:id="list102641304" text:style-name="L2">
        <text:list-item>
          <text:p text:style-name="P13"><text:span text:style-name="T2">Un angle plat mesure 180°</text:span></text:p>
        </text:list-item>
        <text:list-item>
          <text:p text:style-name="P13"><text:span text:style-name="T2">Pour mesure un angle, on utilise un rapporteur.</text:span></text:p>
        </text:list-item>
        <text:list-item>
          <text:p text:style-name="P13"><text:span text:style-name="T2">La plupart des rapporteurs sont gradués dans les deux sens.</text:span></text:p>
        </text:list-item>
      </text:list>
      <text:p text:style-name="P12"><draw:g text:anchor-type="paragraph" draw:z-index="11" draw:name="Forme1" draw:style-name="gr1"><draw:frame draw:style-name="gr2" draw:text-style-name="P20" svg:width="0.929cm" svg:height="0.74cm" draw:transform="rotate (1.39608886867026) translate (4.57729166666667cm 5.24756944444444cm)"><draw:text-box><text:p text:style-name="P19"><text:span text:style-name="T4">10</text:span></text:p></draw:text-box></draw:frame><draw:frame draw:style-name="gr3" draw:text-style-name="P20" svg:width="1.14cm" svg:height="0.74cm" draw:transform="rotate (1.39469260526867) translate (4.24391666666667cm 5.29872222222222cm)"><draw:text-box><text:p text:style-name="P19"><text:span text:style-name="T4">170</text:span></text:p></draw:text-box></draw:frame><draw:frame draw:style-name="gr4" draw:text-style-name="P20" svg:width="0.929cm" svg:height="0.74cm" draw:transform="rotate (1.22155594347083) translate (4.69270833333333cm 4.50673611111111cm)"><draw:text-box><text:p text:style-name="P19"><text:span text:style-name="T4">20</text:span></text:p></draw:text-box></draw:frame><draw:frame draw:style-name="gr5" draw:text-style-name="P20" svg:width="1.14cm" svg:height="0.74cm" draw:transform="rotate (1.21998514714404) translate (4.35504166666667cm 4.49791666666667cm)"><draw:text-box><text:p text:style-name="P19"><text:span text:style-name="T4">160</text:span></text:p></draw:text-box></draw:frame><draw:frame draw:style-name="gr6" draw:text-style-name="P20" svg:width="0.929cm" svg:height="0.74cm" draw:transform="rotate (1.0473720841218) translate (4.93536111111111cm 3.79765277777778cm)"><draw:text-box><text:p text:style-name="P19"><text:span text:style-name="T4">30</text:span></text:p></draw:text-box></draw:frame><draw:frame draw:style-name="gr7" draw:text-style-name="P20" svg:width="1.14cm" svg:height="0.74cm" draw:transform="rotate (1.046673952421) translate (4.60275cm 3.72709722222222cm)"><draw:text-box><text:p text:style-name="P19"><text:span text:style-name="T4">150</text:span></text:p></draw:text-box></draw:frame><draw:frame draw:style-name="gr8" draw:text-style-name="P20" svg:width="0.929cm" svg:height="0.74cm" draw:transform="rotate (0.871442895520769) translate (5.29772222222222cm 3.13795833333333cm)"><draw:text-box><text:p text:style-name="P19"><text:span text:style-name="T4">40</text:span></text:p></draw:text-box></draw:frame><draw:frame draw:style-name="gr9" draw:text-style-name="P20" svg:width="1.14cm" svg:height="0.74cm" draw:transform="rotate (0.872664625997165) translate (4.98298611111111cm 3.01625cm)"><draw:text-box><text:p text:style-name="P19"><text:span text:style-name="T4">140</text:span></text:p></draw:text-box></draw:frame><draw:frame draw:style-name="gr10" draw:text-style-name="P20" svg:width="0.929cm" svg:height="0.74cm" draw:transform="rotate (0.700924227600923) translate (5.76868055555556cm 2.55411111111111cm)"><draw:text-box><text:p text:style-name="P19"><text:span text:style-name="T4">50</text:span></text:p></draw:text-box></draw:frame><draw:frame draw:style-name="gr11" draw:text-style-name="P20" svg:width="1.14cm" svg:height="0.74cm" draw:transform="rotate (0.696909970321336) translate (5.48040277777778cm 2.37672222222222cm)"><draw:text-box><text:p text:style-name="P19"><text:span text:style-name="T4">130</text:span></text:p></draw:text-box></draw:frame><draw:frame draw:style-name="gr12" draw:text-style-name="P20" svg:width="0.929cm" svg:height="0.74cm" draw:transform="rotate (0.523424242673099) translate (6.33236111111111cm 2.06022222222222cm)"><draw:text-box><text:p text:style-name="P19"><text:span text:style-name="T4">60</text:span></text:p></draw:text-box></draw:frame><draw:frame draw:style-name="gr13" draw:text-style-name="P20" svg:width="1.14cm" svg:height="0.74cm" draw:transform="rotate (0.524122374373897) translate (6.08188888888889cm 1.83620833333333cm)"><draw:text-box><text:p text:style-name="P19"><text:span text:style-name="T4">120</text:span></text:p></draw:text-box></draw:frame><draw:frame draw:style-name="gr14" draw:text-style-name="P20" svg:width="0.929cm" svg:height="0.74cm" draw:transform="rotate (0.349240383324065) translate (6.97441666666667cm 1.67040277777778cm)"><draw:text-box><text:p text:style-name="P19"><text:span text:style-name="T4">70</text:span></text:p></draw:text-box></draw:frame><draw:frame draw:style-name="gr15" draw:text-style-name="P20" svg:width="1.124cm" svg:height="0.74cm" draw:transform="rotate (0.349414916249265) translate (6.77333333333333cm 1.40305555555556cm)"><draw:text-box><text:p text:style-name="P19"><text:span text:style-name="T4">110</text:span></text:p></draw:text-box></draw:frame><draw:frame draw:style-name="gr16" draw:text-style-name="P20" svg:width="0.929cm" svg:height="0.74cm" draw:transform="rotate (0.172787595947439) translate (7.67368055555556cm 1.40052777777778cm)"><draw:text-box><text:p text:style-name="P19"><text:span text:style-name="T4">80</text:span></text:p></draw:text-box></draw:frame><draw:frame draw:style-name="gr17" draw:text-style-name="P20" svg:width="1.14cm" svg:height="0.74cm" draw:transform="rotate (0.175754655675829) translate (7.51416666666667cm 1.10419444444444cm)"><draw:text-box><text:p text:style-name="P19"><text:span text:style-name="T4">100</text:span></text:p></draw:text-box></draw:frame><draw:frame draw:style-name="gr18" draw:text-style-name="P20" svg:width="0.929cm" svg:height="0.74cm" svg:x="8.41cm" svg:y="1.254cm"><draw:text-box><text:p text:style-name="P19"><text:span text:style-name="T4">90</text:span></text:p></draw:text-box></draw:frame><draw:frame draw:style-name="gr19" draw:text-style-name="P20" svg:width="0.929cm" svg:height="0.74cm" svg:x="8.41cm" svg:y="0.935cm"><draw:text-box><text:p text:style-name="P19"><text:span text:style-name="T4">90</text:span></text:p></draw:text-box></draw:frame><draw:frame draw:style-name="gr20" draw:text-style-name="P20" svg:width="1.14cm" svg:height="0.74cm" draw:transform="rotate (-0.174183859349035) translate (9.05580555555556cm 1.21961111111111cm)"><draw:text-box><text:p text:style-name="P19"><text:span text:style-name="T4">100</text:span></text:p></draw:text-box></draw:frame><draw:frame draw:style-name="gr21" draw:text-style-name="P20" svg:width="0.929cm" svg:height="0.74cm" draw:transform="rotate (-0.174707458124632) translate (9.21808333333333cm 0.924277777777778cm)"><draw:text-box><text:p text:style-name="P19"><text:span text:style-name="T4">80</text:span></text:p></draw:text-box></draw:frame><draw:frame draw:style-name="gr22" draw:text-style-name="P20" svg:width="1.124cm" svg:height="0.74cm" draw:transform="rotate (-0.348716784548468) translate (9.80975cm 1.32115277777778cm)"><draw:text-box><text:p text:style-name="P19"><text:span text:style-name="T4">110</text:span></text:p></draw:text-box></draw:frame><draw:frame draw:style-name="gr23" draw:text-style-name="P20" svg:width="0.929cm" svg:height="0.74cm" draw:transform="rotate (-0.348542251623268) translate (10.0135972222222cm 1.05304166666667cm)"><draw:text-box><text:p text:style-name="P19"><text:span text:style-name="T4">70</text:span></text:p></draw:text-box></draw:frame><draw:frame draw:style-name="gr24" draw:text-style-name="P20" svg:width="1.14cm" svg:height="0.74cm" draw:transform="rotate (-0.523249709747901) translate (10.5215972222222cm 1.54516666666667cm)"><draw:text-box><text:p text:style-name="P19"><text:span text:style-name="T4">120</text:span></text:p></draw:text-box></draw:frame><draw:frame draw:style-name="gr25" draw:text-style-name="P20" svg:width="0.929cm" svg:height="0.74cm" draw:transform="rotate (-0.5234242426731) translate (10.7738333333333cm 1.31938888888889cm)"><draw:text-box><text:p text:style-name="P19"><text:span text:style-name="T4">60</text:span></text:p></draw:text-box></draw:frame><draw:frame draw:style-name="gr26" draw:text-style-name="P20" svg:width="1.14cm" svg:height="0.74cm" draw:transform="rotate (-0.699178898348929) translate (11.1901111111111cm 1.889125cm)"><draw:text-box><text:p text:style-name="P19"><text:span text:style-name="T4">130</text:span></text:p></draw:text-box></draw:frame><draw:frame draw:style-name="gr27" draw:text-style-name="P20" svg:width="0.929cm" svg:height="0.74cm" draw:transform="rotate (-0.698131700797732) translate (11.477625cm 1.7135cm)"><draw:text-box><text:p text:style-name="P19"><text:span text:style-name="T4">50</text:span></text:p></draw:text-box></draw:frame><draw:frame draw:style-name="gr28" draw:text-style-name="P20" svg:width="1.14cm" svg:height="0.74cm" draw:transform="rotate (-0.872839158922364) translate (11.7880694444444cm 2.34773611111111cm)"><draw:text-box><text:p text:style-name="P19"><text:span text:style-name="T4">140</text:span></text:p></draw:text-box></draw:frame><draw:frame draw:style-name="gr29" draw:text-style-name="P20" svg:width="0.929cm" svg:height="0.74cm" draw:transform="rotate (-0.871442895520769) translate (12.1020416666667cm 2.22426388888889cm)"><draw:text-box><text:p text:style-name="P19"><text:span text:style-name="T4">40</text:span></text:p></draw:text-box></draw:frame><draw:frame draw:style-name="gr30" draw:text-style-name="P20" svg:width="1.14cm" svg:height="0.74cm" draw:transform="rotate (-1.047546617047) translate (12.2968333333333cm 2.90059722222222cm)"><draw:text-box><text:p text:style-name="P19"><text:span text:style-name="T4">150</text:span></text:p></draw:text-box></draw:frame><draw:frame draw:style-name="gr31" draw:text-style-name="P20" svg:width="0.929cm" svg:height="0.74cm" draw:transform="rotate (-1.0456267548698) translate (12.6249166666667cm 2.83356944444444cm)"><draw:text-box><text:p text:style-name="P19"><text:span text:style-name="T4">30</text:span></text:p></draw:text-box></draw:frame><draw:frame draw:style-name="gr32" draw:text-style-name="P20" svg:width="1.14cm" svg:height="0.74cm" draw:transform="rotate (-1.22068327884483) translate (12.7017638888889cm 3.53483333333333cm)"><draw:text-box><text:p text:style-name="P19"><text:span text:style-name="T4">160</text:span></text:p></draw:text-box></draw:frame><draw:frame draw:style-name="gr33" draw:text-style-name="P20" svg:width="0.929cm" svg:height="0.74cm" draw:transform="rotate (-1.22155594347083) translate (13.0404305555556cm 3.52601388888889cm)"><draw:text-box><text:p text:style-name="P19"><text:span text:style-name="T4">20</text:span></text:p></draw:text-box></draw:frame><draw:frame draw:style-name="gr34" draw:text-style-name="P20" svg:width="1.14cm" svg:height="0.74cm" draw:transform="rotate (-1.39504167111907) translate (12.9900416666667cm 4.22980555555556cm)"><draw:text-box><text:p text:style-name="P19"><text:span text:style-name="T4">170</text:span></text:p></draw:text-box></draw:frame><draw:frame draw:style-name="gr35" draw:text-style-name="P20" svg:width="0.929cm" svg:height="0.74cm" draw:transform="rotate (-1.39608886867026) translate (13.3244166666667cm 4.28272222222222cm)"><draw:text-box><text:p text:style-name="P19"><text:span text:style-name="T4">10</text:span></text:p></draw:text-box></draw:frame><draw:circle draw:style-name="gr36" draw:text-style-name="P21" svg:width="10cm" svg:height="10cm" svg:x="3.875cm" svg:y="0.536cm" draw:kind="arc" draw:start-angle="0" draw:end-angle="180"><text:p/></draw:circle><draw:line draw:style-name="gr37" draw:text-style-name="P21" svg:x1="3.875cm" svg:y1="5.536cm" svg:x2="13.875cm" svg:y2="5.536cm"><text:p/></draw:line><draw:line draw:style-name="gr38" draw:text-style-name="P21" svg:x1="8.875cm" svg:y1="5.136cm" svg:x2="8.875cm" svg:y2="5.936cm"><text:p/></draw:line><draw:line draw:style-name="gr39" draw:text-style-name="P21" svg:x1="8.875cm" svg:y1="3.736cm" svg:x2="8.875cm" svg:y2="2.336cm"><text:p/></draw:line><draw:line draw:style-name="gr40" draw:text-style-name="P21" svg:x1="13.307cm" svg:y1="4.755cm" svg:x2="13.799cm" svg:y2="4.668cm"><text:p/></draw:line><draw:line draw:style-name="gr41" draw:text-style-name="P21" svg:x1="13.104cm" svg:y1="3.997cm" svg:x2="13.574cm" svg:y2="3.826cm"><text:p/></draw:line><draw:line draw:style-name="gr42" draw:text-style-name="P21" svg:x1="12.772cm" svg:y1="3.285cm" svg:x2="13.205cm" svg:y2="3.035cm"><text:p/></draw:line><draw:line draw:style-name="gr43" draw:text-style-name="P21" svg:x1="12.321cm" svg:y1="2.643cm" svg:x2="12.704cm" svg:y2="2.322cm"><text:p/></draw:line><draw:line draw:style-name="gr44" draw:text-style-name="P21" svg:x1="11.768cm" svg:y1="2.088cm" svg:x2="12.089cm" svg:y2="1.705cm"><text:p/></draw:line><draw:line draw:style-name="gr45" draw:text-style-name="P21" svg:x1="11.125cm" svg:y1="1.638cm" svg:x2="11.375cm" svg:y2="1.205cm"><text:p/></draw:line><draw:line draw:style-name="gr46" draw:text-style-name="P21" svg:x1="10.414cm" svg:y1="1.307cm" svg:x2="10.585cm" svg:y2="0.837cm"><text:p/></draw:line><draw:line draw:style-name="gr47" draw:text-style-name="P21" svg:x1="9.655cm" svg:y1="1.104cm" svg:x2="9.742cm" svg:y2="0.612cm"><text:p/></draw:line><draw:line draw:style-name="gr48" draw:text-style-name="P21" svg:x1="8.875cm" svg:y1="1.036cm" svg:x2="8.875cm" svg:y2="0.536cm"><text:p/></draw:line><draw:line draw:style-name="gr49" draw:text-style-name="P21" svg:x1="8.094cm" svg:y1="1.104cm" svg:x2="8.007cm" svg:y2="0.612cm"><text:p/></draw:line><draw:line draw:style-name="gr50" draw:text-style-name="P21" svg:x1="7.336cm" svg:y1="1.307cm" svg:x2="7.165cm" svg:y2="0.837cm"><text:p/></draw:line><draw:line draw:style-name="gr51" draw:text-style-name="P21" svg:x1="6.624cm" svg:y1="1.638cm" svg:x2="6.374cm" svg:y2="1.205cm"><text:p/></draw:line><draw:line draw:style-name="gr52" draw:text-style-name="P21" svg:x1="5.982cm" svg:y1="2.088cm" svg:x2="5.661cm" svg:y2="1.705cm"><text:p/></draw:line><draw:line draw:style-name="gr53" draw:text-style-name="P21" svg:x1="5.427cm" svg:y1="2.643cm" svg:x2="5.044cm" svg:y2="2.322cm"><text:p/></draw:line><draw:line draw:style-name="gr54" draw:text-style-name="P21" svg:x1="4.977cm" svg:y1="3.285cm" svg:x2="4.544cm" svg:y2="3.035cm"><text:p/></draw:line><draw:line draw:style-name="gr55" draw:text-style-name="P21" svg:x1="4.646cm" svg:y1="3.997cm" svg:x2="4.176cm" svg:y2="3.826cm"><text:p/></draw:line><draw:line draw:style-name="gr56" draw:text-style-name="P21" svg:x1="4.443cm" svg:y1="4.755cm" svg:x2="3.951cm" svg:y2="4.668cm"><text:p/></draw:line></draw:g>Exemple :</text:p>
      <text:p text:style-name="P12"><text:span text:style-name="T2"/></text:p>
      <text:p text:style-name="P12"><text:span text:style-name="T2"/></text:p>
      <text:p text:style-name="P12"><draw:frame draw:style-name="fr3" draw:name="Image3" text:anchor-type="paragraph" svg:x="4.431cm" svg:y="0.489cm" svg:width="7.541cm" svg:height="4.048cm" draw:z-index="12"><draw:image xlink:href="Pictures/100002010000011D00000099A72B1564AB87C7D1.png" xlink:type="simple" xlink:show="embed" xlink:actuate="onLoad" loext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4"><text:span text:style-name="T2">La mesure de l’angle </text:span><text:span text:style-name="T2"><draw:frame draw:style-name="fr4" draw:name="Objet10" text:anchor-type="as-char" svg:y="-0.527cm" svg:width="1.154cm" svg:height="0.739cm" draw:z-index="13"><draw:object xlink:href="./Object 10" xlink:type="simple" xlink:show="embed" xlink:actuate="onLoad"/><draw:image xlink:href="./ObjectReplacements/Object 10" xlink:type="simple" xlink:show="embed" xlink:actuate="onLoad"/><svg:desc>AOB</svg:desc></draw:frame></text:span><text:span text:style-name="T2"><text:s/>est environ égale à ……</text:span></text:p>
      <text:p text:style-name="P14"><text:span text:style-name="T2"/></text:p>
      <text:p text:style-name="P14"><text:span text:style-name="T2">b) Angles particuliers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able:table table:name="Tableau5" table:style-name="Tableau5">
        <table:table-column table:style-name="Tableau5.A" table:number-columns-repeated="6"/>
        <text:soft-page-break/>
        <table:table-row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  <text:p text:style-name="P6"/>
            <text:p text:style-name="P6"/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F1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9">Angle</text:p>
          </table:table-cell>
          <table:table-cell table:style-name="Tableau5.A2" office:value-type="string">
            <text:p text:style-name="P10">nul</text:p>
          </table:table-cell>
          <table:table-cell table:style-name="Tableau5.A2" office:value-type="string">
            <text:p text:style-name="P10">aigu</text:p>
          </table:table-cell>
          <table:table-cell table:style-name="Tableau5.A2" office:value-type="string">
            <text:p text:style-name="P10">droit</text:p>
          </table:table-cell>
          <table:table-cell table:style-name="Tableau5.A2" office:value-type="string">
            <text:p text:style-name="P10">obtus</text:p>
          </table:table-cell>
          <table:table-cell table:style-name="Tableau5.F2" office:value-type="string">
            <text:p text:style-name="P10">plat</text:p>
          </table:table-cell>
        </table:table-row>
        <table:table-row>
          <table:table-cell table:style-name="Tableau5.A2" office:value-type="string">
            <text:p text:style-name="P9">Mesure</text:p>
          </table:table-cell>
          <table:table-cell table:style-name="Tableau5.A2" office:value-type="string">
            <text:p text:style-name="P9">Égale à 0°</text:p>
          </table:table-cell>
          <table:table-cell table:style-name="Tableau5.A2" office:value-type="string">
            <text:p text:style-name="P9">Compris entre </text:p>
            <text:p text:style-name="P9"/>
          </table:table-cell>
          <table:table-cell table:style-name="Tableau5.A2" office:value-type="string">
            <text:p text:style-name="P9">Égale à</text:p>
          </table:table-cell>
          <table:table-cell table:style-name="Tableau5.A2" office:value-type="string">
            <text:p text:style-name="P9">Comprise entre</text:p>
          </table:table-cell>
          <table:table-cell table:style-name="Tableau5.F2" office:value-type="string">
            <text:p text:style-name="P9">Égale à</text:p>
          </table:table-cell>
        </table:table-row>
      </table:table>
      <text:p text:style-name="P14"><text:span text:style-name="T2"/></text:p>
      <text:p text:style-name="P15">Exemple :</text:p>
      <text:p text:style-name="P18">L’angle <draw:frame draw:style-name="fr4" draw:name="Objet11" text:anchor-type="as-char" svg:y="-0.527cm" svg:width="1.154cm" svg:height="0.739cm" draw:z-index="14"><draw:object xlink:href="./Object 11" xlink:type="simple" xlink:show="embed" xlink:actuate="onLoad"/><draw:image xlink:href="./ObjectReplacements/Object 11" xlink:type="simple" xlink:show="embed" xlink:actuate="onLoad"/><svg:desc>AOB</svg:desc></draw:frame><text:s/>est un angle ………….</text:p>
      <text:p text:style-name="P18"><draw:frame draw:style-name="fr1" draw:name="Image4" text:anchor-type="paragraph" svg:x="3.459cm" svg:y="1.647cm" svg:width="10.082cm" svg:height="5.292cm" draw:z-index="15"><draw:image xlink:href="Pictures/100002010000017D000000C8B4B7933860AB13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5:22:48.509000000</meta:creation-date>
    <dc:date>2021-06-14T16:12:46.051000000</dc:date>
    <meta:editing-duration>PT2M49S</meta:editing-duration>
    <meta:editing-cycles>2</meta:editing-cycles>
    <meta:generator>LibreOffice/6.2.3.2$Windows_X86_64 LibreOffice_project/aecc05fe267cc68dde00352a451aa867b3b546ac</meta:generator>
    <meta:document-statistic meta:table-count="5" meta:image-count="4" meta:object-count="11" meta:page-count="3" meta:paragraph-count="41" meta:word-count="246" meta:character-count="1374" meta:non-whitespace-character-count="1068"/>
  </office:meta>
</office:document-meta>
</file>

<file path=Object 1/content.xml><?xml version="1.0" encoding="utf-8"?>
<math xmlns="http://www.w3.org/1998/Math/MathML" display="block">
  <semantics>
    <mover accent="true">
      <mtext>CID</mtext>
      <mo stretchy="true">^</mo>
    </mover>
    <annotation encoding="StarMath 5.0"> widehat {"CID"}</annotation>
  </semantics>
</math>
</file>

<file path=Object 10/content.xml><?xml version="1.0" encoding="utf-8"?>
<math xmlns="http://www.w3.org/1998/Math/MathML" display="block">
  <semantics>
    <mover accent="true">
      <mtext>AOB</mtext>
      <mo stretchy="true">^</mo>
    </mover>
    <annotation encoding="StarMath 5.0"> widehat {"AOB"}</annotation>
  </semantics>
</math>
</file>

<file path=Object 11/content.xml><?xml version="1.0" encoding="utf-8"?>
<math xmlns="http://www.w3.org/1998/Math/MathML" display="block">
  <semantics>
    <mover accent="true">
      <mtext>AOB</mtext>
      <mo stretchy="true">^</mo>
    </mover>
    <annotation encoding="StarMath 5.0"> widehat {"AOB"}</annotation>
  </semantics>
</math>
</file>

<file path=Object 2/content.xml><?xml version="1.0" encoding="utf-8"?>
<math xmlns="http://www.w3.org/1998/Math/MathML" display="block">
  <semantics>
    <mover accent="true">
      <mtext>EIF</mtext>
      <mo stretchy="true">^</mo>
    </mover>
    <annotation encoding="StarMath 5.0"> widehat {"EIF"}</annotation>
  </semantics>
</math>
</file>

<file path=Object 3/content.xml><?xml version="1.0" encoding="utf-8"?>
<math xmlns="http://www.w3.org/1998/Math/MathML" display="block">
  <semantics>
    <mover accent="true">
      <mtext>CIF</mtext>
      <mo stretchy="true">^</mo>
    </mover>
    <annotation encoding="StarMath 5.0"> widehat {"CIF"}</annotation>
  </semantics>
</math>
</file>

<file path=Object 4/content.xml><?xml version="1.0" encoding="utf-8"?>
<math xmlns="http://www.w3.org/1998/Math/MathML" display="block">
  <semantics>
    <mover accent="true">
      <mtext>DIC</mtext>
      <mo stretchy="true">^</mo>
    </mover>
    <annotation encoding="StarMath 5.0"> widehat {"DIC"}</annotation>
  </semantics>
</math>
</file>

<file path=Object 5/content.xml><?xml version="1.0" encoding="utf-8"?>
<math xmlns="http://www.w3.org/1998/Math/MathML" display="block">
  <semantics>
    <mover accent="true">
      <mtext>DIE</mtext>
      <mo stretchy="true">^</mo>
    </mover>
    <annotation encoding="StarMath 5.0"> widehat {"DIE"}</annotation>
  </semantics>
</math>
</file>

<file path=Object 6/content.xml><?xml version="1.0" encoding="utf-8"?>
<math xmlns="http://www.w3.org/1998/Math/MathML" display="block">
  <semantics>
    <mover accent="true">
      <mtext>FIC</mtext>
      <mo stretchy="true">^</mo>
    </mover>
    <annotation encoding="StarMath 5.0"> widehat {"FIC"}</annotation>
  </semantics>
</math>
</file>

<file path=Object 7/content.xml><?xml version="1.0" encoding="utf-8"?>
<math xmlns="http://www.w3.org/1998/Math/MathML" display="block">
  <semantics>
    <mover accent="true">
      <mtext>FIE</mtext>
      <mo stretchy="true">^</mo>
    </mover>
    <annotation encoding="StarMath 5.0"> widehat {"FIE"}</annotation>
  </semantics>
</math>
</file>

<file path=Object 8/content.xml><?xml version="1.0" encoding="utf-8"?>
<math xmlns="http://www.w3.org/1998/Math/MathML" display="block">
  <semantics>
    <mover accent="true">
      <mtext>AOB</mtext>
      <mo stretchy="true">^</mo>
    </mover>
    <annotation encoding="StarMath 5.0"> widehat {"AOB"}</annotation>
  </semantics>
</math>
</file>

<file path=Object 9/content.xml><?xml version="1.0" encoding="utf-8"?>
<math xmlns="http://www.w3.org/1998/Math/MathML" display="block">
  <semantics>
    <mover accent="true">
      <mtext>AOB</mtext>
      <mo stretchy="true">^</mo>
    </mover>
    <annotation encoding="StarMath 5.0"> widehat {"AOB"}</annotation>
  </semantics>
</math>
</file>