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35A000000A275836B53383E03B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3cm" style:rel-column-width="10922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833cm" style:rel-column-width="1092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833cm" style:rel-column-width="10922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F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 style:list-style-name="L1">
      <style:text-properties style:font-name="OpenDyslexic" style:text-underline-style="solid" style:text-underline-width="auto" style:text-underline-color="font-color" officeooo:rsid="001724e5" officeooo:paragraph-rsid="001724e5"/>
    </style:style>
    <style:style style:name="P3" style:family="paragraph" style:parent-style-name="Standard" style:list-style-name="L1">
      <style:text-properties style:font-name="OpenDyslexic" style:text-underline-style="solid" style:text-underline-width="auto" style:text-underline-color="font-color" officeooo:rsid="001724e5" officeooo:paragraph-rsid="001a2ef5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1724e5" officeooo:paragraph-rsid="001724e5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1724e5" officeooo:paragraph-rsid="001a2ef5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18c53b" officeooo:paragraph-rsid="0018c53b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194b30" officeooo:paragraph-rsid="00194b30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1a2ef5" officeooo:paragraph-rsid="001a2ef5"/>
    </style:style>
    <style:style style:name="P9" style:family="paragraph" style:parent-style-name="Standard" style:list-style-name="L1">
      <style:text-properties style:font-name="OpenDyslexic" style:text-underline-style="solid" style:text-underline-width="auto" style:text-underline-color="font-color" officeooo:rsid="001a2ef5" officeooo:paragraph-rsid="001a2ef5"/>
    </style:style>
    <style:style style:name="P10" style:family="paragraph" style:parent-style-name="Standard">
      <style:text-properties style:font-name="OpenDyslexic" style:text-underline-style="none" officeooo:rsid="001724e5" officeooo:paragraph-rsid="001724e5"/>
    </style:style>
    <style:style style:name="P11" style:family="paragraph" style:parent-style-name="Standard" style:list-style-name="L2">
      <style:text-properties style:font-name="OpenDyslexic" style:text-underline-style="none" officeooo:rsid="001724e5" officeooo:paragraph-rsid="001724e5"/>
    </style:style>
    <style:style style:name="P12" style:family="paragraph" style:parent-style-name="Standard" style:list-style-name="L7">
      <style:text-properties style:font-name="OpenDyslexic" style:text-underline-style="none" officeooo:rsid="001724e5" officeooo:paragraph-rsid="001724e5"/>
    </style:style>
    <style:style style:name="P13" style:family="paragraph" style:parent-style-name="Standard">
      <style:text-properties style:font-name="OpenDyslexic" style:text-underline-style="none" officeooo:rsid="0018c53b" officeooo:paragraph-rsid="0018c53b"/>
    </style:style>
    <style:style style:name="P14" style:family="paragraph" style:parent-style-name="Standard">
      <style:text-properties style:font-name="OpenDyslexic" style:text-underline-style="none" officeooo:rsid="001a2ef5" officeooo:paragraph-rsid="001a2ef5"/>
    </style:style>
    <style:style style:name="P15" style:family="paragraph" style:parent-style-name="Standard">
      <style:text-properties style:font-name="OpenDyslexic" officeooo:paragraph-rsid="001a2ef5"/>
    </style:style>
    <style:style style:name="P16" style:family="paragraph" style:parent-style-name="Table_20_Contents">
      <style:text-properties style:font-name="OpenDyslexic"/>
    </style:style>
    <style:style style:name="P17" style:family="paragraph" style:parent-style-name="Table_20_Contents">
      <style:text-properties style:font-name="OpenDyslexic" officeooo:rsid="001724e5"/>
    </style:style>
    <style:style style:name="P18" style:family="paragraph" style:parent-style-name="Table_20_Contents">
      <style:text-properties style:font-name="OpenDyslexic" officeooo:rsid="001724e5" officeooo:paragraph-rsid="001724e5"/>
    </style:style>
    <style:style style:name="P19" style:family="paragraph" style:parent-style-name="Table_20_Contents">
      <style:text-properties style:font-name="OpenDyslexic" style:text-underline-style="solid" style:text-underline-width="auto" style:text-underline-color="font-color" officeooo:rsid="001724e5" officeooo:paragraph-rsid="001724e5"/>
    </style:style>
    <style:style style:name="P20" style:family="paragraph" style:parent-style-name="Table_20_Contents">
      <style:text-properties style:font-name="OpenDyslexic" style:text-underline-style="solid" style:text-underline-width="auto" style:text-underline-color="font-color" officeooo:rsid="001a2ef5" officeooo:paragraph-rsid="001a2ef5"/>
    </style:style>
    <style:style style:name="P21" style:family="paragraph" style:parent-style-name="Table_20_Contents">
      <style:text-properties style:font-name="OpenDyslexic" style:text-underline-style="none" officeooo:rsid="001724e5" officeooo:paragraph-rsid="001724e5"/>
    </style:style>
    <style:style style:name="P22" style:family="paragraph" style:parent-style-name="Table_20_Contents">
      <style:text-properties style:font-name="OpenDyslexic" officeooo:rsid="00194b30" officeooo:paragraph-rsid="00194b30"/>
    </style:style>
    <style:style style:name="P23" style:family="paragraph" style:parent-style-name="Table_20_Contents">
      <style:paragraph-properties fo:text-align="center" style:justify-single-word="false"/>
      <style:text-properties style:font-name="OpenDyslexic" officeooo:rsid="00194b30" officeooo:paragraph-rsid="00194b30"/>
    </style:style>
    <style:style style:name="P24" style:family="paragraph" style:parent-style-name="Table_20_Contents">
      <style:paragraph-properties fo:text-align="center" style:justify-single-word="false"/>
      <style:text-properties style:font-name="OpenDyslexic" officeooo:rsid="00194b30" officeooo:paragraph-rsid="001a2ef5"/>
    </style:style>
    <style:style style:name="P25" style:family="paragraph" style:parent-style-name="Table_20_Contents">
      <style:text-properties style:font-name="OpenDyslexic" officeooo:rsid="00194b30" officeooo:paragraph-rsid="001a2ef5"/>
    </style:style>
    <style:style style:name="P26" style:family="paragraph" style:parent-style-name="Table_20_Contents">
      <style:paragraph-properties fo:text-align="center" style:justify-single-word="false"/>
      <style:text-properties style:font-name="OpenDyslexic"/>
    </style:style>
    <style:style style:name="P27" style:family="paragraph" style:parent-style-name="Table_20_Contents">
      <style:paragraph-properties fo:text-align="center" style:justify-single-word="false"/>
      <style:text-properties style:font-name="OpenDyslexic" officeooo:paragraph-rsid="00194b30"/>
    </style:style>
    <style:style style:name="P28" style:family="paragraph" style:parent-style-name="Table_20_Contents">
      <style:paragraph-properties fo:text-align="center" style:justify-single-word="false"/>
      <style:text-properties style:font-name="OpenDyslexic" officeooo:paragraph-rsid="001a2ef5"/>
    </style:style>
    <style:style style:name="P29" style:family="paragraph" style:parent-style-name="Table_20_Contents">
      <style:text-properties style:font-name="OpenDyslexic" officeooo:paragraph-rsid="00194b30"/>
    </style:style>
    <style:style style:name="P30" style:family="paragraph" style:parent-style-name="Table_20_Contents">
      <style:text-properties style:font-name="OpenDyslexic" officeooo:paragraph-rsid="001a2ef5"/>
    </style:style>
    <style:style style:name="T1" style:family="text">
      <style:text-properties officeooo:rsid="0018c53b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94b30"/>
    </style:style>
    <style:style style:name="T4" style:family="text">
      <style:text-properties style:text-underline-style="none" officeooo:rsid="001a2ef5"/>
    </style:style>
    <style:style style:name="T5" style:family="text">
      <style:text-properties officeooo:rsid="001a2e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7">Collège A.Lejeune <text:s text:c="68"/>6ème</text:p>
            <text:p text:style-name="P18">Cours <text:s text:c="29"/>Chapitre 9 : Proportionnalité</text:p>
          </table:table-cell>
        </table:table-row>
      </table:table>
      <text:p text:style-name="P1"/>
      <text:list xml:id="list3737481818" text:style-name="L1">
        <text:list-item>
          <text:p text:style-name="P2">Grandeurs proportionnelles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Définition :</text:p>
            <text:p text:style-name="P21">Deux grandeurs sont proportionnelles lorsque les valeurs de l’une s’obtiennent en multipliant (ou en divisant) par un même nombre non nul les valeurs de l’autre.</text:p>
          </table:table-cell>
        </table:table-row>
      </table:table>
      <text:p text:style-name="P4"/>
      <text:p text:style-name="P4">Exemple :</text:p>
      <text:p text:style-name="P10">Le mille international (symbole : mi) ou mile (en anglais) est une unité anglo-saxonne de longueur.</text:p>
      <text:p text:style-name="P10">Le mille international vaut exactement 1 609,344 mètres.</text:p>
      <text:p text:style-name="P10">Une longueur exprimée en mille est-elle proportionnelle à cette même longueur exprimée en mètres ?</text:p>
      <text:p text:style-name="P10"/>
      <text:p text:style-name="P10">On obtient la longueur en mètres en multipliant la longueur en mille par le nombre 1 609,344. </text:p>
      <text:p text:style-name="P10">Les deux grandeurs sont donc ………………………..</text:p>
      <text:p text:style-name="P10">1 609,344 est appelé ……………………………………</text:p>
      <text:p text:style-name="P10"/>
      <text:p text:style-name="P4">Remarque :</text:p>
      <text:p text:style-name="P10">Deux grandeurs ne sont pas toujours proportionnelles. En voici quelques-unes qui ne le sont pas :</text:p>
      <text:list xml:id="list3973399546" text:style-name="L2">
        <text:list-item>
          <text:p text:style-name="P11">la taille d’une personne et son âge ;</text:p>
        </text:list-item>
        <text:list-item>
          <text:p text:style-name="P11">l’aire d’un carré et la longueur de son côté.</text:p>
        </text:list-item>
      </text:list>
      <text:p text:style-name="P10"/>
      <text:p text:style-name="P10">Donnez des <text:span text:style-name="T1">exemples de grandeurs proportionnelles :</text:span></text:p>
      <text:list xml:id="list3053504940" text:style-name="L7">
        <text:list-item>
          <text:p text:style-name="P12">………………………</text:p>
        </text:list-item>
        <text:list-item>
          <text:p text:style-name="P12">………………………</text:p>
        </text:list-item>
        <text:list-item>
          <text:p text:style-name="P12">……………………...</text:p>
        </text:list-item>
      </text:list>
      <text:list xml:id="list151824553421921" text:continue-list="list3737481818" text:style-name="L1">
        <text:list-item>
          <text:p text:style-name="P2">Calculs dans une situation de proportionnalité</text:p>
        </text:list-item>
      </text:list>
      <text:p text:style-name="P13">Pour illustrer une situation de proportionnalité, on utilise souvent un tableau appelé tableau de proportionnalité. Dans un tel tableau, on obtient <text:soft-page-break/>les nombres de la seconde ligne en multipliant ceux de la première ligne par le coefficient de proportionnalité.</text:p>
      <text:p text:style-name="P13"/>
      <text:p text:style-name="P6">Exemple :<text:span text:style-name="T2"> Complète le tableau de proportionnalité suivant.</text:span></text:p>
      <table:table table:name="Tableau3" table:style-name="Tableau3">
        <table:table-column table:style-name="Tableau3.A" table:number-columns-repeated="6"/>
        <table:table-row>
          <table:table-cell table:style-name="Tableau3.A1" office:value-type="string">
            <text:p text:style-name="P22">Masse de pommes (en kg)</text:p>
          </table:table-cell>
          <table:table-cell table:style-name="Tableau3.A1" office:value-type="string">
            <text:p text:style-name="P23">2</text:p>
          </table:table-cell>
          <table:table-cell table:style-name="Tableau3.A1" office:value-type="string">
            <text:p text:style-name="P23">8</text:p>
          </table:table-cell>
          <table:table-cell table:style-name="Tableau3.A1" office:value-type="string">
            <text:p text:style-name="P26"/>
          </table:table-cell>
          <table:table-cell table:style-name="Tableau3.A1" office:value-type="string">
            <text:p text:style-name="P26"/>
          </table:table-cell>
          <table:table-cell table:style-name="Tableau3.F1" office:value-type="string">
            <text:p text:style-name="P23">24</text:p>
          </table:table-cell>
        </table:table-row>
        <table:table-row>
          <table:table-cell table:style-name="Tableau3.A2" office:value-type="string">
            <text:p text:style-name="P22">Prix (en €)</text:p>
          </table:table-cell>
          <table:table-cell table:style-name="Tableau3.A2" office:value-type="string">
            <text:p text:style-name="P16"/>
          </table:table-cell>
          <table:table-cell table:style-name="Tableau3.A2" office:value-type="string">
            <text:p text:style-name="P23">7,68</text:p>
          </table:table-cell>
          <table:table-cell table:style-name="Tableau3.A2" office:value-type="string">
            <text:p text:style-name="P23">9,60</text:p>
          </table:table-cell>
          <table:table-cell table:style-name="Tableau3.A2" office:value-type="string">
            <text:p text:style-name="P23">15,36</text:p>
          </table:table-cell>
          <table:table-cell table:style-name="Tableau3.F2" office:value-type="string">
            <text:p text:style-name="P26"/>
          </table:table-cell>
        </table:table-row>
      </table:table>
      <text:p text:style-name="P6"><text:span text:style-name="T2"/></text:p>
      <text:p text:style-name="P7">Première méthode :<text:span text:style-name="T2"> à l’aide du coefficient de proportionnalité</text:span></text:p>
      <text:p text:style-name="P7"><draw:frame draw:style-name="fr1" draw:name="Image1" text:anchor-type="paragraph" svg:x="-1.499cm" svg:y="0.212cm" svg:width="20.001cm" svg:height="3.209cm" draw:z-index="0"><draw:image xlink:href="Pictures/100000000000035A000000A275836B53383E03B1.png" xlink:type="simple" xlink:show="embed" xlink:actuate="onLoad" loext:mime-type="image/png"/></draw:frame><text:span text:style-name="T2"/></text:p>
      <table:table table:name="Tableau4" table:style-name="Tableau4">
        <table:table-column table:style-name="Tableau4.A" table:number-columns-repeated="6"/>
        <table:table-row>
          <table:table-cell table:style-name="Tableau4.A1" office:value-type="string">
            <text:p text:style-name="P22">Masse de pommes (en kg)</text:p>
          </table:table-cell>
          <table:table-cell table:style-name="Tableau4.A1" office:value-type="string">
            <text:p text:style-name="P23">2</text:p>
          </table:table-cell>
          <table:table-cell table:style-name="Tableau4.A1" office:value-type="string">
            <text:p text:style-name="P23">8</text:p>
          </table:table-cell>
          <table:table-cell table:style-name="Tableau4.A1" office:value-type="string">
            <text:p text:style-name="P27"/>
          </table:table-cell>
          <table:table-cell table:style-name="Tableau4.A1" office:value-type="string">
            <text:p text:style-name="P27"/>
          </table:table-cell>
          <table:table-cell table:style-name="Tableau4.F1" office:value-type="string">
            <text:p text:style-name="P23">24</text:p>
          </table:table-cell>
        </table:table-row>
        <table:table-row>
          <table:table-cell table:style-name="Tableau4.A2" office:value-type="string">
            <text:p text:style-name="P22">Prix (en €)</text:p>
          </table:table-cell>
          <table:table-cell table:style-name="Tableau4.A2" office:value-type="string">
            <text:p text:style-name="P29"/>
          </table:table-cell>
          <table:table-cell table:style-name="Tableau4.A2" office:value-type="string">
            <text:p text:style-name="P23">7,68</text:p>
          </table:table-cell>
          <table:table-cell table:style-name="Tableau4.A2" office:value-type="string">
            <text:p text:style-name="P23">9,60</text:p>
          </table:table-cell>
          <table:table-cell table:style-name="Tableau4.A2" office:value-type="string">
            <text:p text:style-name="P23">15,36</text:p>
          </table:table-cell>
          <table:table-cell table:style-name="Tableau4.F2" office:value-type="string">
            <text:p text:style-name="P27"/>
          </table:table-cell>
        </table:table-row>
      </table:table>
      <text:list xml:id="list151823891349740" text:continue-numbering="true" text:style-name="L1">
        <text:list-header>
          <text:p text:style-name="P3"><text:span text:style-name="T5">Deuxième méthode :</text:span><text:span text:style-name="T3"> à l’aide </text:span><text:span text:style-name="T4">de la règle de trois</text:span></text:p>
        </text:list-header>
      </text:list>
      <text:p text:style-name="P5"><draw:frame draw:style-name="fr1" draw:name="Image2" text:anchor-type="paragraph" svg:x="-1.646cm" svg:y="0.079cm" svg:width="20.001cm" svg:height="3.209cm" draw:z-index="1"><draw:image xlink:href="Pictures/100000000000035A000000A275836B53383E03B1.png" xlink:type="simple" xlink:show="embed" xlink:actuate="onLoad" loext:mime-type="image/png"/></draw:frame></text:p>
      <table:table table:name="Tableau5" table:style-name="Tableau5">
        <table:table-column table:style-name="Tableau5.A" table:number-columns-repeated="6"/>
        <table:table-row>
          <table:table-cell table:style-name="Tableau5.A1" office:value-type="string">
            <text:p text:style-name="P25">Masse de pommes (en kg)</text:p>
          </table:table-cell>
          <table:table-cell table:style-name="Tableau5.A1" office:value-type="string">
            <text:p text:style-name="P24">2</text:p>
          </table:table-cell>
          <table:table-cell table:style-name="Tableau5.A1" office:value-type="string">
            <text:p text:style-name="P24">8</text:p>
          </table:table-cell>
          <table:table-cell table:style-name="Tableau5.A1" office:value-type="string">
            <text:p text:style-name="P28"/>
          </table:table-cell>
          <table:table-cell table:style-name="Tableau5.A1" office:value-type="string">
            <text:p text:style-name="P28"/>
          </table:table-cell>
          <table:table-cell table:style-name="Tableau5.F1" office:value-type="string">
            <text:p text:style-name="P24">24</text:p>
          </table:table-cell>
        </table:table-row>
        <table:table-row>
          <table:table-cell table:style-name="Tableau5.A2" office:value-type="string">
            <text:p text:style-name="P25">Prix (en €)</text:p>
          </table:table-cell>
          <table:table-cell table:style-name="Tableau5.A2" office:value-type="string">
            <text:p text:style-name="P30"/>
          </table:table-cell>
          <table:table-cell table:style-name="Tableau5.A2" office:value-type="string">
            <text:p text:style-name="P24">7,68</text:p>
          </table:table-cell>
          <table:table-cell table:style-name="Tableau5.A2" office:value-type="string">
            <text:p text:style-name="P24">9,60</text:p>
          </table:table-cell>
          <table:table-cell table:style-name="Tableau5.A2" office:value-type="string">
            <text:p text:style-name="P24">15,36</text:p>
          </table:table-cell>
          <table:table-cell table:style-name="Tableau5.F2" office:value-type="string">
            <text:p text:style-name="P28"/>
          </table:table-cell>
        </table:table-row>
      </table:table>
      <text:p text:style-name="P15"/>
      <text:p text:style-name="P8">Remarque :<text:span text:style-name="T2"> Pour le calcul de la dernière colonne, on peut également utiliser les règles de linéarité dans un tableau de proportionnalité, en </text:span><text:soft-page-break/><text:span text:style-name="T2">remarquant par exemple que : </text:span><text:span text:style-name="T2"><draw:frame draw:style-name="fr2" draw:name="Objet1" text:anchor-type="as-char" svg:y="-0.527cm" svg:width="1.991cm" svg:height="0.739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2">ou </text:span><text:span text:style-name="T2"><draw:frame draw:style-name="fr2" draw:name="Objet2" text:anchor-type="as-char" svg:y="-0.527cm" svg:width="2.207cm" svg:height="0.739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2">.</text:span></text:p>
      <text:list xml:id="list151823799799122" text:continue-numbering="true" text:style-name="L1">
        <text:list-item>
          <text:p text:style-name="P9">Pourcentage</text:p>
        </text:list-item>
      </text:list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0">Définition :<text:span text:style-name="T2"> Un pourcentage traduit une situation de proportionnalité où la quantité totale est ramenée à 100.</text:span></text:p>
          </table:table-cell>
        </table:table-row>
      </table:table>
      <text:p text:style-name="P14"/>
      <text:p text:style-name="P8">Exemple :<text:span text:style-name="T2"> Sur une tablette de chocolat noir, on lit : « 54 % de cacao ». Calcule la masse de cacao contenue dans une tablette de 250g.</text:span></text:p>
      <text:p text:style-name="P8"><draw:frame draw:style-name="fr1" draw:name="Image3" text:anchor-type="paragraph" svg:x="-1.794cm" svg:y="1.168cm" svg:width="20.001cm" svg:height="3.209cm" draw:z-index="4"><draw:image xlink:href="Pictures/100000000000035A000000A275836B53383E03B1.png" xlink:type="simple" xlink:show="embed" xlink:actuate="onLoad" loext:mime-type="image/png"/></draw:frame>Première méthode :<text:span text:style-name="T2"> à l’aide d’un tableau de proportionnalité</text:span></text:p>
      <text:p text:style-name="P8">Deuxième méthode :<text:span text:style-name="T2"> à l’aide d’un calcul direct</text:span></text:p>
      <text:p text:style-name="P8"><draw:frame draw:style-name="fr1" draw:name="Image4" text:anchor-type="paragraph" svg:x="-1.794cm" svg:y="0.52cm" svg:width="20.001cm" svg:height="3.209cm" draw:z-index="5"><draw:image xlink:href="Pictures/100000000000035A000000A275836B53383E03B1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7T14:34:34.537000000</meta:creation-date>
    <dc:date>2021-03-07T15:18:22.542000000</dc:date>
    <meta:editing-duration>PT27S</meta:editing-duration>
    <meta:editing-cycles>1</meta:editing-cycles>
    <meta:document-statistic meta:table-count="6" meta:image-count="4" meta:object-count="2" meta:page-count="3" meta:paragraph-count="55" meta:word-count="366" meta:character-count="2229" meta:non-whitespace-character-count="1828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row>
      <mn>24</mn>
      <mo stretchy="false">=</mo>
      <mrow>
        <mn>3</mn>
        <mo stretchy="false">×</mo>
        <mn>8</mn>
      </mrow>
    </mrow>
    <annotation encoding="StarMath 5.0">24= 3 times 8</annotation>
  </semantics>
</math>
</file>

<file path=Object 2/content.xml><?xml version="1.0" encoding="utf-8"?>
<math xmlns="http://www.w3.org/1998/Math/MathML" display="block">
  <semantics>
    <mrow>
      <mn>24</mn>
      <mo stretchy="false">=</mo>
      <mrow>
        <mn>12</mn>
        <mo stretchy="false">×</mo>
        <mn>2</mn>
      </mrow>
    </mrow>
    <annotation encoding="StarMath 5.0">24 = 12 times 2</annotation>
  </semantics>
</math>
</file>