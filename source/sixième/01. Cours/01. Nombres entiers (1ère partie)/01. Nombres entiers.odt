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00000004F9A64E090319ED7E6.png" manifest:media-type="image/png"/>
  <manifest:file-entry manifest:full-path="Pictures/10000000000003DF0000007B20D31694F55A8BCC.png" manifest:media-type="image/png"/>
  <manifest:file-entry manifest:full-path="Pictures/10000000000003E20000013E27F887CE322936D4.png" manifest:media-type="image/png"/>
  <manifest:file-entry manifest:full-path="Pictures/10000000000003E0000000A247A359A93C332546.png" manifest:media-type="image/png"/>
  <manifest:file-entry manifest:full-path="Pictures/10000000000003E0000000653A117ED78B017B1F.png" manifest:media-type="image/png"/>
  <manifest:file-entry manifest:full-path="Pictures/100000000000021400000039E116569CB565F9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 style:list-style-name="L1">
      <style:text-properties style:font-name="OpenDyslexic" officeooo:paragraph-rsid="00183a5c"/>
    </style:style>
    <style:style style:name="P3" style:family="paragraph" style:parent-style-name="Standard" style:list-style-name="L1">
      <style:text-properties style:font-name="OpenDyslexic" style:text-underline-style="solid" style:text-underline-width="auto" style:text-underline-color="font-color" officeooo:rsid="00183a5c" officeooo:paragraph-rsid="00183a5c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83a5c" officeooo:paragraph-rsid="00183a5c"/>
    </style:style>
    <style:style style:name="P5" style:family="paragraph" style:parent-style-name="Standard" style:list-style-name="L1">
      <style:text-properties style:font-name="OpenDyslexic" style:text-underline-style="solid" style:text-underline-width="auto" style:text-underline-color="font-color" officeooo:rsid="0019f999" officeooo:paragraph-rsid="0019f999"/>
    </style:style>
    <style:style style:name="P6" style:family="paragraph" style:parent-style-name="Standard" style:list-style-name="L1">
      <style:text-properties style:font-name="OpenDyslexic" style:text-underline-style="solid" style:text-underline-width="auto" style:text-underline-color="font-color" officeooo:rsid="001a415f" officeooo:paragraph-rsid="001a415f"/>
    </style:style>
    <style:style style:name="P7" style:family="paragraph" style:parent-style-name="Standard" style:list-style-name="L1">
      <style:text-properties style:font-name="OpenDyslexic" style:text-underline-style="solid" style:text-underline-width="auto" style:text-underline-color="font-color" officeooo:rsid="001d6818" officeooo:paragraph-rsid="001d6818"/>
    </style:style>
    <style:style style:name="P8" style:family="paragraph" style:parent-style-name="Standard" style:list-style-name="L1">
      <style:text-properties style:font-name="OpenDyslexic" style:text-underline-style="solid" style:text-underline-width="auto" style:text-underline-color="font-color" officeooo:rsid="001e128c" officeooo:paragraph-rsid="001e128c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209baf" officeooo:paragraph-rsid="00209baf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20eef8" officeooo:paragraph-rsid="0020eef8"/>
    </style:style>
    <style:style style:name="P11" style:family="paragraph" style:parent-style-name="Standard">
      <style:text-properties style:font-name="OpenDyslexic" style:text-underline-style="solid" style:text-underline-width="auto" style:text-underline-color="font-color" officeooo:rsid="0021bfb1" officeooo:paragraph-rsid="0021bfb1"/>
    </style:style>
    <style:style style:name="P12" style:family="paragraph" style:parent-style-name="Standard" style:list-style-name="L1">
      <style:text-properties style:font-name="OpenDyslexic" style:text-underline-style="solid" style:text-underline-width="auto" style:text-underline-color="font-color" officeooo:rsid="0022a3b4" officeooo:paragraph-rsid="0022a3b4"/>
    </style:style>
    <style:style style:name="P13" style:family="paragraph" style:parent-style-name="Standard">
      <style:text-properties style:font-name="OpenDyslexic" style:text-underline-style="solid" style:text-underline-width="auto" style:text-underline-color="font-color" officeooo:rsid="0022a3b4" officeooo:paragraph-rsid="0022a3b4"/>
    </style:style>
    <style:style style:name="P14" style:family="paragraph" style:parent-style-name="Table_20_Contents">
      <style:text-properties style:font-name="OpenDyslexic" officeooo:rsid="000692c1" officeooo:paragraph-rsid="00183a5c"/>
    </style:style>
    <style:style style:name="P15" style:family="paragraph" style:parent-style-name="Table_20_Contents">
      <style:text-properties style:font-name="OpenDyslexic" officeooo:rsid="00183a5c" officeooo:paragraph-rsid="00183a5c"/>
    </style:style>
    <style:style style:name="P16" style:family="paragraph" style:parent-style-name="Table_20_Contents">
      <style:text-properties style:font-name="OpenDyslexic" officeooo:rsid="0019f999" officeooo:paragraph-rsid="0019f999"/>
    </style:style>
    <style:style style:name="P17" style:family="paragraph" style:parent-style-name="Table_20_Contents">
      <style:text-properties style:font-name="OpenDyslexic" officeooo:rsid="001bc9cf" officeooo:paragraph-rsid="001bc9cf"/>
    </style:style>
    <style:style style:name="P18" style:family="paragraph" style:parent-style-name="Table_20_Contents">
      <style:text-properties style:font-name="OpenDyslexic" officeooo:rsid="001d6818" officeooo:paragraph-rsid="001d6818"/>
    </style:style>
    <style:style style:name="P19" style:family="paragraph" style:parent-style-name="Table_20_Contents">
      <style:text-properties style:font-name="OpenDyslexic" officeooo:rsid="001f2f41" officeooo:paragraph-rsid="001f2f41"/>
    </style:style>
    <style:style style:name="P20" style:family="paragraph" style:parent-style-name="Table_20_Contents">
      <style:text-properties style:font-name="OpenDyslexic" officeooo:rsid="00209baf" officeooo:paragraph-rsid="00209baf"/>
    </style:style>
    <style:style style:name="P21" style:family="paragraph" style:parent-style-name="Table_20_Contents">
      <style:text-properties style:font-name="OpenDyslexic" officeooo:rsid="0020eef8" officeooo:paragraph-rsid="0020eef8"/>
    </style:style>
    <style:style style:name="P22" style:family="paragraph" style:parent-style-name="Table_20_Contents">
      <style:text-properties style:font-name="OpenDyslexic" officeooo:rsid="0021bfb1" officeooo:paragraph-rsid="0021bfb1"/>
    </style:style>
    <style:style style:name="P23" style:family="paragraph" style:parent-style-name="Table_20_Contents">
      <style:text-properties style:font-name="OpenDyslexic" officeooo:rsid="0022a3b4" officeooo:paragraph-rsid="0022a3b4"/>
    </style:style>
    <style:style style:name="T1" style:family="text">
      <style:text-properties officeooo:rsid="00183a5c"/>
    </style:style>
    <style:style style:name="T2" style:family="text">
      <style:text-properties style:text-underline-style="solid" style:text-underline-width="auto" style:text-underline-color="font-color" officeooo:rsid="00183a5c"/>
    </style:style>
    <style:style style:name="T3" style:family="text">
      <style:text-properties style:text-underline-style="solid" style:text-underline-width="auto" style:text-underline-color="font-color" officeooo:rsid="00198e9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83a5c"/>
    </style:style>
    <style:style style:name="T6" style:family="text">
      <style:text-properties style:text-underline-style="none" officeooo:rsid="001a415f"/>
    </style:style>
    <style:style style:name="T7" style:family="text">
      <style:text-properties style:text-underline-style="none" officeooo:rsid="001f2f41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officeooo:rsid="0022a3b4"/>
    </style:style>
    <style:style style:name="T11" style:family="text">
      <style:text-properties officeooo:rsid="00198e9e"/>
    </style:style>
    <style:style style:name="T12" style:family="text">
      <style:text-properties officeooo:rsid="001bc9cf"/>
    </style:style>
    <style:style style:name="T13" style:family="text">
      <style:text-properties officeooo:rsid="001e128c"/>
    </style:style>
    <style:style style:name="T14" style:family="text">
      <style:text-properties officeooo:rsid="001f2f4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0eef8"/>
    </style:style>
    <style:style style:name="T18" style:family="text">
      <style:text-properties officeooo:rsid="0022a3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Collège <text:span text:style-name="T1">Amiral Lejeune</text:span> <text:s text:c="61"/><text:span text:style-name="T1">6</text:span>ème<text:line-break/><text:span text:style-name="T1">Cours</text:span> <text:s text:c="18"/>Chapitre 1 : <text:span text:style-name="T1">Nombres Entiers</text:span></text:p>
          </table:table-cell>
        </table:table-row>
      </table:table>
      <text:p text:style-name="P1"/>
      <text:list xml:id="list3394988196" text:style-name="L1">
        <text:list-item>
          <text:p text:style-name="P2"><text:span text:style-name="T2">Décomposition, nom des chiffres<text:line-break/>Règle :</text:span>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0, 1, 2, 3, 4, 5, 6, 7, 8 et 9 sont des chiffres qui permettent d’écrire tous les nombres entiers, de même <text:span text:style-name="T11">que les lettres de A à Z permettent d’écrire tous les mots.</text:span></text:p>
          </table:table-cell>
        </table:table-row>
      </table:table>
      <text:list xml:id="list145411575632606" text:continue-numbering="true" text:style-name="L1">
        <text:list-header>
          <text:p text:style-name="P2"><draw:frame draw:style-name="fr1" draw:name="Image1" text:anchor-type="paragraph" svg:x="-1.991cm" svg:y="1.005cm" svg:width="20.992cm" svg:height="2.03cm" draw:z-index="0"><draw:image xlink:href="Pictures/10000000000003DF0000007B20D31694F55A8BCC.png" xlink:type="simple" xlink:show="embed" xlink:actuate="onLoad" loext:mime-type="image/png"/></draw:frame><text:span text:style-name="T3">Exemple :<text:line-break/></text:span><text:span text:style-name="T5"><text:line-break/></text:span><text:span text:style-name="T3">Règle :</text:span></text:p>
        </text:list-header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6">Pour pouvoir lire les grands nombres entiers facilement, on regroupe les chiffres par ………………………………..</text:p>
          </table:table-cell>
        </table:table-row>
      </table:table>
      <text:list xml:id="list145411279592313" text:continue-numbering="true" text:style-name="L1">
        <text:list-header>
          <text:p text:style-name="P5">Exemple :<text:span text:style-name="T4"> 1048774912 s’écrit …………………….<text:line-break/>a. Écris ce nombre en toutes lettres.<text:line-break/>b. Décomposé ce nombre<text:line-break/>c. Donne le nom des chiffres 8 et </text:span><text:span text:style-name="T6">9.</text:span></text:p>
          <text:p text:style-name="P6"><draw:frame draw:style-name="fr1" draw:name="Image2" text:anchor-type="paragraph" svg:x="-2cm" svg:y="1.094cm" svg:width="21.001cm" svg:height="6.193cm" draw:z-index="1"><draw:image xlink:href="Pictures/10000000000003E20000013E27F887CE322936D4.png" xlink:type="simple" xlink:show="embed" xlink:actuate="onLoad" loext:mime-type="image/png"/></draw:frame><text:span text:style-name="T6">d. </text:span><text:span text:style-name="T4">Quel est le nombre des millions de ce nombre ?<text:line-break/></text:span></text:p>
        </text:list-header>
        <text:list-item>
          <text:p text:style-name="P3">Repérage sur une demi-droite graduée<text:line-break/><text:span text:style-name="T12">Définition :</text:span></text:p>
        </text:list-item>
      </text:list>
      <table:table table:name="Tableau4" table:style-name="Tableau4">
        <table:table-column table:style-name="Tableau4.A"/>
        <text:soft-page-break/>
        <table:table-row>
          <table:table-cell table:style-name="Tableau4.A1" office:value-type="string">
            <text:p text:style-name="P17">Une demi-droite graduée est une demi-droite sur laquelle on a reporté une unité de longueur régulièrement (souvent le centimètre) à partir de son origine.</text:p>
          </table:table-cell>
        </table:table-row>
      </table:table>
      <text:list xml:id="list145410768666322" text:continue-numbering="true" text:style-name="L1">
        <text:list-header>
          <text:p text:style-name="P7">Propriété :</text:p>
        </text:list-header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8">Sur une demi-droite graduée, un point est repéré par un nombre appelé son ………..<text:line-break/><text:span text:style-name="T13">L’origine est repéré par le nombre …….</text:span></text:p>
          </table:table-cell>
        </table:table-row>
      </table:table>
      <text:list xml:id="list145410017030298" text:continue-numbering="true" text:style-name="L1">
        <text:list-header>
          <text:p text:style-name="P8">Exemple :</text:p>
          <text:p text:style-name="P8"><draw:frame draw:style-name="fr2" draw:name="Image3" text:anchor-type="paragraph" svg:width="18.156cm" svg:height="1.988cm" draw:z-index="2"><draw:image xlink:href="Pictures/100000000000021400000039E116569CB565F9CD.png" xlink:type="simple" xlink:show="embed" xlink:actuate="onLoad" loext:mime-type="image/png"/></draw:frame><draw:frame draw:style-name="fr1" draw:name="Image4" text:anchor-type="paragraph" svg:x="-2cm" svg:y="2.223cm" svg:width="20.999cm" svg:height="1.856cm" draw:z-index="3"><draw:image xlink:href="Pictures/10000000000003E0000000653A117ED78B017B1F.png" xlink:type="simple" xlink:show="embed" xlink:actuate="onLoad" loext:mime-type="image/png"/></draw:frame><text:span text:style-name="T4"/></text:p>
        </text:list-header>
        <text:list-item>
          <text:p text:style-name="P3">Comparaison et rangement<text:line-break/><text:span text:style-name="T14">Définition :</text:span>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9">Comparer deux nombres, c’est ……………………………………………………………..<text:line-break/>………………………………………………………………………………………………………..</text:p>
          </table:table-cell>
        </table:table-row>
      </table:table>
      <text:p text:style-name="P4"><text:span text:style-name="T7"/></text:p>
      <text:p text:style-name="P9">Définitions :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0">Ranger des nombres dans l’<text:span text:style-name="T15">ordre croissant</text:span><text:span text:style-name="T16"> signifie ………………………………..</text:span></text:p>
            <text:p text:style-name="P20"><text:span text:style-name="T16">…………………………………………………………………………………………………………..</text:span></text:p>
            <text:p text:style-name="P20"><text:span text:style-name="T16">Ranger des nombres dans l’</text:span><text:span text:style-name="T15">ordre décroissant</text:span><text:span text:style-name="T16"> signifie …………………………….</text:span></text:p>
            <text:p text:style-name="P20"><text:span text:style-name="T16">…………………………………………………………………………………………………………...</text:span></text:p>
          </table:table-cell>
        </table:table-row>
      </table:table>
      <text:p text:style-name="P9"><text:span text:style-name="T4"/></text:p>
      <text:p text:style-name="P9">Exemple :<text:span text:style-name="T4"> Range les nombres 25 342 ; 253 420 ; 25 243 ; 235 420 ; 25 324 dans l’</text:span><text:span text:style-name="T8">ordre croissant</text:span><text:span text:style-name="T9">.</text:span></text:p>
      <text:p text:style-name="P9"><draw:frame draw:style-name="fr2" draw:name="Image5" text:anchor-type="paragraph" svg:width="20.876cm" svg:height="1.692cm" draw:z-index="4"><draw:image xlink:href="Pictures/10000000000003E00000004F9A64E090319ED7E6.png" xlink:type="simple" xlink:show="embed" xlink:actuate="onLoad" loext:mime-type="image/png"/></draw:frame><text:span text:style-name="T9"/></text:p>
      <text:list xml:id="list145410130183175" text:continue-numbering="true" text:style-name="L1">
        <text:list-item>
          <text:p text:style-name="P3">Addition<text:line-break/><text:span text:style-name="T17">Définitions :</text:span></text:p>
        </text:list-item>
      </text:list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21">Les nombres que l’on additionne s’appellent les …………………….</text:p>
            <text:p text:style-name="P21">Les résultats d’une addition s’appelle la …………………...</text:p>
          </table:table-cell>
        </table:table-row>
      </table:table>
      <text:p text:style-name="P10">Exemple :<text:span text:style-name="T4"> Pose et calcule 1 856 + 525.</text:span></text:p>
      <text:p text:style-name="P11"><draw:frame draw:style-name="fr2" draw:name="Image6" text:anchor-type="paragraph" svg:width="20.876cm" svg:height="3.149cm" draw:z-index="5"><draw:image xlink:href="Pictures/10000000000003E0000000A247A359A93C332546.png" xlink:type="simple" xlink:show="embed" xlink:actuate="onLoad" loext:mime-type="image/png"/></draw:frame>Propriétés :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2">Dans une addition, on a le droit de :</text:p>
            <text:p text:style-name="P22">- regrouper les termes ;</text:p>
            <text:p text:style-name="P22">- changer des termes de place.</text:p>
          </table:table-cell>
        </table:table-row>
      </table:table>
      <text:p text:style-name="P11">Exemple :<text:span text:style-name="T4"> Calcule astucieusement 46 + 37 + 54 + 63.</text:span></text:p>
      <text:p text:style-name="P11"><draw:frame draw:style-name="fr2" draw:name="Image7" text:anchor-type="paragraph" svg:width="20.876cm" svg:height="1.692cm" draw:z-index="6"><draw:image xlink:href="Pictures/10000000000003E00000004F9A64E090319ED7E6.png" xlink:type="simple" xlink:show="embed" xlink:actuate="onLoad" loext:mime-type="image/png"/></draw:frame><text:span text:style-name="T4"/></text:p>
      <text:list xml:id="list145410228441296" text:continue-numbering="true" text:style-name="L1">
        <text:list-item>
          <text:p text:style-name="P3">Soustraction<text:line-break/><text:span text:style-name="T18">Définitions :</text:span></text:p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3">Les nombres que l’on soustrait s’appellent les ……………………..</text:p>
            <text:p text:style-name="P23">Le résultat d’une soustraction s’appelle la …………………………...</text:p>
          </table:table-cell>
        </table:table-row>
      </table:table>
      <text:list xml:id="list145410555506337" text:continue-numbering="true" text:style-name="L1">
        <text:list-header>
          <text:p text:style-name="P12">Exemple :<text:span text:style-name="T4"> Pose et calcule 233-67.</text:span></text:p>
        </text:list-header>
      </text:list>
      <text:p text:style-name="P13"><draw:frame draw:style-name="fr2" draw:name="Image8" text:anchor-type="paragraph" svg:width="20.876cm" svg:height="3.149cm" draw:z-index="7"><draw:image xlink:href="Pictures/10000000000003E0000000A247A359A93C332546.png" xlink:type="simple" xlink:show="embed" xlink:actuate="onLoad" loext:mime-type="image/png"/></draw:frame>Remarque :<text:span text:style-name="T4"> On ne peut pas changer les termes de place dans une soustra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08:49:36.965000000</meta:creation-date>
    <dc:date>2020-09-05T14:54:09.588000000</dc:date>
    <meta:editing-duration>PT8M23S</meta:editing-duration>
    <meta:editing-cycles>1</meta:editing-cycles>
    <meta:document-statistic meta:table-count="10" meta:image-count="8" meta:object-count="0" meta:page-count="3" meta:paragraph-count="34" meta:word-count="317" meta:character-count="2034" meta:non-whitespace-character-count="1675"/>
    <meta:generator>LibreOffice/6.2.3.2$Windows_X86_64 LibreOffice_project/aecc05fe267cc68dde00352a451aa867b3b546ac</meta:generator>
  </office:meta>
</office:document-meta>
</file>