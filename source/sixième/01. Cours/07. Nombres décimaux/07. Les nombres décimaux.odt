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EC000001608341A6D058C0F6AF.png" manifest:media-type="image/png"/>
  <manifest:file-entry manifest:full-path="Pictures/10000000000000DE00000155228F2FED60A34E92.png" manifest:media-type="image/png"/>
  <manifest:file-entry manifest:full-path="Pictures/10000000000000D6000001504776F5BA4920E417.png" manifest:media-type="image/png"/>
  <manifest:file-entry manifest:full-path="Pictures/100000000000047E000000802E4699B53C126A80.png" manifest:media-type="image/png"/>
  <manifest:file-entry manifest:full-path="Pictures/100000000000021B000002135818DD3AD5FCF261.png" manifest:media-type="image/png"/>
  <manifest:file-entry manifest:full-path="Pictures/10000000000003490000013CC369D038D4268D45.png" manifest:media-type="image/png"/>
  <manifest:file-entry manifest:full-path="Pictures/100000000000035200000096F258E5E8383D300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 style:list-style-name="L1">
      <style:text-properties style:font-name="OpenDyslexic" style:text-underline-style="solid" style:text-underline-width="auto" style:text-underline-color="font-color" officeooo:rsid="00047e73" officeooo:paragraph-rsid="00047e73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047e73" officeooo:paragraph-rsid="00047e73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0668e7" officeooo:paragraph-rsid="000668e7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067a99" officeooo:paragraph-rsid="00067a99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080179" officeooo:paragraph-rsid="00080179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0945e4" officeooo:paragraph-rsid="000945e4"/>
    </style:style>
    <style:style style:name="P8" style:family="paragraph" style:parent-style-name="Standard">
      <style:text-properties style:font-name="OpenDyslexic" style:text-underline-style="none" officeooo:rsid="00047e73" officeooo:paragraph-rsid="00047e73"/>
    </style:style>
    <style:style style:name="P9" style:family="paragraph" style:parent-style-name="Standard">
      <style:text-properties style:font-name="OpenDyslexic" style:text-underline-style="none" officeooo:rsid="0005fd0c" officeooo:paragraph-rsid="0005fd0c"/>
    </style:style>
    <style:style style:name="P10" style:family="paragraph" style:parent-style-name="Table_20_Contents">
      <style:text-properties style:font-name="OpenDyslexic" officeooo:rsid="00047e73" officeooo:paragraph-rsid="00047e73"/>
    </style:style>
    <style:style style:name="P11" style:family="paragraph" style:parent-style-name="Table_20_Contents">
      <style:text-properties style:font-name="OpenDyslexic" style:text-underline-style="solid" style:text-underline-width="auto" style:text-underline-color="font-color" officeooo:rsid="00047e73" officeooo:paragraph-rsid="00047e73"/>
    </style:style>
    <style:style style:name="P12" style:family="paragraph" style:parent-style-name="Table_20_Contents">
      <style:text-properties style:font-name="OpenDyslexic" style:text-underline-style="solid" style:text-underline-width="auto" style:text-underline-color="font-color" officeooo:rsid="0005fd0c" officeooo:paragraph-rsid="0005fd0c"/>
    </style:style>
    <style:style style:name="P13" style:family="paragraph" style:parent-style-name="Table_20_Contents">
      <style:text-properties style:font-name="OpenDyslexic" style:text-underline-style="solid" style:text-underline-width="auto" style:text-underline-color="font-color" officeooo:rsid="000668e7" officeooo:paragraph-rsid="000668e7"/>
    </style:style>
    <style:style style:name="P14" style:family="paragraph" style:parent-style-name="Table_20_Contents">
      <style:text-properties style:font-name="OpenDyslexic" style:text-underline-style="solid" style:text-underline-width="auto" style:text-underline-color="font-color" officeooo:rsid="00067a99" officeooo:paragraph-rsid="00067a99"/>
    </style:style>
    <style:style style:name="P15" style:family="paragraph" style:parent-style-name="Table_20_Contents">
      <style:text-properties style:font-name="OpenDyslexic" style:text-underline-style="solid" style:text-underline-width="auto" style:text-underline-color="font-color" officeooo:rsid="000945e4" officeooo:paragraph-rsid="000945e4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5fd0c"/>
    </style:style>
    <style:style style:name="T3" style:family="text">
      <style:text-properties style:text-underline-style="none" officeooo:rsid="000668e7"/>
    </style:style>
    <style:style style:name="T4" style:family="text">
      <style:text-properties style:text-underline-style="none" officeooo:rsid="00067a99"/>
    </style:style>
    <style:style style:name="T5" style:family="text">
      <style:text-properties style:text-underline-style="none" officeooo:rsid="000801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">Collège A.LEJEUNE <text:s text:c="66"/>6ème</text:p>
            <text:p text:style-name="P10">Cours <text:s text:c="21"/>Chapitre 7 : Les nombres décimaux</text:p>
          </table:table-cell>
        </table:table-row>
      </table:table>
      <text:p text:style-name="P1"/>
      <text:list xml:id="list1090551847" text:style-name="L1">
        <text:list-item>
          <text:p text:style-name="P2">Sous-multiples de l’unité</text:p>
          <text:list>
            <text:list-item>
              <text:p text:style-name="P2"><text:s/>Les dixièmes</text:p>
            </text:list-item>
          </text:list>
        </text:list-item>
      </text:list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1">Définition :<text:span text:style-name="T1"> Quand on coupe une unité en 10 parties égales, on obtient des dixièmes. Un dixième se note </text:span><text:span text:style-name="T1"><draw:frame draw:style-name="fr3" draw:name="Objet1" text:anchor-type="as-char" svg:y="-0.891cm" svg:width="0.803cm" svg:height="1.5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 Dans l’unité, il y a 10 dixièmes donc : </text:span><text:span text:style-name="T1"><draw:frame draw:style-name="fr3" draw:name="Objet2" text:anchor-type="as-char" svg:y="-0.891cm" svg:width="1.401cm" svg:height="1.5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. </text:span></text:p>
          </table:table-cell>
        </table:table-row>
      </table:table>
      <text:p text:style-name="P3"><draw:frame draw:style-name="fr1" draw:name="Image1" text:anchor-type="paragraph" svg:x="-0.258cm" svg:y="1.737cm" svg:width="5.015cm" svg:height="7.479cm" draw:z-index="2"><draw:image xlink:href="Pictures/10000000000000EC000001608341A6D058C0F6AF.png" xlink:type="simple" xlink:show="embed" xlink:actuate="onLoad" loext:mime-type="image/png"/></draw:frame>Exemples :<text:span text:style-name="T1"> </text:span><text:span text:style-name="T2">Représenter ci-dessous la fraction suivante </text:span><text:span text:style-name="T2"><draw:frame draw:style-name="fr3" draw:name="Objet3" text:anchor-type="as-char" svg:y="-0.891cm" svg:width="0.803cm" svg:height="1.54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2"> :</text:span></text:p>
      <text:p text:style-name="P3"><text:span text:style-name="T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Le dessin ci-dessous représente quel nombre ?</text:p>
      <text:p text:style-name="P8"><draw:frame draw:style-name="fr1" draw:name="Image2" text:anchor-type="paragraph" svg:x="0.071cm" svg:y="0.238cm" svg:width="4.637cm" svg:height="7.123cm" draw:z-index="4"><draw:image xlink:href="Pictures/10000000000000DE00000155228F2FED60A34E92.png" xlink:type="simple" xlink:show="embed" xlink:actuate="onLoad" loext:mime-type="image/png"/></draw:frame><draw:frame draw:style-name="fr1" draw:name="Image3" text:anchor-type="paragraph" svg:x="4.992cm" svg:y="0.238cm" svg:width="4.637cm" svg:height="7.123cm" draw:z-index="5"><draw:image xlink:href="Pictures/10000000000000DE00000155228F2FED60A34E92.png" xlink:type="simple" xlink:show="embed" xlink:actuate="onLoad" loext:mime-type="image/png"/></draw:frame><draw:frame draw:style-name="fr1" draw:name="Image4" text:anchor-type="paragraph" svg:x="10.16cm" svg:y="0.273cm" svg:width="4.493cm" svg:height="7.054cm" draw:z-index="6"><draw:image xlink:href="Pictures/10000000000000D6000001504776F5BA4920E417.png" xlink:type="simple" xlink:show="embed" xlink:actuate="onLoad" loext:mime-type="image/png"/></draw:frame></text:p>
      <text:p text:style-name="P8"/>
      <text:p text:style-name="P8"/>
      <text:list xml:id="list170018116276651" text:continue-numbering="true" text:style-name="L1">
        <text:list-item>
          <text:list>
            <text:list-item>
              <text:p text:style-name="P2"><text:soft-page-break/><text:s/>Les centièmes</text:p>
            </text:list-item>
          </text:list>
        </text:list-item>
      </text:list>
      <text:p text:style-name="P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2">Définition :<text:span text:style-name="T1"> </text:span></text:p>
            <text:p text:style-name="P12"><text:span text:style-name="T1">Quand on coupe une unité en 100 parties égales, on obtient des centièmes. Un centième se note : </text:span><text:span text:style-name="T1"><draw:frame draw:style-name="fr3" draw:name="Objet4" text:anchor-type="as-char" svg:y="-0.891cm" svg:width="1.078cm" svg:height="1.54cm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1">. </text:span><text:span text:style-name="T3">Dans l’unité, il y a 100 centièmes donc : </text:span><text:span text:style-name="T3"><draw:frame draw:style-name="fr3" draw:name="Objet5" text:anchor-type="as-char" svg:y="-0.891cm" svg:width="1.676cm" svg:height="1.54cm" draw:z-index="8"><draw:object xlink:href="./Object 5" xlink:type="simple" xlink:show="embed" xlink:actuate="onLoad"/><draw:image xlink:href="./ObjectReplacements/Object 5" xlink:type="simple" xlink:show="embed" xlink:actuate="onLoad"/></draw:frame></text:span></text:p>
          </table:table-cell>
        </table:table-row>
      </table:table>
      <text:p text:style-name="P4"><draw:frame draw:style-name="fr1" draw:name="Image5" text:anchor-type="paragraph" svg:x="-0.072cm" svg:y="1.787cm" svg:width="10.606cm" svg:height="10.449cm" draw:z-index="10"><draw:image xlink:href="Pictures/100000000000021B000002135818DD3AD5FCF261.png" xlink:type="simple" xlink:show="embed" xlink:actuate="onLoad" loext:mime-type="image/png"/></draw:frame>Exemples :<text:span text:style-name="T1"> </text:span><text:span text:style-name="T2">Représenter ci-dessous la fraction suivante </text:span><text:span text:style-name="T2"><draw:frame draw:style-name="fr3" draw:name="Objet6" text:anchor-type="as-char" svg:y="-0.891cm" svg:width="1.078cm" svg:height="1.54cm" draw:z-index="9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"> :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list xml:id="list170018296012479" text:continue-numbering="true" text:style-name="L1">
        <text:list-item>
          <text:list>
            <text:list-item>
              <text:p text:style-name="P2"><text:s/>Les millièmes</text:p>
            </text:list-item>
          </text:list>
        </text:list-item>
      </text:list>
      <text:p text:style-name="P3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3">Définition :<text:span text:style-name="T1"> Quand on coupe une unité en 1 000 parties égales, on obtient des millièmes. Un millième se note : </text:span><text:span text:style-name="T1"><draw:frame draw:style-name="fr3" draw:name="Objet7" text:anchor-type="as-char" svg:y="-0.891cm" svg:width="1.351cm" svg:height="1.54cm" draw:z-index="11"><draw:object xlink:href="./Object 7" xlink:type="simple" xlink:show="embed" xlink:actuate="onLoad"/><draw:image xlink:href="./ObjectReplacements/Object 7" xlink:type="simple" xlink:show="embed" xlink:actuate="onLoad"/></draw:frame></text:span><text:span text:style-name="T1">. Dans l’unité, il y a 1 000 </text:span><text:span text:style-name="T4">millièmes donc : </text:span><text:span text:style-name="T4"><draw:frame draw:style-name="fr3" draw:name="Objet8" text:anchor-type="as-char" svg:y="-0.891cm" svg:width="1.949cm" svg:height="1.54cm" draw:z-index="12"><draw:object xlink:href="./Object 8" xlink:type="simple" xlink:show="embed" xlink:actuate="onLoad"/><draw:image xlink:href="./ObjectReplacements/Object 8" xlink:type="simple" xlink:show="embed" xlink:actuate="onLoad"/></draw:frame></text:span><text:span text:style-name="T4">.</text:span></text:p>
          </table:table-cell>
        </table:table-row>
      </table:table>
      <text:p text:style-name="P3"/>
      <text:p text:style-name="P5"><text:soft-page-break/>Exemple :<text:span text:style-name="T1"> Déterminer l’écriture décimale du nombre suivant : </text:span><text:span text:style-name="T1"><draw:frame draw:style-name="fr3" draw:name="Objet9" text:anchor-type="as-char" svg:y="-0.891cm" svg:width="1.586cm" svg:height="1.54cm" draw:z-index="13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5"><draw:frame draw:style-name="fr1" draw:name="Image6" text:anchor-type="paragraph" svg:x="-2cm" svg:y="0.556cm" svg:width="20.999cm" svg:height="2.999cm" draw:z-index="14"><draw:image xlink:href="Pictures/100000000000035200000096F258E5E8383D3002.png" xlink:type="simple" xlink:show="embed" xlink:actuate="onLoad" loext:mime-type="image/png"/></draw:frame><text:span text:style-name="T1"/></text:p>
      <text:p text:style-name="P5"><text:span text:style-name="T1"/></text:p>
      <text:list xml:id="list170017901437685" text:continue-numbering="true" text:style-name="L1">
        <text:list-item>
          <text:p text:style-name="P2">Décomposition et nom des chiffres</text:p>
        </text:list-item>
      </text:list>
      <text:p text:style-name="P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4">Définitions :<text:span text:style-name="T1"> Un nombre pouvant s’écrire sous la forme d’une fraction décimale (dont le numérateur est un nombre entier et le dénominateur est 1, 10, 100, 1000…) est un nombre décimal.</text:span></text:p>
            <text:p text:style-name="P14"><text:span text:style-name="T1">Il peut aussi se noter en utilisant une virgule, c’est son écriture décimale qui est composée d’une partie entière et d’une partie décimale.</text:span></text:p>
          </table:table-cell>
        </table:table-row>
      </table:table>
      <text:p text:style-name="P3"/>
      <text:p text:style-name="P5">Exemple :<text:span text:style-name="T1"> On considère le nombre décimal 1 345,824.</text:span></text:p>
      <text:p text:style-name="P5"><text:span text:style-name="T1">a. </text:span><text:span text:style-name="T5">Écris ce nombre en toutes lettres.</text:span></text:p>
      <text:p text:style-name="P6"><text:span text:style-name="T1">b. Donne une décomposition de ce nombre.</text:span></text:p>
      <text:p text:style-name="P6"><text:span text:style-name="T1">c. Donne le nom de chaque chiffre.</text:span></text:p>
      <text:p text:style-name="P6"><draw:frame draw:style-name="fr2" draw:name="Image7" text:anchor-type="paragraph" svg:width="19.983cm" svg:height="6.387cm" draw:z-index="15"><draw:image xlink:href="Pictures/10000000000003490000013CC369D038D4268D45.png" xlink:type="simple" xlink:show="embed" xlink:actuate="onLoad" loext:mime-type="image/png"/></draw:frame><text:span text:style-name="T1"/></text:p>
      <text:list xml:id="list170018528929218" text:continue-numbering="true" text:style-name="L1">
        <text:list-item>
          <text:p text:style-name="P2">Repérage sur une demi-droite graduée</text:p>
        </text:list-item>
      </text:list>
      <text:p text:style-name="P6">Exemple :<text:span text:style-name="T1"> Quelles sont les abscisses des points A et B ?</text:span></text:p>
      <text:p text:style-name="P6"><draw:frame draw:style-name="fr2" draw:name="Image8" text:anchor-type="paragraph" svg:width="19.921cm" svg:height="3.427cm" draw:z-index="16"><draw:image xlink:href="Pictures/100000000000047E000000802E4699B53C126A80.png" xlink:type="simple" xlink:show="embed" xlink:actuate="onLoad" loext:mime-type="image/png"/></draw:frame><draw:frame draw:style-name="fr1" draw:name="Image9" text:anchor-type="paragraph" svg:x="-2cm" svg:y="3.254cm" svg:width="20.999cm" svg:height="2.999cm" draw:z-index="17"><draw:image xlink:href="Pictures/100000000000035200000096F258E5E8383D3002.png" xlink:type="simple" xlink:show="embed" xlink:actuate="onLoad" loext:mime-type="image/png"/></draw:frame><text:soft-page-break/><text:span text:style-name="T1"/></text:p>
      <text:list xml:id="list170018950562368" text:continue-numbering="true" text:style-name="L1">
        <text:list-item>
          <text:p text:style-name="P2">Comparaison et rangement</text:p>
        </text:list-item>
      </text:list>
      <text:p text:style-name="P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5">Règle :</text:p>
            <text:p text:style-name="P15"><text:span text:style-name="T1">Pour comparer deux nombres décimaux écrits sous forme décimale :</text:span></text:p>
            <text:p text:style-name="P15"><text:span text:style-name="T1">- On compare les parties entières ;</text:span></text:p>
            <text:p text:style-name="P15"><text:span text:style-name="T1">- Si les parties entières sont égales alors on compare les chiffres des dixièmes ;</text:span></text:p>
            <text:p text:style-name="P15"><text:span text:style-name="T1">- Si les chiffres des dixièmes sont égaux alors on compare les chiffres des centièmes ;</text:span></text:p>
            <text:p text:style-name="P15"><text:span text:style-name="T1">- et ainsi de suite jusqu’à ce que les deux nombres aient des chiffres différents.</text:span></text:p>
          </table:table-cell>
        </table:table-row>
      </table:table>
      <text:p text:style-name="P3"/>
      <text:p text:style-name="P7">Exemple :<text:span text:style-name="T1"> Compare les nombres 81,357 et 81,36.</text:span></text:p>
      <text:p text:style-name="P7"><draw:frame draw:style-name="fr2" draw:name="Image10" text:anchor-type="paragraph" svg:width="19.983cm" svg:height="6.387cm" draw:z-index="18"><draw:image xlink:href="Pictures/10000000000003490000013CC369D038D4268D45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2T15:30:51.106000000</meta:creation-date>
    <dc:date>2021-01-02T17:00:17.262000000</dc:date>
    <meta:editing-duration>PT3M11S</meta:editing-duration>
    <meta:editing-cycles>1</meta:editing-cycles>
    <meta:document-statistic meta:table-count="6" meta:image-count="10" meta:object-count="9" meta:page-count="4" meta:paragraph-count="31" meta:word-count="333" meta:character-count="1952" meta:non-whitespace-character-count="1561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1 over 10</annotation>
  </semantics>
</math>
</file>

<file path=Object 2/content.xml><?xml version="1.0" encoding="utf-8"?>
<math xmlns="http://www.w3.org/1998/Math/MathML" display="block">
  <semantics>
    <mrow>
      <mn>1</mn>
      <mo stretchy="false">=</mo>
      <mfrac>
        <mn>10</mn>
        <mn>10</mn>
      </mfrac>
    </mrow>
    <annotation encoding="StarMath 5.0">1 = 10 over 10</annotation>
  </semantics>
</math>
</file>

<file path=Object 3/content.xml><?xml version="1.0" encoding="utf-8"?>
<math xmlns="http://www.w3.org/1998/Math/MathML" display="block">
  <semantics>
    <mfrac>
      <mn>3</mn>
      <mn>10</mn>
    </mfrac>
    <annotation encoding="StarMath 5.0">3 over 10</annotation>
  </semantics>
</math>
</file>

<file path=Object 4/content.xml><?xml version="1.0" encoding="utf-8"?>
<math xmlns="http://www.w3.org/1998/Math/MathML" display="block">
  <semantics>
    <mfrac>
      <mn>1</mn>
      <mn>100</mn>
    </mfrac>
    <annotation encoding="StarMath 5.0">1 over 100</annotation>
  </semantics>
</math>
</file>

<file path=Object 5/content.xml><?xml version="1.0" encoding="utf-8"?>
<math xmlns="http://www.w3.org/1998/Math/MathML" display="block">
  <semantics>
    <mrow>
      <mn>1</mn>
      <mo stretchy="false">=</mo>
      <mfrac>
        <mn>100</mn>
        <mn>100</mn>
      </mfrac>
    </mrow>
    <annotation encoding="StarMath 5.0">1 = 100 over 100</annotation>
  </semantics>
</math>
</file>

<file path=Object 6/content.xml><?xml version="1.0" encoding="utf-8"?>
<math xmlns="http://www.w3.org/1998/Math/MathML" display="block">
  <semantics>
    <mfrac>
      <mn>27</mn>
      <mn>100</mn>
    </mfrac>
    <annotation encoding="StarMath 5.0">27 over 100</annotation>
  </semantics>
</math>
</file>

<file path=Object 7/content.xml><?xml version="1.0" encoding="utf-8"?>
<math xmlns="http://www.w3.org/1998/Math/MathML" display="block">
  <semantics>
    <mfrac>
      <mn>1</mn>
      <mn>1000</mn>
    </mfrac>
    <annotation encoding="StarMath 5.0">1 over 1000</annotation>
  </semantics>
</math>
</file>

<file path=Object 8/content.xml><?xml version="1.0" encoding="utf-8"?>
<math xmlns="http://www.w3.org/1998/Math/MathML" display="block">
  <semantics>
    <mrow>
      <mn>1</mn>
      <mo stretchy="false">=</mo>
      <mfrac>
        <mn>1000</mn>
        <mn>1000</mn>
      </mfrac>
    </mrow>
    <annotation encoding="StarMath 5.0">1 = 1000 over 1000</annotation>
  </semantics>
</math>
</file>

<file path=Object 9/content.xml><?xml version="1.0" encoding="utf-8"?>
<math xmlns="http://www.w3.org/1998/Math/MathML" display="block">
  <semantics>
    <mfrac>
      <mn>14531</mn>
      <mn>1000</mn>
    </mfrac>
    <annotation encoding="StarMath 5.0">14531 over 1000</annotation>
  </semantics>
</math>
</file>