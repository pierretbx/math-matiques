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96000001D097C093F405988CD4.png" manifest:media-type="image/png"/>
  <manifest:file-entry manifest:full-path="Pictures/1000020100000195000000C67CC5E3FCF29F0716.png" manifest:media-type="image/png"/>
  <manifest:file-entry manifest:full-path="Pictures/100002010000029C0000016DE8D60576222F2DE0.png" manifest:media-type="image/png"/>
  <manifest:file-entry manifest:full-path="Pictures/100002010000029D0000011B68EF4D1CB7276CB0.png" manifest:media-type="image/png"/>
  <manifest:file-entry manifest:full-path="Pictures/1000020100000114000001275C72F0D03DAE66A0.png" manifest:media-type="image/png"/>
  <manifest:file-entry manifest:full-path="Pictures/10000201000002A3000001858DABA1702E6FDF22.png" manifest:media-type="image/png"/>
  <manifest:file-entry manifest:full-path="Pictures/100002010000014E0000010373F1EE18CD249D25.png" manifest:media-type="image/png"/>
  <manifest:file-entry manifest:full-path="Pictures/10000201000001A3000000CF618171BBF0D7C8AC.png" manifest:media-type="image/png"/>
  <manifest:file-entry manifest:full-path="Pictures/1000020100000223000000F10D01F36BFB24F331.png" manifest:media-type="image/png"/>
  <manifest:file-entry manifest:full-path="Pictures/1000020100000115000000B55F23C0EAB2A161EF.png" manifest:media-type="image/png"/>
  <manifest:file-entry manifest:full-path="Pictures/10000201000002C9000001882E03A46704232A0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13d626" officeooo:paragraph-rsid="000b8182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2d6a4" officeooo:paragraph-rsid="000b8182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b8182" officeooo:paragraph-rsid="000b8182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cf01e" officeooo:paragraph-rsid="000cf01e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d316d" officeooo:paragraph-rsid="000d316d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0f290a" officeooo:paragraph-rsid="000f290a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01c9e" officeooo:paragraph-rsid="00101c9e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 officeooo:rsid="00109c73" officeooo:paragraph-rsid="00109c73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rsid="00128e41" officeooo:paragraph-rsid="00128e41"/>
    </style:style>
    <style:style style:name="P11" style:family="paragraph" style:parent-style-name="Standard">
      <style:text-properties style:font-name="OpenDyslexic" style:text-underline-style="solid" style:text-underline-width="auto" style:text-underline-color="font-color" officeooo:rsid="00146993" officeooo:paragraph-rsid="00146993"/>
    </style:style>
    <style:style style:name="P12" style:family="paragraph" style:parent-style-name="Standard">
      <style:text-properties style:font-name="OpenDyslexic" style:text-underline-style="none" officeooo:rsid="00111cc9" officeooo:paragraph-rsid="000b8182"/>
    </style:style>
    <style:style style:name="P13" style:family="paragraph" style:parent-style-name="Standard">
      <style:text-properties style:font-name="OpenDyslexic" style:text-underline-style="none" officeooo:rsid="0012d6a4" officeooo:paragraph-rsid="000b8182"/>
    </style:style>
    <style:style style:name="P14" style:family="paragraph" style:parent-style-name="Standard">
      <style:text-properties style:font-name="OpenDyslexic" style:text-underline-style="none" officeooo:rsid="000b8182" officeooo:paragraph-rsid="000b8182"/>
    </style:style>
    <style:style style:name="P15" style:family="paragraph" style:parent-style-name="Standard">
      <style:text-properties style:font-name="OpenDyslexic" style:text-underline-style="none" officeooo:rsid="000cf01e" officeooo:paragraph-rsid="000cf01e"/>
    </style:style>
    <style:style style:name="P16" style:family="paragraph" style:parent-style-name="Standard">
      <style:text-properties style:font-name="OpenDyslexic" style:text-underline-style="none" officeooo:rsid="000d316d" officeooo:paragraph-rsid="000d316d"/>
    </style:style>
    <style:style style:name="P17" style:family="paragraph" style:parent-style-name="Standard">
      <style:text-properties style:font-name="OpenDyslexic" style:text-underline-style="none" officeooo:rsid="000f290a" officeooo:paragraph-rsid="000f290a"/>
    </style:style>
    <style:style style:name="P18" style:family="paragraph" style:parent-style-name="Standard">
      <style:text-properties style:font-name="OpenDyslexic" style:text-underline-style="none" officeooo:rsid="00101c9e" officeooo:paragraph-rsid="00101c9e"/>
    </style:style>
    <style:style style:name="P19" style:family="paragraph" style:parent-style-name="Standard">
      <style:text-properties style:font-name="OpenDyslexic" style:text-underline-style="none" officeooo:rsid="0010371c" officeooo:paragraph-rsid="0010371c"/>
    </style:style>
    <style:style style:name="P20" style:family="paragraph" style:parent-style-name="Standard">
      <style:text-properties style:font-name="OpenDyslexic" style:text-underline-style="none" officeooo:rsid="00128e41" officeooo:paragraph-rsid="00128e41"/>
    </style:style>
    <style:style style:name="P21" style:family="paragraph" style:parent-style-name="Standard">
      <style:text-properties style:font-name="OpenDyslexic" style:text-underline-style="none" officeooo:rsid="00146993" officeooo:paragraph-rsid="00146993"/>
    </style:style>
    <style:style style:name="P22" style:family="paragraph" style:parent-style-name="Standard">
      <style:text-properties style:font-name="OpenDyslexic" fo:font-style="italic" style:text-underline-style="solid" style:text-underline-width="auto" style:text-underline-color="font-color" officeooo:rsid="00101c9e" officeooo:paragraph-rsid="00101c9e" style:font-style-asian="italic" style:font-style-complex="italic"/>
    </style:style>
    <style:style style:name="P23" style:family="paragraph" style:parent-style-name="Standard">
      <style:text-properties style:font-name="OpenDyslexic" fo:font-style="italic" style:text-underline-style="solid" style:text-underline-width="auto" style:text-underline-color="font-color" officeooo:rsid="0010371c" officeooo:paragraph-rsid="0010371c" style:font-style-asian="italic" style:font-style-complex="italic"/>
    </style:style>
    <style:style style:name="P24" style:family="paragraph" style:parent-style-name="Table_20_Contents">
      <style:text-properties style:font-name="OpenDyslexic" officeooo:rsid="000b8182" officeooo:paragraph-rsid="000b8182"/>
    </style:style>
    <style:style style:name="P25" style:family="paragraph" style:parent-style-name="Table_20_Contents">
      <style:text-properties style:font-name="OpenDyslexic" officeooo:rsid="00101c9e" officeooo:paragraph-rsid="00101c9e"/>
    </style:style>
    <style:style style:name="T1" style:family="text">
      <style:text-properties officeooo:rsid="000b8182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fo:margin-left="0cm" fo:margin-right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Collège A.Lejeune <text:s text:c="65"/>3ème</text:p>
            <text:p text:style-name="P24">Exercice <text:s text:c="23"/>Chapitre : Théorème de Thalès</text:p>
          </table:table-cell>
        </table:table-row>
      </table:table>
      <text:p text:style-name="P1"/>
      <text:p text:style-name="P4">Exercice 1 :</text:p>
      <text:p text:style-name="P12">Écris toutes les égalités des rapports de longueurs dans chacun des cas suivants. Les droites vertes sont parallèles.</text:p>
      <text:p text:style-name="P3"><draw:frame draw:style-name="fr1" draw:name="Image4" text:anchor-type="paragraph" svg:width="17cm" svg:height="11.915cm" draw:z-index="2"><draw:image xlink:href="Pictures/1000020100000296000001D097C093F405988CD4.png" xlink:type="simple" xlink:show="embed" xlink:actuate="onLoad" loext:mime-type="image/png"/></draw:frame>Exercice 2 :</text:p>
      <text:p text:style-name="P13">Sur la figure ci-dessous, les droites (AB) et (TR) sont parallèles. On donne SA=4cm ; ST=15cm ; AB=2,4 cm et SR=7,5 cm.</text:p>
      <text:p text:style-name="P13"/>
      <text:p text:style-name="P13"><draw:frame draw:style-name="fr2" draw:name="Image5" text:anchor-type="paragraph" svg:width="10.717cm" svg:height="5.239cm" draw:z-index="3"><draw:image xlink:href="Pictures/1000020100000195000000C67CC5E3FCF29F071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. Reporte les données sur le croquis.</text:p>
      <text:p text:style-name="P13">b. Pour calculer SB et RT, compléte :</text:p>
      <text:p text:style-name="P13">Dans le triangle ……., on sait que <draw:frame draw:style-name="fr6" draw:name="Objet1" text:anchor-type="as-char" svg:y="-0.527cm" svg:width="1.801cm" svg:height="0.73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, <draw:frame draw:style-name="fr6" draw:name="Objet2" text:anchor-type="as-char" svg:y="-0.527cm" svg:width="1.489cm" svg:height="0.7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/>et (AB)//(……) donc d’après le théorème de Thales :</text:p>
      <text:p text:style-name="P13"/>
      <text:p text:style-name="P3">Exercice <text:span text:style-name="T1">3</text:span> :</text:p>
      <text:p text:style-name="P13">Dans chacun des cas suivants, les droites vertes sont parallèles.</text:p>
      <text:p text:style-name="P2"><draw:frame draw:style-name="fr3" draw:name="Image6" text:anchor-type="paragraph" svg:width="17cm" svg:height="9.287cm" draw:z-index="4"><draw:image xlink:href="Pictures/100002010000029C0000016DE8D60576222F2DE0.png" xlink:type="simple" xlink:show="embed" xlink:actuate="onLoad" loext:mime-type="image/png"/></draw:frame></text:p>
      <text:p text:style-name="P2"><draw:frame draw:style-name="fr4" draw:name="Image7" text:anchor-type="paragraph" svg:x="0.058cm" svg:y="0.22cm" svg:width="17cm" svg:height="9.795cm" draw:z-index="5"><draw:image xlink:href="Pictures/10000201000002A3000001858DABA1702E6FDF22.png" xlink:type="simple" xlink:show="embed" xlink:actuate="onLoad" loext:mime-type="image/png"/></draw:frame><text:soft-page-break/></text:p>
      <text:p text:style-name="P4">Exercice 4 :</text:p>
      <text:p text:style-name="P14">Quatre droites sont tracées ; celles en gras sont parallèles.</text:p>
      <text:p text:style-name="P14">Dans chaque cas, énoncer le théorème de Thalès.</text:p>
      <text:p text:style-name="P14"><draw:frame draw:style-name="fr5" draw:name="Image1" text:anchor-type="paragraph" svg:x="1.196cm" svg:y="0.411cm" svg:width="8.839cm" svg:height="6.853cm" draw:z-index="6"><draw:image xlink:href="Pictures/100002010000014E0000010373F1EE18CD249D25.png" xlink:type="simple" xlink:show="embed" xlink:actuate="onLoad" loext:mime-type="image/png"/></draw:frame><draw:frame draw:style-name="fr5" draw:name="Image2" text:anchor-type="paragraph" svg:x="0.298cm" svg:y="7.826cm" svg:width="11.088cm" svg:height="5.477cm" draw:z-index="7"><draw:image xlink:href="Pictures/10000201000001A3000000CF618171BBF0D7C8AC.png" xlink:type="simple" xlink:show="embed" xlink:actuate="onLoad" loext:mime-type="image/png"/></draw:frame><text:s/>a) <text:s text:c="56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3" text:anchor-type="paragraph" svg:x="0.822cm" svg:y="0.411cm" svg:width="14.474cm" svg:height="6.376cm" draw:z-index="8"><draw:image xlink:href="Pictures/1000020100000223000000F10D01F36BFB24F331.png" xlink:type="simple" xlink:show="embed" xlink:actuate="onLoad" loext:mime-type="image/png"/></draw:frame><text:soft-page-break/>c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Exercice 5 :</text:p>
      <text:p text:style-name="P15">On a : <draw:frame draw:style-name="fr7" draw:name="Objet3" text:anchor-type="as-char" svg:y="-0.527cm" svg:width="1.617cm" svg:height="0.739cm" draw:z-index="9"><draw:object xlink:href="./Object 3" xlink:type="simple" xlink:show="embed" xlink:actuate="onLoad"/><draw:image xlink:href="./ObjectReplacements/Object 3" xlink:type="simple" xlink:show="embed" xlink:actuate="onLoad"/></draw:frame>, <draw:frame draw:style-name="fr7" draw:name="Objet4" text:anchor-type="as-char" svg:y="-0.527cm" svg:width="1.686cm" svg:height="0.739cm" draw:z-index="10"><draw:object xlink:href="./Object 4" xlink:type="simple" xlink:show="embed" xlink:actuate="onLoad"/><draw:image xlink:href="./ObjectReplacements/Object 4" xlink:type="simple" xlink:show="embed" xlink:actuate="onLoad"/></draw:frame>et (AH)//(MO) .</text:p>
      <text:p text:style-name="P15">Le théorème de Thalès permet-il de conclure que :</text:p>
      <text:p text:style-name="P15"><draw:frame draw:style-name="fr4" draw:name="Image8" text:anchor-type="paragraph" svg:x="0.116cm" svg:y="0cm" svg:width="7.303cm" svg:height="7.805cm" draw:z-index="11"><draw:image xlink:href="Pictures/1000020100000114000001275C72F0D03DAE66A0.png" xlink:type="simple" xlink:show="embed" xlink:actuate="onLoad" loext:mime-type="image/png"/></draw:frame>a) <draw:frame draw:style-name="fr7" draw:name="Objet5" text:anchor-type="as-char" svg:y="-0.891cm" svg:width="1.707cm" svg:height="1.54cm" draw:z-index="12"><draw:object xlink:href="./Object 5" xlink:type="simple" xlink:show="embed" xlink:actuate="onLoad"/><draw:image xlink:href="./ObjectReplacements/Object 5" xlink:type="simple" xlink:show="embed" xlink:actuate="onLoad"/></draw:frame><text:s text:c="3"/>b) <draw:frame draw:style-name="fr7" draw:name="Objet6" text:anchor-type="as-char" svg:y="-0.891cm" svg:width="1.715cm" svg:height="1.54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15"/>
      <text:p text:style-name="P16">c) <draw:frame draw:style-name="fr7" draw:name="Objet7" text:anchor-type="as-char" svg:y="-0.891cm" svg:width="1.946cm" svg:height="1.54cm" draw:z-index="14"><draw:object xlink:href="./Object 7" xlink:type="simple" xlink:show="embed" xlink:actuate="onLoad"/><draw:image xlink:href="./ObjectReplacements/Object 7" xlink:type="simple" xlink:show="embed" xlink:actuate="onLoad"/></draw:frame><text:s text:c="2"/>d) <draw:frame draw:style-name="fr7" draw:name="Objet8" text:anchor-type="as-char" svg:y="-0.891cm" svg:width="1.905cm" svg:height="1.54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16"/>
      <text:p text:style-name="P16">e) <draw:frame draw:style-name="fr7" draw:name="Objet9" text:anchor-type="as-char" svg:y="-0.891cm" svg:width="1.946cm" svg:height="1.54cm" draw:z-index="16"><draw:object xlink:href="./Object 9" xlink:type="simple" xlink:show="embed" xlink:actuate="onLoad"/><draw:image xlink:href="./ObjectReplacements/Object 9" xlink:type="simple" xlink:show="embed" xlink:actuate="onLoad"/></draw:frame><text:s text:c="2"/>f) <draw:frame draw:style-name="fr7" draw:name="Objet10" text:anchor-type="as-char" svg:y="-0.891cm" svg:width="2.138cm" svg:height="1.54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/>
      <text:p text:style-name="P16"/>
      <text:p text:style-name="P16"/>
      <text:p text:style-name="P6">Exercice 6 :</text:p>
      <text:p text:style-name="P17">Un triangle SEL est tel que SE=6 cm et SL= 3 cm. Le point I est le point de [LS) tel que SI= 5,1 cm. La parallèle à la droite (EL) passant par I coupe (ES) en X. On a alors IX=6,8 cm.</text:p>
      <text:p text:style-name="P17"/>
      <text:p text:style-name="P17">a) Tracer une figure à main levée. Code la figure avec les données de l’énoncé.</text:p>
      <text:p text:style-name="P17">b) Calcule les longueurs SX et EL.</text:p>
      <text:p text:style-name="P17"/>
      <text:p text:style-name="P7">Exercice 7 :</text:p>
      <text:p text:style-name="P7"><text:soft-page-break/><text:span text:style-name="T2">Soit PEM un triangle. A est un point du segment [PE] et B est un point du segment [PM] tels que BM=30 cm ; AB= 30 cm ; ME= 50 cm et (AB)//(ME). A l’aide du théorème de Thalès, on obtient PM=45 cm.</text:span></text:p>
      <text:p text:style-name="P7"><text:span text:style-name="T2">Vrai ou faux ? Explique ta démarche.</text:span></text:p>
      <text:p text:style-name="P7"><text:span text:style-name="T2"/></text:p>
      <text:p text:style-name="P8">Exercice 8 :</text:p>
      <text:p text:style-name="P18">LOT est un triangle tel que OL=9 cm ; OT=7 cm et LT=5 cm.</text:p>
      <text:p text:style-name="P18">On appelle M le milieu du segment [LO] et N le milieu du segment [TL].</text:p>
      <text:p text:style-name="P18">a. Montre que les droites (MN) et (OT) sont parallèles.</text:p>
      <text:p text:style-name="P18">b. Calcule la longueur MN.</text:p>
      <text:p text:style-name="P18"/>
      <text:p text:style-name="P8">Exercice 9 :<text:span text:style-name="T2"> Brevet</text:span></text:p>
      <text:p text:style-name="P8"><text:span text:style-name="T2">D’après le code de la route (Article R313-3) :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Les feux de croisement d’une voiture permettent d’éclairer efficacement la route, la nuit par temps clair, sur une distance minimale de 30m.</text:p>
          </table:table-cell>
        </table:table-row>
      </table:table>
      <text:p text:style-name="P8"><text:span text:style-name="T2"/></text:p>
      <text:p text:style-name="P8"><text:span text:style-name="T2">Afin de contrôler régulièrement la portée des feux de sa voiture, Jacques veut tracer un repère sur le mur au fond de son garage.</text:span></text:p>
      <text:p text:style-name="P22"><text:span text:style-name="T2"/></text:p>
      <text:p text:style-name="P23"><text:span text:style-name="T2">La figure n’est pas à l’échelle</text:span></text:p>
      <text:p text:style-name="P23"><draw:frame draw:style-name="fr3" draw:name="Image9" text:anchor-type="paragraph" svg:width="17cm" svg:height="7.19cm" draw:z-index="18"><draw:image xlink:href="Pictures/100002010000029D0000011B68EF4D1CB7276CB0.png" xlink:type="simple" xlink:show="embed" xlink:actuate="onLoad" loext:mime-type="image/png"/></draw:frame><text:span text:style-name="T3"/></text:p>
      <text:p text:style-name="P19">Les feux de croisement sont à 60 cm du sol.</text:p>
      <text:p text:style-name="P19">A quelle hauteur doit-il placer le repère sur son mur pour pouvoir régler correctement ses phares ?</text:p>
      <text:p text:style-name="P19"><text:soft-page-break/></text:p>
      <text:p text:style-name="P9">Exercice 10 :</text:p>
      <text:p text:style-name="P20">ABC un triangle tel que BC= 3,3 cm ; AC=2,4 cm et AB= 2,5 cm.</text:p>
      <text:p text:style-name="P20">a. Réalise une figure. Place le point D sur [AC) tel que CD=6 cm et le point E sur [BC) tel que CE=9 cm.</text:p>
      <text:p text:style-name="P20">b. Explique pourquoi les droites (ED) et (AB) ne sont pas parallèles.</text:p>
      <text:p text:style-name="P20"/>
      <text:p text:style-name="P10">Exercice 11 :</text:p>
      <text:p text:style-name="P20"><draw:frame draw:style-name="fr4" draw:name="Image10" text:anchor-type="paragraph" svg:x="9.07cm" svg:y="1.071cm" svg:width="7.329cm" svg:height="4.789cm" draw:z-index="19"><draw:image xlink:href="Pictures/1000020100000115000000B55F23C0EAB2A161EF.png" xlink:type="simple" xlink:show="embed" xlink:actuate="onLoad" loext:mime-type="image/png"/></draw:frame>a. Le triangle ABC est rectangle en A. On donne AB=6cm et BC=10cm. Démontre que AC=8cm.</text:p>
      <text:p text:style-name="P21">b. On donne CM=2,56 cm et CN=3,2 cm.</text:p>
      <text:p text:style-name="P21">Explique pourquoi les droites (AB) et (Mn) sont parallèles.</text:p>
      <text:p text:style-name="P21"/>
      <text:p text:style-name="P21"/>
      <text:p text:style-name="P21"/>
      <text:p text:style-name="P21"/>
      <text:p text:style-name="P11">Exercice 12 :</text:p>
      <text:p text:style-name="P21">Pour chaque figure ci-dessous, indique si le triangle OMN est une réduction ou un agrandissement du triangle OAB ou ni l’un ni l’autre. Justifie ta réponse.</text:p>
      <text:p text:style-name="P21"><draw:frame draw:style-name="fr3" draw:name="Image11" text:anchor-type="paragraph" svg:width="17cm" svg:height="9.347cm" draw:z-index="20"><draw:image xlink:href="Pictures/10000201000002C9000001882E03A46704232A07.png" xlink:type="simple" xlink:show="embed" xlink:actuate="onLoad" loext:mime-type="image/png"/></draw:frame></text:p>
      <text:p text:style-name="P11"><text:soft-page-break/>Exercice 13 :</text:p>
      <text:p text:style-name="P21">a. Construis un parallélogramme RAVI tel que RI=6 cm ; IV= 4 cm et</text:p>
      <text:p text:style-name="P21"><text:s/><draw:frame draw:style-name="fr8" draw:name="Objet11" text:anchor-type="as-char" svg:y="-0.527cm" svg:width="0.956cm" svg:height="0.739cm" draw:z-index="21"><draw:object xlink:href="./Object 11" xlink:type="simple" xlink:show="embed" xlink:actuate="onLoad"/><draw:image xlink:href="./ObjectReplacements/Object 11" xlink:type="simple" xlink:show="embed" xlink:actuate="onLoad"/><svg:desc>RIV</svg:desc></draw:frame>=130°.</text:p>
      <text:p text:style-name="P21">b. Construis un agrandissement de rapport <draw:frame draw:style-name="fr7" draw:name="Objet12" text:anchor-type="as-char" svg:y="-0.891cm" svg:width="0.57cm" svg:height="1.54cm" draw:z-index="22"><draw:object xlink:href="./Object 12" xlink:type="simple" xlink:show="embed" xlink:actuate="onLoad"/><draw:image xlink:href="./ObjectReplacements/Object 12" xlink:type="simple" xlink:show="embed" xlink:actuate="onLoad"/></draw:frame>du parallélogramme RAVI.</text:p>
      <text:p text:style-name="P21">c. Quelle est la nature de la figure obtenue ? Justifie ta réponse.</text:p>
      <text:p text:style-name="P21">d. Déduis-en la mesure des angles de la figure agrandie. Justifie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9T15:13:05.269000000</meta:creation-date>
    <dc:date>2021-09-19T17:18:37.462000000</dc:date>
    <meta:editing-duration>PT9M7S</meta:editing-duration>
    <meta:editing-cycles>1</meta:editing-cycles>
    <meta:document-statistic meta:table-count="2" meta:image-count="11" meta:object-count="12" meta:page-count="7" meta:paragraph-count="58" meta:word-count="579" meta:character-count="3116" meta:non-whitespace-character-count="2437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row>
      <mi>A</mi>
      <mo stretchy="false">∈</mo>
      <mrow>
        <mo fence="true" stretchy="false">[</mo>
        <mrow>
          <mi mathvariant="italic">ST</mi>
        </mrow>
        <mo fence="true" stretchy="false">]</mo>
      </mrow>
    </mrow>
    <annotation encoding="StarMath 5.0">A in [ ST ]</annotation>
  </semantics>
</math>
</file>

<file path=Object 10/content.xml><?xml version="1.0" encoding="utf-8"?>
<math xmlns="http://www.w3.org/1998/Math/MathML" display="block">
  <semantics>
    <mrow>
      <mfrac>
        <mi mathvariant="italic">AH</mi>
        <mi mathvariant="italic">OM</mi>
      </mfrac>
      <mo stretchy="false">=</mo>
      <mfrac>
        <mi mathvariant="italic">IH</mi>
        <mi mathvariant="italic">MH</mi>
      </mfrac>
    </mrow>
    <annotation encoding="StarMath 5.0">AH over OM = IH over MH</annotation>
  </semantics>
</math>
</file>

<file path=Object 11/content.xml><?xml version="1.0" encoding="utf-8"?>
<math xmlns="http://www.w3.org/1998/Math/MathML" display="block">
  <semantics>
    <mover accent="true">
      <mtext>RIV</mtext>
      <mo stretchy="true">^</mo>
    </mover>
    <annotation encoding="StarMath 5.0"> widehat {"RIV"}</annotation>
  </semantics>
</math>
</file>

<file path=Object 12/content.xml><?xml version="1.0" encoding="utf-8"?>
<math xmlns="http://www.w3.org/1998/Math/MathML" display="block">
  <semantics>
    <mfrac>
      <mn>5</mn>
      <mn>4</mn>
    </mfrac>
    <annotation encoding="StarMath 5.0">5 over 4</annotation>
  </semantics>
</math>
</file>

<file path=Object 2/content.xml><?xml version="1.0" encoding="utf-8"?>
<math xmlns="http://www.w3.org/1998/Math/MathML" display="block">
  <semantics>
    <mrow>
      <mi>B</mi>
      <mo stretchy="false">∈</mo>
      <mrow>
        <mo fence="true" stretchy="false">[</mo>
        <mrow>
          <mn>...</mn>
        </mrow>
        <mo fence="true" stretchy="false">]</mo>
      </mrow>
    </mrow>
    <annotation encoding="StarMath 5.0">B in [ ... ]</annotation>
  </semantics>
</math>
</file>

<file path=Object 3/content.xml><?xml version="1.0" encoding="utf-8"?>
<math xmlns="http://www.w3.org/1998/Math/MathML" display="block">
  <semantics>
    <mrow>
      <mi>I</mi>
      <mo stretchy="false">∈</mo>
      <mrow>
        <mo fence="true" stretchy="false">(</mo>
        <mrow>
          <mi mathvariant="italic">AO</mi>
        </mrow>
        <mo fence="true" stretchy="false">)</mo>
      </mrow>
    </mrow>
    <annotation encoding="StarMath 5.0">I in ( AO )</annotation>
  </semantics>
</math>
</file>

<file path=Object 4/content.xml><?xml version="1.0" encoding="utf-8"?>
<math xmlns="http://www.w3.org/1998/Math/MathML" display="block">
  <semantics>
    <mrow>
      <mi>I</mi>
      <mo stretchy="false">∈</mo>
      <mrow>
        <mo fence="true" stretchy="false">(</mo>
        <mrow>
          <mi mathvariant="italic">HM</mi>
        </mrow>
        <mo fence="true" stretchy="false">)</mo>
      </mrow>
    </mrow>
    <annotation encoding="StarMath 5.0">I in ( HM )</annotation>
  </semantics>
</math>
</file>

<file path=Object 5/content.xml><?xml version="1.0" encoding="utf-8"?>
<math xmlns="http://www.w3.org/1998/Math/MathML" display="block">
  <semantics>
    <mrow>
      <mfrac>
        <mi mathvariant="italic">AI</mi>
        <mi mathvariant="italic">MI</mi>
      </mfrac>
      <mo stretchy="false">=</mo>
      <mfrac>
        <mi mathvariant="italic">HI</mi>
        <mi mathvariant="italic">IO</mi>
      </mfrac>
    </mrow>
    <annotation encoding="StarMath 5.0">AI over {MI}= HI over IO</annotation>
  </semantics>
</math>
</file>

<file path=Object 6/content.xml><?xml version="1.0" encoding="utf-8"?>
<math xmlns="http://www.w3.org/1998/Math/MathML" display="block">
  <semantics>
    <mrow>
      <mfrac>
        <mi mathvariant="italic">IA</mi>
        <mi mathvariant="italic">IO</mi>
      </mfrac>
      <mo stretchy="false">=</mo>
      <mfrac>
        <mi mathvariant="italic">IH</mi>
        <mi mathvariant="italic">MI</mi>
      </mfrac>
    </mrow>
    <annotation encoding="StarMath 5.0">IA over IO = IH over MI</annotation>
  </semantics>
</math>
</file>

<file path=Object 7/content.xml><?xml version="1.0" encoding="utf-8"?>
<math xmlns="http://www.w3.org/1998/Math/MathML" display="block">
  <semantics>
    <mrow>
      <mfrac>
        <mi mathvariant="italic">MI</mi>
        <mi mathvariant="italic">IH</mi>
      </mfrac>
      <mo stretchy="false">=</mo>
      <mfrac>
        <mi mathvariant="italic">AH</mi>
        <mi mathvariant="italic">MO</mi>
      </mfrac>
    </mrow>
    <annotation encoding="StarMath 5.0">MI over IH = AH over MO</annotation>
  </semantics>
</math>
</file>

<file path=Object 8/content.xml><?xml version="1.0" encoding="utf-8"?>
<math xmlns="http://www.w3.org/1998/Math/MathML" display="block">
  <semantics>
    <mrow>
      <mfrac>
        <mi mathvariant="italic">IO</mi>
        <mi mathvariant="italic">IA</mi>
      </mfrac>
      <mo stretchy="false">=</mo>
      <mfrac>
        <mi mathvariant="italic">MO</mi>
        <mi mathvariant="italic">AH</mi>
      </mfrac>
    </mrow>
    <annotation encoding="StarMath 5.0">IO over IA = MO over AH</annotation>
  </semantics>
</math>
</file>

<file path=Object 9/content.xml><?xml version="1.0" encoding="utf-8"?>
<math xmlns="http://www.w3.org/1998/Math/MathML" display="block">
  <semantics>
    <mrow>
      <mfrac>
        <mi mathvariant="italic">HI</mi>
        <mi mathvariant="italic">MI</mi>
      </mfrac>
      <mo stretchy="false">=</mo>
      <mfrac>
        <mi mathvariant="italic">HA</mi>
        <mi mathvariant="italic">MO</mi>
      </mfrac>
    </mrow>
    <annotation encoding="StarMath 5.0">HI over MI = HA over MO</annotation>
  </semantics>
</math>
</file>