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05000000BD595F3EE9ED4A6856.png" manifest:media-type="image/png"/>
  <manifest:file-entry manifest:full-path="Pictures/10000201000001B8000001049914384AF764A6FD.png" manifest:media-type="image/png"/>
  <manifest:file-entry manifest:full-path="Pictures/10000201000002F90000008E4022C6E82F8FE767.png" manifest:media-type="image/png"/>
  <manifest:file-entry manifest:full-path="Pictures/10000201000001F2000000E4BF5C1560ED75C1E8.png" manifest:media-type="image/png"/>
  <manifest:file-entry manifest:full-path="Pictures/10000201000002D9000001640D5D3BB9437E9EF2.png" manifest:media-type="image/png"/>
  <manifest:file-entry manifest:full-path="Pictures/10000000000001C7000000D991764523743C0CDB.png" manifest:media-type="image/png"/>
  <manifest:file-entry manifest:full-path="Pictures/10000201000002C70000022D702E4EF63C187134.png" manifest:media-type="image/png"/>
  <manifest:file-entry manifest:full-path="Pictures/10000201000002A200000287C7D8F270C5B3F07D.png" manifest:media-type="image/png"/>
  <manifest:file-entry manifest:full-path="Pictures/1000020100000169000000B038AE191BCA9C4780.png" manifest:media-type="image/png"/>
  <manifest:file-entry manifest:full-path="Pictures/1000020100000243000002257BCCAD0E22FF7A2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2*"/>
    </style:style>
    <style:style style:name="Tableau3.F" style:family="table-column">
      <style:table-column-properties style:column-width="2.835cm" style:rel-column-width="109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Dyslexic" officeooo:rsid="001e7daf" officeooo:paragraph-rsid="001e7daf"/>
    </style:style>
    <style:style style:name="P2" style:family="paragraph" style:parent-style-name="Table_20_Contents">
      <style:paragraph-properties fo:text-align="center" style:justify-single-word="false"/>
      <style:text-properties style:font-name="OpenDyslexic" officeooo:rsid="00278a22" officeooo:paragraph-rsid="0021a5f8"/>
    </style:style>
    <style:style style:name="P3" style:family="paragraph" style:parent-style-name="Table_20_Contents">
      <style:paragraph-properties fo:text-align="center" style:justify-single-word="false"/>
      <style:text-properties style:font-name="OpenDyslexic" officeooo:paragraph-rsid="0021a5f8"/>
    </style:style>
    <style:style style:name="P4" style:family="paragraph" style:parent-style-name="Table_20_Contents">
      <style:text-properties style:font-name="OpenDyslexic" officeooo:paragraph-rsid="0021a5f8"/>
    </style:style>
    <style:style style:name="P5" style:family="paragraph" style:parent-style-name="Standard">
      <style:text-properties style:font-name="OpenDyslexic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e7daf" officeooo:paragraph-rsid="001e7daf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ffcd1" officeooo:paragraph-rsid="001ffcd1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21a5f8" officeooo:paragraph-rsid="0021a5f8"/>
    </style:style>
    <style:style style:name="P9" style:family="paragraph" style:parent-style-name="Standard">
      <style:text-properties style:font-name="OpenDyslexic" style:text-underline-style="none" officeooo:rsid="001e7daf" officeooo:paragraph-rsid="001e7daf"/>
    </style:style>
    <style:style style:name="P10" style:family="paragraph" style:parent-style-name="Standard">
      <style:paragraph-properties fo:text-align="start" style:justify-single-word="false"/>
      <style:text-properties style:font-name="OpenDyslexic" style:text-underline-style="none" officeooo:rsid="00157884" officeooo:paragraph-rsid="0021a5f8"/>
    </style:style>
    <style:style style:name="P11" style:family="paragraph" style:parent-style-name="Standard">
      <style:paragraph-properties fo:text-align="start" style:justify-single-word="false"/>
      <style:text-properties style:font-name="OpenDyslexic" style:text-underline-style="none" officeooo:rsid="00146c31" officeooo:paragraph-rsid="0021a5f8"/>
    </style:style>
    <style:style style:name="P12" style:family="paragraph" style:parent-style-name="Standard">
      <style:paragraph-properties fo:text-align="start" style:justify-single-word="false"/>
      <style:text-properties style:font-name="OpenDyslexic" style:text-underline-style="none" officeooo:rsid="0021a5f8" officeooo:paragraph-rsid="0021a5f8"/>
    </style:style>
    <style:style style:name="P13" style:family="paragraph" style:parent-style-name="Standard">
      <style:paragraph-properties fo:text-align="start" style:justify-single-word="false"/>
      <style:text-properties style:font-name="OpenDyslexic" style:text-underline-style="none" officeooo:rsid="0023c773" officeooo:paragraph-rsid="0021a5f8"/>
    </style:style>
    <style:style style:name="P14" style:family="paragraph" style:parent-style-name="Standard">
      <style:paragraph-properties fo:text-align="start" style:justify-single-word="false"/>
      <style:text-properties style:font-name="OpenDyslexic" style:text-underline-style="none" officeooo:rsid="0024d16a" officeooo:paragraph-rsid="0021a5f8"/>
    </style:style>
    <style:style style:name="P15" style:family="paragraph" style:parent-style-name="Standard">
      <style:text-properties style:font-name="OpenDyslexic" style:text-underline-style="none" officeooo:rsid="0024d16a" officeooo:paragraph-rsid="0021a5f8"/>
    </style:style>
    <style:style style:name="P16" style:family="paragraph" style:parent-style-name="Standard">
      <style:paragraph-properties fo:text-align="start" style:justify-single-word="false"/>
      <style:text-properties style:font-name="OpenDyslexic" style:text-underline-style="none" officeooo:rsid="00278a22" officeooo:paragraph-rsid="0021a5f8"/>
    </style:style>
    <style:style style:name="P17" style:family="paragraph" style:parent-style-name="Standard">
      <style:text-properties style:font-name="OpenDyslexic" style:text-underline-style="none" officeooo:rsid="00278a22" officeooo:paragraph-rsid="0021a5f8"/>
    </style:style>
    <style:style style:name="P18" style:family="paragraph" style:parent-style-name="Standard">
      <style:paragraph-properties fo:text-align="start" style:justify-single-word="false"/>
      <style:text-properties style:font-name="OpenDyslexic" style:text-underline-style="none" officeooo:rsid="0022b2a7" officeooo:paragraph-rsid="0022b2a7"/>
    </style:style>
    <style:style style:name="P19" style:family="paragraph" style:parent-style-name="Standard">
      <style:paragraph-properties fo:text-align="start" style:justify-single-word="false"/>
      <style:text-properties style:font-name="OpenDyslexic" style:text-underline-style="none" officeooo:rsid="00248eeb" officeooo:paragraph-rsid="00248eeb"/>
    </style:style>
    <style:style style:name="P20" style:family="paragraph" style:parent-style-name="Standard">
      <style:paragraph-properties fo:text-align="start" style:justify-single-word="false"/>
      <style:text-properties style:font-name="OpenDyslexic" style:text-underline-style="none" officeooo:rsid="0025d4d3" officeooo:paragraph-rsid="0025d4d3"/>
    </style:style>
    <style:style style:name="P21" style:family="paragraph" style:parent-style-name="Standard">
      <style:paragraph-properties fo:text-align="start" style:justify-single-word="false"/>
      <style:text-properties style:font-name="OpenDyslexic" style:text-underline-style="none" officeooo:rsid="0026606a" officeooo:paragraph-rsid="0026606a"/>
    </style:style>
    <style:style style:name="P22" style:family="paragraph" style:parent-style-name="Standard">
      <style:paragraph-properties fo:text-align="start" style:justify-single-word="false"/>
      <style:text-properties style:font-name="OpenDyslexic" style:text-underline-style="none" officeooo:rsid="0027010e" officeooo:paragraph-rsid="0027010e"/>
    </style:style>
    <style:style style:name="P23" style:family="paragraph" style:parent-style-name="Standard">
      <style:paragraph-properties fo:text-align="start" style:justify-single-word="false"/>
      <style:text-properties style:font-name="OpenDyslexic" style:text-underline-style="none" officeooo:rsid="0027fae2" officeooo:paragraph-rsid="0027fae2"/>
    </style:style>
    <style:style style:name="P24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21a5f8" officeooo:paragraph-rsid="0021a5f8"/>
    </style:style>
    <style:style style:name="P25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22b2a7" officeooo:paragraph-rsid="0022b2a7"/>
    </style:style>
    <style:style style:name="P26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248eeb" officeooo:paragraph-rsid="00248eeb"/>
    </style:style>
    <style:style style:name="P27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25d4d3" officeooo:paragraph-rsid="0025d4d3"/>
    </style:style>
    <style:style style:name="P28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26606a" officeooo:paragraph-rsid="0026606a"/>
    </style:style>
    <style:style style:name="P29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27010e" officeooo:paragraph-rsid="0027010e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font-name="OpenDyslexic" style:text-underline-style="none" officeooo:rsid="002bf0a3" officeooo:paragraph-rsid="0021a5f8"/>
    </style:style>
    <style:style style:name="P31" style:family="paragraph" style:parent-style-name="Standard">
      <style:text-properties style:text-line-through-style="none" style:text-line-through-type="none" style:font-name="OpenDyslexic" style:text-underline-style="none" officeooo:rsid="002bf0a3" officeooo:paragraph-rsid="0021a5f8"/>
    </style:style>
    <style:style style:name="P32" style:family="paragraph" style:parent-style-name="Standard">
      <style:text-properties style:text-line-through-style="none" style:text-line-through-type="none" style:font-name="OpenDyslexic" style:text-underline-style="none" officeooo:rsid="002a5447" officeooo:paragraph-rsid="0021a5f8"/>
    </style:style>
    <style:style style:name="P33" style:family="paragraph" style:parent-style-name="Standard">
      <style:text-properties style:text-line-through-style="none" style:text-line-through-type="none" style:font-name="OpenDyslexic" style:text-underline-style="solid" style:text-underline-width="auto" style:text-underline-color="font-color" officeooo:rsid="002a5447" officeooo:paragraph-rsid="0021a5f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f0a3"/>
    </style:style>
    <style:style style:name="T3" style:family="text">
      <style:text-properties officeooo:rsid="00278a2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from-top" draw:ole-draw-aspect="1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5"/>3ème</text:p>
            <text:p text:style-name="P1">Exercices <text:s text:c="26"/>Chapitre 5 : Trigonométrie</text:p>
          </table:table-cell>
        </table:table-row>
      </table:table>
      <text:p text:style-name="P5"/>
      <text:p text:style-name="P6">Activité 1 :</text:p>
      <text:p text:style-name="P9">1. Vocabulaire</text:p>
      <text:p text:style-name="P9"><draw:frame draw:style-name="fr1" draw:name="Image1" text:anchor-type="paragraph" svg:x="11.486cm" svg:y="0.623cm" svg:width="6.906cm" svg:height="5.001cm" draw:z-index="3"><draw:image xlink:href="Pictures/1000020100000105000000BD595F3EE9ED4A6856.png" xlink:type="simple" xlink:show="embed" xlink:actuate="onLoad" loext:mime-type="image/png"/></draw:frame></text:p>
      <text:p text:style-name="P9">a. Repasse en rouge les côtés de l’angle <draw:frame draw:style-name="fr5" draw:name="Objet1" text:anchor-type="as-char" svg:y="-0.527cm" svg:width="1.117cm" svg:height="0.739cm" draw:z-index="0"><draw:object xlink:href="./Object 1" xlink:type="simple" xlink:show="embed" xlink:actuate="onLoad"/><draw:image xlink:href="./ObjectReplacements/Object 1" xlink:type="simple" xlink:show="embed" xlink:actuate="onLoad"/><svg:desc>ACB</svg:desc></draw:frame>.</text:p>
      <text:p text:style-name="P9"/>
      <text:p text:style-name="P9">b. Quelle est la nature du triangle ABC ? Comment s’appelle le côté [BC] ?</text:p>
      <text:p text:style-name="P9"/>
      <text:p text:style-name="P9">c. Le côté [AC] est appelé le côté adjacent à l’angle <draw:frame draw:style-name="fr5" draw:name="Objet2" text:anchor-type="as-char" svg:y="-0.527cm" svg:width="1.117cm" svg:height="0.73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. Nomme le côté adjacent à l’angle <draw:frame draw:style-name="fr5" draw:name="Objet3" text:anchor-type="as-char" svg:y="-0.527cm" svg:width="1.138cm" svg:height="0.739cm" draw:z-index="2"><draw:object xlink:href="./Object 3" xlink:type="simple" xlink:show="embed" xlink:actuate="onLoad"/><draw:image xlink:href="./ObjectReplacements/Object 3" xlink:type="simple" xlink:show="embed" xlink:actuate="onLoad"/><svg:desc>ABC</svg:desc></draw:frame>.</text:p>
      <text:p text:style-name="P9"/>
      <text:p text:style-name="P9">2. Côté adjacent</text:p>
      <text:p text:style-name="P9">Pour les trois triangles ci-dessous, écris le plus de phrases possibles contenant le mot « hypoténuse » puis fais de même avec l’expression « coté adjacent ».</text:p>
      <text:p text:style-name="P9"><draw:frame draw:style-name="fr2" draw:name="Image2" text:anchor-type="paragraph" svg:width="17cm" svg:height="3.171cm" draw:z-index="4"><draw:image xlink:href="Pictures/10000201000002F90000008E4022C6E82F8FE767.png" xlink:type="simple" xlink:show="embed" xlink:actuate="onLoad" loext:mime-type="image/png"/></draw:frame></text:p>
      <text:p text:style-name="P7">Exercice 1 :<text:span text:style-name="T1"> Rappel Pythagore !</text:span></text:p>
      <text:p text:style-name="P7"><text:span text:style-name="T1">Le triangle GAL, rectangle en A, est tel que GA=84 m et AL= 35 m.</text:span></text:p>
      <text:p text:style-name="P7"><text:span text:style-name="T1">Calcule la longueur GL de son hypoténuse.</text:span></text:p>
      <text:p text:style-name="P7"><text:span text:style-name="T1">1) Représenter la situation à l’aide d’un dessin à main levé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2) Compléter les phrases suivantes (rédaction pour Pythagore)</text:span></text:p>
      <text:p text:style-name="P7"><text:span text:style-name="T1">Soit le triangle GAL, rectangle ………………….</text:span></text:p>
      <text:p text:style-name="P7"><text:soft-page-break/><text:span text:style-name="T1">On utilise le théorème de …………………..</text:span></text:p>
      <text:p text:style-name="P7"><text:span text:style-name="T1">On a l’égalité suivante :</text:span></text:p>
      <text:p text:style-name="P7"><text:span text:style-name="T1"><text:s/>(…..)² + (…..)² = (…….)²</text:span></text:p>
      <text:p text:style-name="P7"><text:span text:style-name="T1">On remplace par les valeurs : (……)²+(…..)²=(……)²</text:span></text:p>
      <text:p text:style-name="P8"><text:span text:style-name="T1">On calcule …….= (…….)²</text:span></text:p>
      <text:p text:style-name="P8"><text:span text:style-name="T1">On en déduit que : …...= …….</text:span></text:p>
      <text:p text:style-name="P8"><text:span text:style-name="T1"/></text:p>
      <text:p text:style-name="P8">Exercice 2 :</text:p>
      <text:p text:style-name="P11">ERL est triangle rectangle en R tel que ER=9 cm et RL= 12 cm. </text:p>
      <text:p text:style-name="P10">1) Faire un dessin à main levée de la situation</text:p>
      <text:p text:style-name="P10">2) Calcule la longueur de son hypoténuse.</text:p>
      <text:p text:style-name="P10"/>
      <text:p text:style-name="P24">Exercice 3 :</text:p>
      <text:p text:style-name="P17">MER est un triangle rectangle en E.</text:p>
      <text:p text:style-name="P17"><draw:frame draw:style-name="fr1" draw:name="Image6" text:anchor-type="paragraph" svg:x="0.286cm" svg:y="0cm" svg:width="12.039cm" svg:height="5.741cm" draw:z-index="5"><draw:image xlink:href="Pictures/10000000000001C7000000D991764523743C0CD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) Écris l’égalité de Pythagore pour ce triangle.</text:p>
      <text:p text:style-name="P17">b) Le tableau suivant présente plusieurs cas de dimensions du triangle MER. Complète-le en écrivant le détail de tes calculs (tu arrondiras au dixième si nécessaire) :</text:p>
      <table:table table:name="Tableau3" table:style-name="Tableau3">
        <table:table-column table:style-name="Tableau3.A" table:number-columns-repeated="5"/>
        <table:table-column table:style-name="Tableau3.F"/>
        <table:table-row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2">n°1</text:p>
          </table:table-cell>
          <table:table-cell table:style-name="Tableau3.A1" office:value-type="string">
            <text:p text:style-name="P2">n°2</text:p>
          </table:table-cell>
          <table:table-cell table:style-name="Tableau3.A1" office:value-type="string">
            <text:p text:style-name="P2">n°3</text:p>
          </table:table-cell>
          <table:table-cell table:style-name="Tableau3.A1" office:value-type="string">
            <text:p text:style-name="P2">n°4</text:p>
          </table:table-cell>
          <table:table-cell table:style-name="Tableau3.F1" office:value-type="string">
            <text:p text:style-name="P2">n°5</text:p>
          </table:table-cell>
        </table:table-row>
        <table:table-row>
          <table:table-cell table:style-name="Tableau3.A2" office:value-type="string">
            <text:p text:style-name="P2">MR</text:p>
          </table:table-cell>
          <table:table-cell table:style-name="Tableau3.A2" office:value-type="string">
            <text:p text:style-name="P3">….</text:p>
          </table:table-cell>
          <table:table-cell table:style-name="Tableau3.A2" office:value-type="string">
            <text:p text:style-name="P3">….</text:p>
          </table:table-cell>
          <table:table-cell table:style-name="Tableau3.A2" office:value-type="string">
            <text:p text:style-name="P2">5,3 cm</text:p>
          </table:table-cell>
          <table:table-cell table:style-name="Tableau3.A2" office:value-type="string">
            <text:p text:style-name="P2">9,1 cm</text:p>
          </table:table-cell>
          <table:table-cell table:style-name="Tableau3.F2" office:value-type="string">
            <text:p text:style-name="P2">7 m</text:p>
          </table:table-cell>
        </table:table-row>
        <table:table-row>
          <table:table-cell table:style-name="Tableau3.A2" office:value-type="string">
            <text:p text:style-name="P2">RE</text:p>
          </table:table-cell>
          <table:table-cell table:style-name="Tableau3.A2" office:value-type="string">
            <text:p text:style-name="P2">15 cm</text:p>
          </table:table-cell>
          <table:table-cell table:style-name="Tableau3.A2" office:value-type="string">
            <text:p text:style-name="P2">36 cm</text:p>
          </table:table-cell>
          <table:table-cell table:style-name="Tableau3.A2" office:value-type="string">
            <text:p text:style-name="P3">….</text:p>
          </table:table-cell>
          <table:table-cell table:style-name="Tableau3.A2" office:value-type="string">
            <text:p text:style-name="P2">9 cm</text:p>
          </table:table-cell>
          <table:table-cell table:style-name="Tableau3.F2" office:value-type="string">
            <text:p text:style-name="P3">… <text:span text:style-name="T3">m</text:span></text:p>
          </table:table-cell>
        </table:table-row>
        <table:table-row>
          <table:table-cell table:style-name="Tableau3.A2" office:value-type="string">
            <text:p text:style-name="P2">ME</text:p>
          </table:table-cell>
          <table:table-cell table:style-name="Tableau3.A2" office:value-type="string">
            <text:p text:style-name="P2">8 cm</text:p>
          </table:table-cell>
          <table:table-cell table:style-name="Tableau3.A2" office:value-type="string">
            <text:p text:style-name="P2">7,7 dm</text:p>
          </table:table-cell>
          <table:table-cell table:style-name="Tableau3.A2" office:value-type="string">
            <text:p text:style-name="P2">2,8 cm</text:p>
          </table:table-cell>
          <table:table-cell table:style-name="Tableau3.A2" office:value-type="string">
            <text:p text:style-name="P3">…</text:p>
          </table:table-cell>
          <table:table-cell table:style-name="Tableau3.F2" office:value-type="string">
            <text:p text:style-name="P2">53 cm</text:p>
          </table:table-cell>
        </table:table-row>
      </table:table>
      <text:p text:style-name="P16"/>
      <text:p text:style-name="P16"/>
      <text:p text:style-name="P16"/>
      <text:p text:style-name="P24"><text:soft-page-break/>Exercice 4 :</text:p>
      <text:p text:style-name="P13">Le triangle PIM, rectangle en P, est tel que PI=68 mm et MI=68,9mm.</text:p>
      <text:p text:style-name="P13">Calculer la longueur du côté [PM]</text:p>
      <text:p text:style-name="P13"/>
      <text:p text:style-name="P24">Exercice 5 :</text:p>
      <text:p text:style-name="P15">BUS est un triangle rectangle en B tel que : <text:line-break/>BS= 6cm et SU=9 cm</text:p>
      <text:p text:style-name="P14">Calculer la longueur UB, arrondie au millimètre près.</text:p>
      <text:p text:style-name="P14"/>
      <text:p text:style-name="P24">Exercice 6 :</text:p>
      <text:p text:style-name="P33"><text:span text:style-name="T1">Dans chacun des cas ci dessous,….</text:span></text:p>
      <text:p text:style-name="P32">- identifie le plus long côté du triangle EFG ;</text:p>
      <text:p text:style-name="P32">- calcule, d’une part, le carré de la longueur de ce côté ;</text:p>
      <text:p text:style-name="P32">- calcule, d’autre part, la somme des carrés des longueurs des deux autres côtés ;</text:p>
      <text:p text:style-name="P32">- compare les résultats obtenus et conclus.</text:p>
      <text:p text:style-name="P32">a) EF=4,5 cm ; FG= 6cm ; EG= 7,5 cm.</text:p>
      <text:p text:style-name="P33"><text:span text:style-name="T1">b) </text:span><text:span text:style-name="T2">EF= 3,6 cm ; FG= 6cm ; EG= 7 cm.</text:span></text:p>
      <text:p text:style-name="P31">c) FG= 64 mm ; EF= 72 mm ; EG= 65 mm.</text:p>
      <text:p text:style-name="P31">d) EF= 3,2 dam ; FG= 25,6 m ; EG= 19,2 m.</text:p>
      <text:p text:style-name="P30"/>
      <text:p text:style-name="P24">Exercice 7 :</text:p>
      <text:p text:style-name="P12">Soit ABC un triangle rectangle en B.</text:p>
      <text:p text:style-name="P12">a. Quelle est son hypoténuse ?</text:p>
      <text:p text:style-name="P12">b. Quel est le côté opposé à l’angle <draw:frame draw:style-name="fr5" draw:name="Objet4" text:anchor-type="as-char" svg:y="-0.527cm" svg:width="1.117cm" svg:height="0.739cm" draw:z-index="6"><draw:object xlink:href="./Object 4" xlink:type="simple" xlink:show="embed" xlink:actuate="onLoad"/><draw:image xlink:href="./ObjectReplacements/Object 4" xlink:type="simple" xlink:show="embed" xlink:actuate="onLoad"/><svg:desc>ACB</svg:desc></draw:frame> ?</text:p>
      <text:p text:style-name="P12">c. Quel est le côté opposé à l’angle <draw:frame draw:style-name="fr5" draw:name="Objet5" text:anchor-type="as-char" svg:y="-0.527cm" svg:width="1.117cm" svg:height="0.739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 ?</text:p>
      <text:p text:style-name="P12">d. Quel est le côté opposé à l’angle <draw:frame draw:style-name="fr5" draw:name="Objet6" text:anchor-type="as-char" svg:y="-0.527cm" svg:width="1.138cm" svg:height="0.739cm" draw:z-index="8"><draw:object xlink:href="./Object 6" xlink:type="simple" xlink:show="embed" xlink:actuate="onLoad"/><draw:image xlink:href="./ObjectReplacements/Object 6" xlink:type="simple" xlink:show="embed" xlink:actuate="onLoad"/><svg:desc>CAB</svg:desc></draw:frame> ?</text:p>
      <text:p text:style-name="P12">e. Quel est le côté adjacent à l’angle <draw:frame draw:style-name="fr5" draw:name="Objet7" text:anchor-type="as-char" svg:y="-0.527cm" svg:width="1.138cm" svg:height="0.739cm" draw:z-index="9"><draw:object xlink:href="./Object 7" xlink:type="simple" xlink:show="embed" xlink:actuate="onLoad"/><draw:image xlink:href="./ObjectReplacements/Object 7" xlink:type="simple" xlink:show="embed" xlink:actuate="onLoad"/><svg:desc>CAB</svg:desc></draw:frame> ?</text:p>
      <text:p text:style-name="P12"/>
      <text:p text:style-name="P24">Exercice 8 :</text:p>
      <text:p text:style-name="P12">Indique pour chaque figure à main levée si à l’aide des données, on peut calculer le sinus le cosinus ou la tangente de l’angle marqué.</text:p>
      <text:p text:style-name="P25"><draw:frame draw:style-name="fr3" draw:name="Image3" text:anchor-type="paragraph" svg:width="17cm" svg:height="16.318cm" draw:z-index="10"><draw:image xlink:href="Pictures/10000201000002A200000287C7D8F270C5B3F07D.png" xlink:type="simple" xlink:show="embed" xlink:actuate="onLoad" loext:mime-type="image/png"/></draw:frame><text:soft-page-break/>Exercice 9 :</text:p>
      <text:p text:style-name="P18">MOI est un triangle rectangle en O.</text:p>
      <text:p text:style-name="P18">Que calcules-tu lorsque tu écris :</text:p>
      <text:p text:style-name="P18">a. <draw:frame draw:style-name="fr6" draw:name="Objet8" text:anchor-type="as-char" svg:y="-0.891cm" svg:width="0.803cm" svg:height="1.54cm" draw:z-index="11"><draw:object xlink:href="./Object 8" xlink:type="simple" xlink:show="embed" xlink:actuate="onLoad"/><draw:image xlink:href="./ObjectReplacements/Object 8" xlink:type="simple" xlink:show="embed" xlink:actuate="onLoad"/></draw:frame> ? <text:s text:c="2"/>b. <draw:frame draw:style-name="fr6" draw:name="Objet9" text:anchor-type="as-char" svg:y="-0.891cm" svg:width="0.991cm" svg:height="1.54cm" draw:z-index="12"><draw:object xlink:href="./Object 9" xlink:type="simple" xlink:show="embed" xlink:actuate="onLoad"/><draw:image xlink:href="./ObjectReplacements/Object 9" xlink:type="simple" xlink:show="embed" xlink:actuate="onLoad"/></draw:frame> ? <text:s text:c="2"/>c. <draw:frame draw:style-name="fr6" draw:name="Objet10" text:anchor-type="as-char" svg:y="-0.891cm" svg:width="0.991cm" svg:height="1.54cm" draw:z-index="13"><draw:object xlink:href="./Object 10" xlink:type="simple" xlink:show="embed" xlink:actuate="onLoad"/><draw:image xlink:href="./ObjectReplacements/Object 10" xlink:type="simple" xlink:show="embed" xlink:actuate="onLoad"/></draw:frame> ? <text:s text:c="3"/>d. <draw:frame draw:style-name="fr6" draw:name="Objet11" text:anchor-type="as-char" svg:y="-0.891cm" svg:width="0.991cm" svg:height="1.54cm" draw:z-index="14"><draw:object xlink:href="./Object 11" xlink:type="simple" xlink:show="embed" xlink:actuate="onLoad"/><draw:image xlink:href="./ObjectReplacements/Object 11" xlink:type="simple" xlink:show="embed" xlink:actuate="onLoad"/></draw:frame> ?</text:p>
      <text:p text:style-name="P18">Il peut y avoir plusieurs réponses possibles.</text:p>
      <text:p text:style-name="P18">Précise l’angle pour chaque réponse donnée.</text:p>
      <text:p text:style-name="P18"/>
      <text:p text:style-name="P25">Exercice 10 :</text:p>
      <text:p text:style-name="P18">A l’aide de la calculatrice, donne la valeur arrondie au centième de :</text:p>
      <text:p text:style-name="P19">a. <draw:frame draw:style-name="fr6" draw:name="Objet12" text:anchor-type="as-char" svg:y="-0.527cm" svg:width="1.621cm" svg:height="0.739cm" draw:z-index="15"><draw:object xlink:href="./Object 12" xlink:type="simple" xlink:show="embed" xlink:actuate="onLoad"/><draw:image xlink:href="./ObjectReplacements/Object 12" xlink:type="simple" xlink:show="embed" xlink:actuate="onLoad"/></draw:frame><text:s text:c="5"/>b. <draw:frame draw:style-name="fr6" draw:name="Objet13" text:anchor-type="as-char" svg:y="-0.527cm" svg:width="1.757cm" svg:height="0.739cm" draw:z-index="16"><draw:object xlink:href="./Object 13" xlink:type="simple" xlink:show="embed" xlink:actuate="onLoad"/><draw:image xlink:href="./ObjectReplacements/Object 13" xlink:type="simple" xlink:show="embed" xlink:actuate="onLoad"/></draw:frame><text:s text:c="5"/>c. <draw:frame draw:style-name="fr6" draw:name="Objet14" text:anchor-type="as-char" svg:y="-0.527cm" svg:width="1.773cm" svg:height="0.739cm" draw:z-index="17"><draw:object xlink:href="./Object 14" xlink:type="simple" xlink:show="embed" xlink:actuate="onLoad"/><draw:image xlink:href="./ObjectReplacements/Object 14" xlink:type="simple" xlink:show="embed" xlink:actuate="onLoad"/></draw:frame><text:s text:c="4"/>d. <draw:frame draw:style-name="fr6" draw:name="Objet15" text:anchor-type="as-char" svg:y="-0.527cm" svg:width="1.63cm" svg:height="0.739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19"/>
      <text:p text:style-name="P26"><text:soft-page-break/>Exercice 11 :</text:p>
      <text:p text:style-name="P19">Donne la valeur arrondie au degré de x.</text:p>
      <text:p text:style-name="P19">a. <draw:frame draw:style-name="fr6" draw:name="Objet16" text:anchor-type="as-char" svg:y="-0.527cm" svg:width="2.508cm" svg:height="0.739cm" draw:z-index="19"><draw:object xlink:href="./Object 16" xlink:type="simple" xlink:show="embed" xlink:actuate="onLoad"/><draw:image xlink:href="./ObjectReplacements/Object 16" xlink:type="simple" xlink:show="embed" xlink:actuate="onLoad"/></draw:frame><text:s text:c="5"/>b. <draw:frame draw:style-name="fr6" draw:name="Objet17" text:anchor-type="as-char" svg:y="-0.527cm" svg:width="2.157cm" svg:height="0.739cm" draw:z-index="20"><draw:object xlink:href="./Object 17" xlink:type="simple" xlink:show="embed" xlink:actuate="onLoad"/><draw:image xlink:href="./ObjectReplacements/Object 17" xlink:type="simple" xlink:show="embed" xlink:actuate="onLoad"/></draw:frame><text:s text:c="5"/>c. <draw:frame draw:style-name="fr6" draw:name="Objet18" text:anchor-type="as-char" svg:y="-0.527cm" svg:width="2.607cm" svg:height="0.739cm" draw:z-index="21"><draw:object xlink:href="./Object 18" xlink:type="simple" xlink:show="embed" xlink:actuate="onLoad"/><draw:image xlink:href="./ObjectReplacements/Object 18" xlink:type="simple" xlink:show="embed" xlink:actuate="onLoad"/></draw:frame></text:p>
      <text:p text:style-name="P19">d. <draw:frame draw:style-name="fr6" draw:name="Objet19" text:anchor-type="as-char" svg:y="-0.891cm" svg:width="1.981cm" svg:height="1.54cm" draw:z-index="22"><draw:object xlink:href="./Object 19" xlink:type="simple" xlink:show="embed" xlink:actuate="onLoad"/><draw:image xlink:href="./ObjectReplacements/Object 19" xlink:type="simple" xlink:show="embed" xlink:actuate="onLoad"/></draw:frame><text:s text:c="8"/>e. <draw:frame draw:style-name="fr6" draw:name="Objet20" text:anchor-type="as-char" svg:y="-0.891cm" svg:width="1.986cm" svg:height="1.54cm" draw:z-index="23"><draw:object xlink:href="./Object 20" xlink:type="simple" xlink:show="embed" xlink:actuate="onLoad"/><draw:image xlink:href="./ObjectReplacements/Object 20" xlink:type="simple" xlink:show="embed" xlink:actuate="onLoad"/></draw:frame><text:s text:c="7"/>f. <draw:frame draw:style-name="fr6" draw:name="Objet21" text:anchor-type="as-char" svg:y="-0.891cm" svg:width="2.118cm" svg:height="1.54cm" draw:z-index="24"><draw:object xlink:href="./Object 21" xlink:type="simple" xlink:show="embed" xlink:actuate="onLoad"/><draw:image xlink:href="./ObjectReplacements/Object 21" xlink:type="simple" xlink:show="embed" xlink:actuate="onLoad"/></draw:frame></text:p>
      <text:p text:style-name="P19"/>
      <text:p text:style-name="P26">Exercice 12 :</text:p>
      <text:p text:style-name="P20">Calcule <text:span text:style-name="T4">x</text:span><text:span text:style-name="T5"> dans chacun des cas suivants.</text:span></text:p>
      <text:p text:style-name="P20"><text:span text:style-name="T5"/></text:p>
      <text:p text:style-name="P20"><text:span text:style-name="T5">a. </text:span><text:span text:style-name="T5"><draw:frame draw:style-name="fr6" draw:name="Objet22" text:anchor-type="as-char" svg:y="-0.891cm" svg:width="2.058cm" svg:height="1.54cm" draw:z-index="25"><draw:object xlink:href="./Object 22" xlink:type="simple" xlink:show="embed" xlink:actuate="onLoad"/><draw:image xlink:href="./ObjectReplacements/Object 22" xlink:type="simple" xlink:show="embed" xlink:actuate="onLoad"/></draw:frame></text:span><text:span text:style-name="T5"><text:s text:c="7"/>b. </text:span><text:span text:style-name="T5"><draw:frame draw:style-name="fr6" draw:name="Objet23" text:anchor-type="as-char" svg:y="-0.891cm" svg:width="2.113cm" svg:height="1.54cm" draw:z-index="26"><draw:object xlink:href="./Object 23" xlink:type="simple" xlink:show="embed" xlink:actuate="onLoad"/><draw:image xlink:href="./ObjectReplacements/Object 23" xlink:type="simple" xlink:show="embed" xlink:actuate="onLoad"/></draw:frame></text:span><text:span text:style-name="T5"><text:s text:c="5"/>c. </text:span><text:span text:style-name="T5"><draw:frame draw:style-name="fr6" draw:name="Objet24" text:anchor-type="as-char" svg:y="-0.891cm" svg:width="1.907cm" svg:height="1.54cm" draw:z-index="27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0"><text:span text:style-name="T5"/></text:p>
      <text:p text:style-name="P27"><text:span text:style-name="T5">Exercice 13 :</text:span></text:p>
      <text:p text:style-name="P20"><draw:frame draw:style-name="fr4" draw:name="Image4" text:anchor-type="paragraph" svg:width="9.551cm" svg:height="4.657cm" draw:z-index="28"><draw:image xlink:href="Pictures/1000020100000169000000B038AE191BCA9C4780.png" xlink:type="simple" xlink:show="embed" xlink:actuate="onLoad" loext:mime-type="image/png"/></draw:frame><text:span text:style-name="T5"/></text:p>
      <text:p text:style-name="P18"><text:s/></text:p>
      <text:p text:style-name="P18"/>
      <text:p text:style-name="P18"/>
      <text:p text:style-name="P18"/>
      <text:p text:style-name="P18"/>
      <text:p text:style-name="P18"/>
      <text:p text:style-name="P20">a. Exprime le cosinus de l’angle <draw:frame draw:style-name="fr5" draw:name="Objet25" text:anchor-type="as-char" svg:y="-0.527cm" svg:width="0.914cm" svg:height="0.739cm" draw:z-index="29"><draw:object xlink:href="./Object 25" xlink:type="simple" xlink:show="embed" xlink:actuate="onLoad"/><draw:image xlink:href="./ObjectReplacements/Object 25" xlink:type="simple" xlink:show="embed" xlink:actuate="onLoad"/><svg:desc>OLI</svg:desc></draw:frame><text:s/>en fonction des longueurs des côtés du triangle.</text:p>
      <text:p text:style-name="P20">b. Quelle longueur peux-tu calculer à l’aide de ce cosinus ? Calcule l’arrondi au dixième de cette longueur.</text:p>
      <text:p text:style-name="P20">c. Exprime le sinus de l’angle <draw:frame draw:style-name="fr5" draw:name="Objet26" text:anchor-type="as-char" svg:y="-0.527cm" svg:width="0.914cm" svg:height="0.739cm" draw:z-index="30"><draw:object xlink:href="./Object 26" xlink:type="simple" xlink:show="embed" xlink:actuate="onLoad"/><draw:image xlink:href="./ObjectReplacements/Object 26" xlink:type="simple" xlink:show="embed" xlink:actuate="onLoad"/><svg:desc>OLI</svg:desc></draw:frame><text:s/>en fonction des longueurs des côtés du triangle.</text:p>
      <text:p text:style-name="P20">d. Quelle longueur peux-tu calculer à l’aide de ce sinus ? Calcule l’arrondi au dixième de cette longueur.</text:p>
      <text:p text:style-name="P20"/>
      <text:p text:style-name="P27">Exercice 14 :</text:p>
      <text:p text:style-name="P20">Dans chaque cas, calcule la valeur arrondie au dixième de la longueur SO.</text:p>
      <text:p text:style-name="P27"><draw:frame draw:style-name="fr3" draw:name="Image5" text:anchor-type="paragraph" svg:width="17cm" svg:height="8.301cm" draw:z-index="31"><draw:image xlink:href="Pictures/10000201000002D9000001640D5D3BB9437E9EF2.png" xlink:type="simple" xlink:show="embed" xlink:actuate="onLoad" loext:mime-type="image/png"/></draw:frame><text:soft-page-break/>Exercice 15 :</text:p>
      <text:p text:style-name="P20">RAT est un triangle rectangle en T tel que <draw:frame draw:style-name="fr5" draw:name="Objet27" text:anchor-type="as-char" svg:y="-0.527cm" svg:width="2.254cm" svg:height="0.739cm" draw:z-index="32"><draw:object xlink:href="./Object 27" xlink:type="simple" xlink:show="embed" xlink:actuate="onLoad"/><draw:image xlink:href="./ObjectReplacements/Object 27" xlink:type="simple" xlink:show="embed" xlink:actuate="onLoad"/><svg:desc>RAT</svg:desc></draw:frame><text:s/>et <draw:frame draw:style-name="fr6" draw:name="Objet28" text:anchor-type="as-char" svg:y="-0.527cm" svg:width="2.604cm" svg:height="0.739cm" draw:z-index="33"><draw:object xlink:href="./Object 28" xlink:type="simple" xlink:show="embed" xlink:actuate="onLoad"/><draw:image xlink:href="./ObjectReplacements/Object 28" xlink:type="simple" xlink:show="embed" xlink:actuate="onLoad"/></draw:frame>. Calcule les arrondis au dixième des longueurs TA et RA.</text:p>
      <text:p text:style-name="P20"/>
      <text:p text:style-name="P28">Exercice 16 :</text:p>
      <text:p text:style-name="P21">Soit RDS un triangle rectangle en S.</text:p>
      <text:p text:style-name="P21"><draw:frame draw:style-name="fr4" draw:name="Image7" text:anchor-type="paragraph" svg:width="11.643cm" svg:height="6.879cm" draw:z-index="34"><draw:image xlink:href="Pictures/10000201000001B8000001049914384AF764A6F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a. Exprime le sinus de l’angle <draw:frame draw:style-name="fr5" draw:name="Objet29" text:anchor-type="as-char" svg:y="-0.527cm" svg:width="1.101cm" svg:height="0.739cm" draw:z-index="35"><draw:object xlink:href="./Object 29" xlink:type="simple" xlink:show="embed" xlink:actuate="onLoad"/><draw:image xlink:href="./ObjectReplacements/Object 29" xlink:type="simple" xlink:show="embed" xlink:actuate="onLoad"/><svg:desc>DRS</svg:desc></draw:frame><text:s/>en fonction des longueurs des côtés du triangle. </text:p>
      <text:p text:style-name="P21">b. Déduis-en la mesure arrondie au degré de l’angle <draw:frame draw:style-name="fr5" draw:name="Objet30" text:anchor-type="as-char" svg:y="-0.527cm" svg:width="1.101cm" svg:height="0.739cm" draw:z-index="36"><draw:object xlink:href="./Object 30" xlink:type="simple" xlink:show="embed" xlink:actuate="onLoad"/><draw:image xlink:href="./ObjectReplacements/Object 30" xlink:type="simple" xlink:show="embed" xlink:actuate="onLoad"/><svg:desc>DRS</svg:desc></draw:frame>.</text:p>
      <text:p text:style-name="P21"/>
      <text:p text:style-name="P28">Exercice 17 :</text:p>
      <text:p text:style-name="P21">Dans chaque cas, calcule la mesure de l’angle <draw:frame draw:style-name="fr5" draw:name="Objet31" text:anchor-type="as-char" svg:y="-0.527cm" svg:width="1.199cm" svg:height="0.739cm" draw:z-index="37"><draw:object xlink:href="./Object 31" xlink:type="simple" xlink:show="embed" xlink:actuate="onLoad"/><draw:image xlink:href="./ObjectReplacements/Object 31" xlink:type="simple" xlink:show="embed" xlink:actuate="onLoad"/><svg:desc>MNO</svg:desc></draw:frame> ; donne la valeur arrondie au degré.</text:p>
      <text:p text:style-name="P29"><draw:frame draw:style-name="fr2" draw:name="Image8" text:anchor-type="paragraph" svg:width="17cm" svg:height="13.317cm" draw:z-index="38"><draw:image xlink:href="Pictures/10000201000002C70000022D702E4EF63C187134.png" xlink:type="simple" xlink:show="embed" xlink:actuate="onLoad" loext:mime-type="image/png"/></draw:frame><text:soft-page-break/>Exercice 18 :<text:span text:style-name="T1"> Brevet</text:span></text:p>
      <text:p text:style-name="P29"><text:span text:style-name="T1">Un câble de 20m de long est tendu entre le sommet d’un poteau vertical et le sol horizontal. Il forme un angle de 40° avec le sol.</text:span></text:p>
      <text:p text:style-name="P29"><draw:frame draw:style-name="fr4" draw:name="Image9" text:anchor-type="paragraph" svg:width="13.178cm" svg:height="6.033cm" draw:z-index="39"><draw:image xlink:href="Pictures/10000201000001F2000000E4BF5C1560ED75C1E8.png" xlink:type="simple" xlink:show="embed" xlink:actuate="onLoad" loext:mime-type="image/png"/></draw:frame><text:span text:style-name="T1">a. Calculer la hauteur du poteau ; donner la valeur approchée au dixième près par défaut.</text:span></text:p>
      <text:p text:style-name="P29"><text:span text:style-name="T1">b. Représenter la situation par une figure à l’échelle 1/200. (Les données de la situation doivent être placées sur la figure).</text:span></text:p>
      <text:p text:style-name="P29"><text:span text:style-name="T1"/></text:p>
      <text:p text:style-name="P29"><text:soft-page-break/>Exercice 19 :</text:p>
      <text:p text:style-name="P22">Lorsqu’un voilier est face au vent, il ne peut pas avancer. Si la destination choisie nécessite de prendre une direction face au vent, le voilier devra progresser en faisant des zigzags.</text:p>
      <text:p text:style-name="P22">1) Comparer les trajectoires de ces deux voiliers en calculant la distance, en kilomètres et arrondie au mètre, que chacun a parcourue.</text:p>
      <text:p text:style-name="P23"><draw:frame draw:style-name="fr4" draw:name="Image10" text:anchor-type="paragraph" svg:width="15.321cm" svg:height="14.527cm" draw:z-index="40"><draw:image xlink:href="Pictures/1000020100000243000002257BCCAD0E22FF7A2A.png" xlink:type="simple" xlink:show="embed" xlink:actuate="onLoad" loext:mime-type="image/png"/></draw:frame>Le voilier 1 part de C passe par D et il arrive en A.</text:p>
      <text:p text:style-name="P23">Le voilier 2 part de C passe par B et il arrive en A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5T15:17:20.704000000</meta:creation-date>
    <dc:date>2021-12-05T17:44:30.593000000</dc:date>
    <meta:editing-duration>PT1M5S</meta:editing-duration>
    <meta:editing-cycles>1</meta:editing-cycles>
    <meta:document-statistic meta:table-count="2" meta:image-count="10" meta:object-count="31" meta:page-count="8" meta:paragraph-count="118" meta:word-count="920" meta:character-count="4746" meta:non-whitespace-character-count="3781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over accent="true">
      <mtext>ACB</mtext>
      <mo stretchy="true">^</mo>
    </mover>
    <annotation encoding="StarMath 5.0"> widehat {"ACB"}</annotation>
  </semantics>
</math>
</file>

<file path=Object 10/content.xml><?xml version="1.0" encoding="utf-8"?>
<math xmlns="http://www.w3.org/1998/Math/MathML" display="block">
  <semantics>
    <mfrac>
      <mi mathvariant="italic">MO</mi>
      <mi mathvariant="italic">OI</mi>
    </mfrac>
    <annotation encoding="StarMath 5.0">MO over OI</annotation>
  </semantics>
</math>
</file>

<file path=Object 11/content.xml><?xml version="1.0" encoding="utf-8"?>
<math xmlns="http://www.w3.org/1998/Math/MathML" display="block">
  <semantics>
    <mfrac>
      <mi mathvariant="italic">MO</mi>
      <mi mathvariant="italic">MI</mi>
    </mfrac>
    <annotation encoding="StarMath 5.0">MO over MI</annotation>
  </semantics>
</math>
</file>

<file path=Object 12/content.xml><?xml version="1.0" encoding="utf-8"?>
<math xmlns="http://www.w3.org/1998/Math/MathML" display="block">
  <semantics>
    <mrow>
      <mi>sin</mi>
      <mn>75</mn>
      <mi>°</mi>
    </mrow>
    <annotation encoding="StarMath 5.0">sin 75°</annotation>
  </semantics>
</math>
</file>

<file path=Object 13/content.xml><?xml version="1.0" encoding="utf-8"?>
<math xmlns="http://www.w3.org/1998/Math/MathML" display="block">
  <semantics>
    <mrow>
      <mi>cos</mi>
      <mn>26</mn>
      <mi>°</mi>
    </mrow>
    <annotation encoding="StarMath 5.0">cos 26°</annotation>
  </semantics>
</math>
</file>

<file path=Object 14/content.xml><?xml version="1.0" encoding="utf-8"?>
<math xmlns="http://www.w3.org/1998/Math/MathML" display="block">
  <semantics>
    <mrow>
      <mi>tan</mi>
      <mn>83</mn>
      <mi>°</mi>
    </mrow>
    <annotation encoding="StarMath 5.0">tan 83°</annotation>
  </semantics>
</math>
</file>

<file path=Object 15/content.xml><?xml version="1.0" encoding="utf-8"?>
<math xmlns="http://www.w3.org/1998/Math/MathML" display="block">
  <semantics>
    <mrow>
      <mi>sin</mi>
      <mn>18</mn>
      <mi>°</mi>
    </mrow>
    <annotation encoding="StarMath 5.0">sin 18°</annotation>
  </semantics>
</math>
</file>

<file path=Object 16/content.xml><?xml version="1.0" encoding="utf-8"?>
<math xmlns="http://www.w3.org/1998/Math/MathML" display="block">
  <semantics>
    <mrow>
      <mi>sin</mi>
      <mrow>
        <mi>x</mi>
        <mo stretchy="false">=</mo>
        <mn>0</mn>
      </mrow>
      <mn>,24</mn>
    </mrow>
    <annotation encoding="StarMath 5.0">sin x = 0,24</annotation>
  </semantics>
</math>
</file>

<file path=Object 17/content.xml><?xml version="1.0" encoding="utf-8"?>
<math xmlns="http://www.w3.org/1998/Math/MathML" display="block">
  <semantics>
    <mrow>
      <mi>tan</mi>
      <mrow>
        <mi>x</mi>
        <mo stretchy="false">=</mo>
        <mn>52</mn>
      </mrow>
    </mrow>
    <annotation encoding="StarMath 5.0">tan x = 52</annotation>
  </semantics>
</math>
</file>

<file path=Object 18/content.xml><?xml version="1.0" encoding="utf-8"?>
<math xmlns="http://www.w3.org/1998/Math/MathML" display="block">
  <semantics>
    <mrow>
      <mi>cos</mi>
      <mrow>
        <mi>x</mi>
        <mo stretchy="false">=</mo>
        <mn>0</mn>
      </mrow>
      <mn>,75</mn>
    </mrow>
    <annotation encoding="StarMath 5.0">cos x = 0,75</annotation>
  </semantics>
</math>
</file>

<file path=Object 19/content.xml><?xml version="1.0" encoding="utf-8"?>
<math xmlns="http://www.w3.org/1998/Math/MathML" display="block">
  <semantics>
    <mrow>
      <mi>tan</mi>
      <mrow>
        <mi>x</mi>
        <mo stretchy="false">=</mo>
        <mfrac>
          <mn>7</mn>
          <mn>2</mn>
        </mfrac>
      </mrow>
    </mrow>
    <annotation encoding="StarMath 5.0">tan x = 7 over 2</annotation>
  </semantics>
</math>
</file>

<file path=Object 2/content.xml><?xml version="1.0" encoding="utf-8"?>
<math xmlns="http://www.w3.org/1998/Math/MathML" display="block">
  <semantics>
    <mover accent="true">
      <mtext>ACB</mtext>
      <mo stretchy="true">^</mo>
    </mover>
    <annotation encoding="StarMath 5.0"> widehat {"ACB"}</annotation>
  </semantics>
</math>
</file>

<file path=Object 20/content.xml><?xml version="1.0" encoding="utf-8"?>
<math xmlns="http://www.w3.org/1998/Math/MathML" display="block">
  <semantics>
    <mrow>
      <mi>cos</mi>
      <mrow>
        <mi>x</mi>
        <mo stretchy="false">=</mo>
        <mfrac>
          <mn>2</mn>
          <mn>3</mn>
        </mfrac>
      </mrow>
    </mrow>
    <annotation encoding="StarMath 5.0">cos x = 2 over 3</annotation>
  </semantics>
</math>
</file>

<file path=Object 21/content.xml><?xml version="1.0" encoding="utf-8"?>
<math xmlns="http://www.w3.org/1998/Math/MathML" display="block">
  <semantics>
    <mrow>
      <mi>sin</mi>
      <mrow>
        <mi>x</mi>
        <mo stretchy="false">=</mo>
        <mfrac>
          <mn>9</mn>
          <mn>10</mn>
        </mfrac>
      </mrow>
    </mrow>
    <annotation encoding="StarMath 5.0">sin x = 9 over 10</annotation>
  </semantics>
</math>
</file>

<file path=Object 22/content.xml><?xml version="1.0" encoding="utf-8"?>
<math xmlns="http://www.w3.org/1998/Math/MathML" display="block">
  <semantics>
    <mrow>
      <mrow>
        <mfrac>
          <mi>x</mi>
          <mrow>
            <mn>5</mn>
            <mn>,5</mn>
          </mrow>
        </mfrac>
        <mo stretchy="false">=</mo>
        <mn>0</mn>
      </mrow>
      <mn>,6</mn>
    </mrow>
    <annotation encoding="StarMath 5.0">x over { 5,5 } = 0,6</annotation>
  </semantics>
</math>
</file>

<file path=Object 23/content.xml><?xml version="1.0" encoding="utf-8"?>
<math xmlns="http://www.w3.org/1998/Math/MathML" display="block">
  <semantics>
    <mrow>
      <mrow>
        <mfrac>
          <mn>13</mn>
          <mi>x</mi>
        </mfrac>
        <mo stretchy="false">=</mo>
        <mn>0</mn>
      </mrow>
      <mn>,25</mn>
    </mrow>
    <annotation encoding="StarMath 5.0">13 over x = 0,25</annotation>
  </semantics>
</math>
</file>

<file path=Object 24/content.xml><?xml version="1.0" encoding="utf-8"?>
<math xmlns="http://www.w3.org/1998/Math/MathML" display="block">
  <semantics>
    <mrow>
      <mn>0</mn>
      <mrow>
        <mn>,8</mn>
        <mo stretchy="false">=</mo>
        <mfrac>
          <mn>36</mn>
          <mi>x</mi>
        </mfrac>
      </mrow>
    </mrow>
    <annotation encoding="StarMath 5.0">0,8 = 36 over x</annotation>
  </semantics>
</math>
</file>

<file path=Object 25/content.xml><?xml version="1.0" encoding="utf-8"?>
<math xmlns="http://www.w3.org/1998/Math/MathML" display="block">
  <semantics>
    <mover accent="true">
      <mtext>OLI</mtext>
      <mo stretchy="true">^</mo>
    </mover>
    <annotation encoding="StarMath 5.0"> widehat {"OLI"}</annotation>
  </semantics>
</math>
</file>

<file path=Object 26/content.xml><?xml version="1.0" encoding="utf-8"?>
<math xmlns="http://www.w3.org/1998/Math/MathML" display="block">
  <semantics>
    <mover accent="true">
      <mtext>OLI</mtext>
      <mo stretchy="true">^</mo>
    </mover>
    <annotation encoding="StarMath 5.0"> widehat {"OLI"}</annotation>
  </semantics>
</math>
</file>

<file path=Object 27/content.xml><?xml version="1.0" encoding="utf-8"?>
<math xmlns="http://www.w3.org/1998/Math/MathML" display="block">
  <semantics>
    <mrow>
      <mrow>
        <mover accent="true">
          <mtext>RAT</mtext>
          <mo stretchy="true">^</mo>
        </mover>
        <mo stretchy="false">=</mo>
        <mn>56</mn>
      </mrow>
      <mi>°</mi>
    </mrow>
    <annotation encoding="StarMath 5.0"> widehat {"RAT"}= 56°</annotation>
  </semantics>
</math>
</file>

<file path=Object 28/content.xml><?xml version="1.0" encoding="utf-8"?>
<math xmlns="http://www.w3.org/1998/Math/MathML" display="block">
  <semantics>
    <mrow>
      <mrow>
        <mi mathvariant="italic">RT</mi>
        <mo stretchy="false">=</mo>
        <mn>2</mn>
      </mrow>
      <mn>,7</mn>
      <mi mathvariant="italic">cm</mi>
    </mrow>
    <annotation encoding="StarMath 5.0">RT = 2,7 cm</annotation>
  </semantics>
</math>
</file>

<file path=Object 29/content.xml><?xml version="1.0" encoding="utf-8"?>
<math xmlns="http://www.w3.org/1998/Math/MathML" display="block">
  <semantics>
    <mover accent="true">
      <mtext>DRS</mtext>
      <mo stretchy="true">^</mo>
    </mover>
    <annotation encoding="StarMath 5.0"> widehat {"DRS"}</annotation>
  </semantics>
</math>
</file>

<file path=Object 3/content.xml><?xml version="1.0" encoding="utf-8"?>
<math xmlns="http://www.w3.org/1998/Math/MathML" display="block">
  <semantics>
    <mover accent="true">
      <mtext>ABC</mtext>
      <mo stretchy="true">^</mo>
    </mover>
    <annotation encoding="StarMath 5.0"> widehat {"ABC"}</annotation>
  </semantics>
</math>
</file>

<file path=Object 30/content.xml><?xml version="1.0" encoding="utf-8"?>
<math xmlns="http://www.w3.org/1998/Math/MathML" display="block">
  <semantics>
    <mover accent="true">
      <mtext>DRS</mtext>
      <mo stretchy="true">^</mo>
    </mover>
    <annotation encoding="StarMath 5.0"> widehat {"DRS"}</annotation>
  </semantics>
</math>
</file>

<file path=Object 31/content.xml><?xml version="1.0" encoding="utf-8"?>
<math xmlns="http://www.w3.org/1998/Math/MathML" display="block">
  <semantics>
    <mover accent="true">
      <mtext>MNO</mtext>
      <mo stretchy="true">^</mo>
    </mover>
    <annotation encoding="StarMath 5.0"> widehat {"MNO"}</annotation>
  </semantics>
</math>
</file>

<file path=Object 4/content.xml><?xml version="1.0" encoding="utf-8"?>
<math xmlns="http://www.w3.org/1998/Math/MathML" display="block">
  <semantics>
    <mover accent="true">
      <mtext>ACB</mtext>
      <mo stretchy="true">^</mo>
    </mover>
    <annotation encoding="StarMath 5.0"> widehat {"ACB"}</annotation>
  </semantics>
</math>
</file>

<file path=Object 5/content.xml><?xml version="1.0" encoding="utf-8"?>
<math xmlns="http://www.w3.org/1998/Math/MathML" display="block">
  <semantics>
    <mover accent="true">
      <mtext>ACB</mtext>
      <mo stretchy="true">^</mo>
    </mover>
    <annotation encoding="StarMath 5.0"> widehat {"ACB"}</annotation>
  </semantics>
</math>
</file>

<file path=Object 6/content.xml><?xml version="1.0" encoding="utf-8"?>
<math xmlns="http://www.w3.org/1998/Math/MathML" display="block">
  <semantics>
    <mover accent="true">
      <mtext>CAB</mtext>
      <mo stretchy="true">^</mo>
    </mover>
    <annotation encoding="StarMath 5.0"> widehat {"CAB"}</annotation>
  </semantics>
</math>
</file>

<file path=Object 7/content.xml><?xml version="1.0" encoding="utf-8"?>
<math xmlns="http://www.w3.org/1998/Math/MathML" display="block">
  <semantics>
    <mover accent="true">
      <mtext>CAB</mtext>
      <mo stretchy="true">^</mo>
    </mover>
    <annotation encoding="StarMath 5.0"> widehat {"CAB"}</annotation>
  </semantics>
</math>
</file>

<file path=Object 8/content.xml><?xml version="1.0" encoding="utf-8"?>
<math xmlns="http://www.w3.org/1998/Math/MathML" display="block">
  <semantics>
    <mfrac>
      <mi mathvariant="italic">OI</mi>
      <mi mathvariant="italic">MI</mi>
    </mfrac>
    <annotation encoding="StarMath 5.0">OI over MI</annotation>
  </semantics>
</math>
</file>

<file path=Object 9/content.xml><?xml version="1.0" encoding="utf-8"?>
<math xmlns="http://www.w3.org/1998/Math/MathML" display="block">
  <semantics>
    <mfrac>
      <mi mathvariant="italic">OI</mi>
      <mi mathvariant="italic">MO</mi>
    </mfrac>
    <annotation encoding="StarMath 5.0">OI over MO</annotation>
  </semantics>
</math>
</file>