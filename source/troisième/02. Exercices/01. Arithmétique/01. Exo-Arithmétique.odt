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996cm" style:rel-column-width="5100*"/>
    </style:style>
    <style:style style:name="Tableau2.B" style:family="table-column">
      <style:table-column-properties style:column-width="1.998cm" style:rel-column-width="1133*"/>
    </style:style>
    <style:style style:name="Tableau2.C" style:family="table-column">
      <style:table-column-properties style:column-width="2cm" style:rel-column-width="1134*"/>
    </style:style>
    <style:style style:name="Tableau2.E" style:family="table-column">
      <style:table-column-properties style:column-width="2.007cm" style:rel-column-width="113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 style:text-underline-style="solid" style:text-underline-width="auto" style:text-underline-color="font-color" officeooo:rsid="0015ef53" officeooo:paragraph-rsid="0015ef53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6cb2a" officeooo:paragraph-rsid="0016cb2a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79b5f" officeooo:paragraph-rsid="00179b5f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828f4" officeooo:paragraph-rsid="001828f4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a14fd" officeooo:paragraph-rsid="001a14fd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a297b" officeooo:paragraph-rsid="001a297b"/>
    </style:style>
    <style:style style:name="P7" style:family="paragraph" style:parent-style-name="Standard">
      <style:text-properties style:font-name="OpenDyslexic" style:text-underline-style="none" officeooo:rsid="0015ef53" officeooo:paragraph-rsid="0015ef53"/>
    </style:style>
    <style:style style:name="P8" style:family="paragraph" style:parent-style-name="Standard">
      <style:text-properties style:font-name="OpenDyslexic" style:text-underline-style="none" officeooo:rsid="0016cb2a" officeooo:paragraph-rsid="0016cb2a"/>
    </style:style>
    <style:style style:name="P9" style:family="paragraph" style:parent-style-name="Standard">
      <style:text-properties style:font-name="OpenDyslexic" style:text-underline-style="none" officeooo:rsid="00179b5f" officeooo:paragraph-rsid="00179b5f"/>
    </style:style>
    <style:style style:name="P10" style:family="paragraph" style:parent-style-name="Standard">
      <style:text-properties style:font-name="OpenDyslexic" style:text-underline-style="none" officeooo:rsid="001828f4" officeooo:paragraph-rsid="001828f4"/>
    </style:style>
    <style:style style:name="P11" style:family="paragraph" style:parent-style-name="Standard">
      <style:text-properties style:font-name="OpenDyslexic" style:text-underline-style="none" officeooo:rsid="001a14fd" officeooo:paragraph-rsid="001a14fd"/>
    </style:style>
    <style:style style:name="P12" style:family="paragraph" style:parent-style-name="Standard">
      <style:text-properties style:font-name="OpenDyslexic" style:text-underline-style="none" officeooo:rsid="001a297b" officeooo:paragraph-rsid="001a297b"/>
    </style:style>
    <style:style style:name="P13" style:family="paragraph" style:parent-style-name="Table_20_Contents">
      <style:text-properties style:font-name="OpenDyslexic"/>
    </style:style>
    <style:style style:name="P14" style:family="paragraph" style:parent-style-name="Table_20_Contents">
      <style:text-properties style:font-name="OpenDyslexic" officeooo:rsid="0015ef53" officeooo:paragraph-rsid="0015ef53"/>
    </style:style>
    <style:style style:name="P15" style:family="paragraph" style:parent-style-name="Table_20_Contents">
      <style:paragraph-properties fo:text-align="center" style:justify-single-word="false"/>
      <style:text-properties style:font-name="OpenDyslexic"/>
    </style:style>
    <style:style style:name="P16" style:family="paragraph" style:parent-style-name="Table_20_Contents">
      <style:paragraph-properties fo:text-align="center" style:justify-single-word="false"/>
      <style:text-properties style:font-name="OpenDyslexic" officeooo:rsid="001a297b" officeooo:paragraph-rsid="001a297b"/>
    </style:style>
    <style:style style:name="P17" style:family="paragraph" style:parent-style-name="Table_20_Contents">
      <style:text-properties style:font-name="OpenDyslexic" officeooo:rsid="001a297b" officeooo:paragraph-rsid="001a297b"/>
    </style:style>
    <style:style style:name="T1" style:family="text">
      <style:text-properties officeooo:rsid="0016cb2a"/>
    </style:style>
    <style:style style:name="T2" style:family="text">
      <style:text-properties officeooo:rsid="001a14fd"/>
    </style:style>
    <style:style style:name="T3" style:family="text">
      <style:text-properties style:text-underline-style="non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ollège A.Lejeune <text:s text:c="65"/>3ème</text:p>
            <text:p text:style-name="P14">Exercices <text:s text:c="19"/>Chapitre 1 : Les nombres entiers</text:p>
          </table:table-cell>
        </table:table-row>
      </table:table>
      <text:p text:style-name="Standard"/>
      <text:p text:style-name="Standard"/>
      <text:p text:style-name="P1">Activité :</text:p>
      <text:p text:style-name="P7">On considère deux divisions : <text:s/><draw:frame draw:style-name="fr1" draw:name="Objet1" text:anchor-type="as-char" svg:y="-0.527cm" svg:width="1.85cm" svg:height="0.739cm" draw:z-index="0"><draw:object xlink:href="./Object 1" xlink:type="simple" xlink:show="embed" xlink:actuate="onLoad"/><draw:image xlink:href="./ObjectReplacements/Object 1" xlink:type="simple" xlink:show="embed" xlink:actuate="onLoad"/></draw:frame><text:s/>et <draw:frame draw:style-name="fr1" draw:name="Objet2" text:anchor-type="as-char" svg:y="-0.527cm" svg:width="1.884cm" svg:height="0.7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1. On considère la division euclidienne de 263 par 17.</text:p>
      <text:p text:style-name="P7">a) Dans cette division, comment s’appelle le nombre 263 ? le nombre 17 ?</text:p>
      <text:p text:style-name="P7">b) Quel est le quotient de cette division ?</text:p>
      <text:p text:style-name="P7">Quel est son reste ?</text:p>
      <text:p text:style-name="P7">c) Comment trouve-<text:span text:style-name="T1">t-on le nombre 263 à l’aide des nombres 17;8 et 15 ?</text:span></text:p>
      <text:p text:style-name="P7"/>
      <text:p text:style-name="P8">2. On considère la division euclidienne de 442 par 17.</text:p>
      <text:p text:style-name="P8">a) Comment trouve-t-on le nombre 442 à l’aide des nombres 17 et 26 ?</text:p>
      <text:p text:style-name="P8">b) Que peut-on dire du nombre 442 par rapport au nombre 17 ?</text:p>
      <text:p text:style-name="P8">c) Que peut-on dire du nombre 17 par rapport au nombre 442 ?</text:p>
      <text:p text:style-name="P8"/>
      <text:p text:style-name="P2">Exercice 1 :</text:p>
      <text:p text:style-name="P8">Dans chaque cas, donner le quotient et le reste de la division euclidienne de :</text:p>
      <text:p text:style-name="P8">a) 45 par 7 ; <text:s text:c="12"/>b) 58 par 9 ; <text:s text:c="8"/>c) 60 par 12 ;</text:p>
      <text:p text:style-name="P8"/>
      <text:p text:style-name="P2">Exercice 2 :</text:p>
      <text:p text:style-name="P8">63 – 125 – 78 – 504 – 210 – 1455 – 954 .</text:p>
      <text:p text:style-name="P8">Parmi les nombres de la liste ci-dessus, quels sont ceux qui sont divisibles :</text:p>
      <text:p text:style-name="P8">a) par 2 ? <text:s text:c="6"/>b) par 3 ? <text:s text:c="9"/>c) par 5 ? <text:s text:c="6"/>d) par 9 ?</text:p>
      <text:p text:style-name="P8"/>
      <text:p text:style-name="P2">Exercice 3 :</text:p>
      <text:p text:style-name="P8">Compléter, si possible, chaque phrase par « multiple » ou « diviseur ».</text:p>
      <text:p text:style-name="P8">a) 55 est un …. de 5. <text:s text:c="5"/>b) 12 est un …. de 120.</text:p>
      <text:p text:style-name="P8">c) 199 est un …. de 9. <text:s text:c="3"/>d) 77 est un …. de 11.</text:p>
      <text:p text:style-name="P8">e) 25 est un …. de 125. <text:s text:c="2"/>f) 7 est un …. de 48.</text:p>
      <text:p text:style-name="P8">g) 13 est un …. de 13.</text:p>
      <text:p text:style-name="P8"/>
      <text:p text:style-name="P2"><text:soft-page-break/>Exercice 4 :</text:p>
      <text:p text:style-name="P9">Trouver tous les diviseurs de chaque nombre.</text:p>
      <text:p text:style-name="P9">a) 14 ; <text:s/>b) 20 ; <text:s/>c) 11 ; <text:s/>d) 21 ; e) 49.</text:p>
      <text:p text:style-name="P9"/>
      <text:p text:style-name="P3">Exercice 5 :</text:p>
      <text:p text:style-name="P9">Écrire la liste des diviseurs de chacun des deux nombres, puis déterminer leur PGCD.</text:p>
      <text:p text:style-name="P9">a) 15 et 24 ; <text:s/>b) 12 et 56 ; <text:s text:c="2"/>c) 40 et 75.</text:p>
      <text:p text:style-name="P9"/>
      <text:p text:style-name="P3">Exercice 6 :</text:p>
      <text:p text:style-name="P9">1) Écrire la liste des diviseurs de chacun des nombres suivants :</text:p>
      <text:p text:style-name="P9">a) 100 ; <text:s text:c="2"/>b) 32 ; <text:s text:c="3"/>c) 55 ; <text:s text:c="3"/>d) 13.</text:p>
      <text:p text:style-name="P9"/>
      <text:p text:style-name="P9">2) Dans chaque cas, donner le PGCD des nombres.</text:p>
      <text:p text:style-name="P9">a) 100 et 32 ; <text:s text:c="4"/>b) 100 et 55 ; <text:s text:c="3"/>c) 13 et 32.</text:p>
      <text:p text:style-name="P9"/>
      <text:p text:style-name="P3">Exercice 7 :</text:p>
      <text:p text:style-name="P9">Pour la fête des mères, une fleuriste prépare des bouquets identiques composés de roses et de pivoines.</text:p>
      <text:p text:style-name="P9">Elle dispose de 64 pivoines et de 160 roses.</text:p>
      <text:p text:style-name="P9">1) Toutes les fleurs seront-elles utilisées si la fleuriste décide de composer :</text:p>
      <text:p text:style-name="P9">a) 40 bouquets ? <text:s text:c="11"/>b) 16 bouquets ?</text:p>
      <text:p text:style-name="P9">2) Finalement, la fleuriste décide de composer 32 bouquets identiques.</text:p>
      <text:p text:style-name="P9">a) Justifier qu’il ne lui restera aucune fleur.</text:p>
      <text:p text:style-name="P9">b) Combien de pivoines et combien de roses chaque bouquet comportera-t-il ?</text:p>
      <text:p text:style-name="P9"/>
      <text:p text:style-name="P4">Exercice 8 :</text:p>
      <text:p text:style-name="P10">Déterminer le PGCD des deux nombres proposés à l’aide de l’algorithme des soustractions successives.</text:p>
      <text:p text:style-name="P10">a) 451 et 187 ; <text:s text:c="9"/>b) 156 et 29 ; <text:s text:c="3"/>c) 378 et 140 ; <text:s/>d) 189 et 105 ;</text:p>
      <text:p text:style-name="P10">e) 665 et 315 ; <text:s text:c="9"/>f) 3 160 et 632 ;</text:p>
      <text:p text:style-name="P10"/>
      <text:p text:style-name="P4"><text:soft-page-break/>Exercice 9 :</text:p>
      <text:p text:style-name="P10">Déterminer le PGCD des deux nombres proposés à l’aide de l’algorithme d’Euclide.</text:p>
      <text:p text:style-name="P10">a) <text:span text:style-name="T2">247 et 145 ; <text:s text:c="6"/>b) 651 et 372 ; <text:s text:c="6"/>c) 1 452 et 1 020.</text:span></text:p>
      <text:p text:style-name="P10"/>
      <text:p text:style-name="P5">Exercice 10 :</text:p>
      <text:p text:style-name="P11">Dans chaque cas, justifier que les deux nombres proposés sont premiers entre eux.</text:p>
      <text:p text:style-name="P11">a) 81 et 25 ; <text:s text:c="4"/>b) 49 et 100 ; <text:s text:c="4"/>c) 684 et 199.</text:p>
      <text:p text:style-name="P11"/>
      <text:p text:style-name="P5">Exercice 11 :</text:p>
      <text:p text:style-name="P11">En utilisant les critères de divisibilité, rendre irréductible chacune des fractions suivantes.</text:p>
      <text:p text:style-name="P11">a) <draw:frame draw:style-name="fr1" draw:name="Objet3" text:anchor-type="as-char" svg:y="-0.891cm" svg:width="0.822cm" svg:height="1.54cm" draw:z-index="2"><draw:object xlink:href="./Object 3" xlink:type="simple" xlink:show="embed" xlink:actuate="onLoad"/><draw:image xlink:href="./ObjectReplacements/Object 3" xlink:type="simple" xlink:show="embed" xlink:actuate="onLoad"/></draw:frame><text:s text:c="4"/>b) <draw:frame draw:style-name="fr1" draw:name="Objet4" text:anchor-type="as-char" svg:y="-0.891cm" svg:width="1.101cm" svg:height="1.54cm" draw:z-index="3"><draw:object xlink:href="./Object 4" xlink:type="simple" xlink:show="embed" xlink:actuate="onLoad"/><draw:image xlink:href="./ObjectReplacements/Object 4" xlink:type="simple" xlink:show="embed" xlink:actuate="onLoad"/></draw:frame><text:s text:c="4"/>c) <draw:frame draw:style-name="fr1" draw:name="Objet5" text:anchor-type="as-char" svg:y="-0.891cm" svg:width="1.06cm" svg:height="1.54cm" draw:z-index="4"><draw:object xlink:href="./Object 5" xlink:type="simple" xlink:show="embed" xlink:actuate="onLoad"/><draw:image xlink:href="./ObjectReplacements/Object 5" xlink:type="simple" xlink:show="embed" xlink:actuate="onLoad"/></draw:frame><text:s text:c="3"/>d) <draw:frame draw:style-name="fr1" draw:name="Objet6" text:anchor-type="as-char" svg:y="-0.891cm" svg:width="1.085cm" svg:height="1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5">Exercice 12 :</text:p>
      <text:p text:style-name="P11">1) Justifier, sans calculs, que 850 et 918 ne sont pas premiers entre eux.</text:p>
      <text:p text:style-name="P11">2) a) Déterminer le PGCD de 850 et de 918.</text:p>
      <text:p text:style-name="P11">b) En déduire la fraction irréductible égale à <draw:frame draw:style-name="fr1" draw:name="Objet7" text:anchor-type="as-char" svg:y="-0.891cm" svg:width="1.111cm" svg:height="1.54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11"/>
      <text:p text:style-name="P5">Exercice 13 :<text:span text:style-name="T3"> D’après le brevet</text:span></text:p>
      <text:p text:style-name="P6"><text:span text:style-name="T3">1) a) Reproduire le tableau ci-dessous et compléter chaque case par Oui ou Non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P16">2</text:p>
          </table:table-cell>
          <table:table-cell table:style-name="Tableau2.A1" office:value-type="string">
            <text:p text:style-name="P16">3</text:p>
          </table:table-cell>
          <table:table-cell table:style-name="Tableau2.A1" office:value-type="string">
            <text:p text:style-name="P16">5</text:p>
          </table:table-cell>
          <table:table-cell table:style-name="Tableau2.E1" office:value-type="string">
            <text:p text:style-name="P16">9</text:p>
          </table:table-cell>
        </table:table-row>
        <table:table-row>
          <table:table-cell table:style-name="Tableau2.A2" office:value-type="string">
            <text:p text:style-name="P17">1035 est divisible par ...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17">774 est divisible par ...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17">322 est divisible par...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5"/>
          </table:table-cell>
        </table:table-row>
      </table:table>
      <text:p text:style-name="P6"><text:span text:style-name="T3">b) D’après ce tableau, les fractions </text:span><text:span text:style-name="T3"><draw:frame draw:style-name="fr1" draw:name="Objet8" text:anchor-type="as-char" svg:y="-0.891cm" svg:width="1.328cm" svg:height="1.5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et </text:span><text:span text:style-name="T3"><draw:frame draw:style-name="fr1" draw:name="Objet9" text:anchor-type="as-char" svg:y="-0.891cm" svg:width="1.085cm" svg:height="1.5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sont-elles irréductibles ? Justifier chaque réponse.</text:span></text:p>
      <text:p text:style-name="P6"><text:soft-page-break/><text:span text:style-name="T3">2) a) D’après ce tableau, peut-on dire que la fraction </text:span><text:span text:style-name="T3"><draw:frame draw:style-name="fr1" draw:name="Objet10" text:anchor-type="as-char" svg:y="-0.891cm" svg:width="1.328cm" svg:height="1.54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est irréductible ?</text:span></text:p>
      <text:p text:style-name="P6"><text:span text:style-name="T3">b) Calculer le PGCD de 322 et de 1035.</text:span></text:p>
      <text:p text:style-name="P6"><text:span text:style-name="T3">c) La fraction </text:span><text:span text:style-name="T3"><draw:frame draw:style-name="fr1" draw:name="Objet11" text:anchor-type="as-char" svg:y="-0.891cm" svg:width="1.328cm" svg:height="1.5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est-elle irréductible ?</text:span></text:p>
      <text:p text:style-name="P6"><text:span text:style-name="T3"/></text:p>
      <text:p text:style-name="P6">Exercice 14 :</text:p>
      <text:p text:style-name="P12">72 – 53 – 450 – 35 – 100 – 23 – 99 <text:s/>- 102 .</text:p>
      <text:p text:style-name="P12">Parmi les nombres de la liste ci-dessus, quels sont ceux qui sont premiers avec 15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5T18:28:17.021000000</meta:creation-date>
    <dc:date>2021-09-05T19:42:45.288000000</dc:date>
    <meta:editing-duration>PT5M58S</meta:editing-duration>
    <meta:editing-cycles>1</meta:editing-cycles>
    <meta:document-statistic meta:table-count="2" meta:image-count="0" meta:object-count="11" meta:page-count="4" meta:paragraph-count="78" meta:word-count="715" meta:character-count="3620" meta:non-whitespace-character-count="2746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n>263</mn>
      <mo stretchy="false">÷</mo>
      <mn>17</mn>
    </mrow>
    <annotation encoding="StarMath 5.0">263 div 17 </annotation>
  </semantics>
</math>
</file>

<file path=Object 10/content.xml><?xml version="1.0" encoding="utf-8"?>
<math xmlns="http://www.w3.org/1998/Math/MathML" display="block">
  <semantics>
    <mfrac>
      <mn>322</mn>
      <mn>1035</mn>
    </mfrac>
    <annotation encoding="StarMath 5.0">322 over 1035</annotation>
  </semantics>
</math>
</file>

<file path=Object 11/content.xml><?xml version="1.0" encoding="utf-8"?>
<math xmlns="http://www.w3.org/1998/Math/MathML" display="block">
  <semantics>
    <mfrac>
      <mn>322</mn>
      <mn>1035</mn>
    </mfrac>
    <annotation encoding="StarMath 5.0">322 over 1035</annotation>
  </semantics>
</math>
</file>

<file path=Object 2/content.xml><?xml version="1.0" encoding="utf-8"?>
<math xmlns="http://www.w3.org/1998/Math/MathML" display="block">
  <semantics>
    <mrow>
      <mn>442</mn>
      <mo stretchy="false">÷</mo>
      <mn>17</mn>
    </mrow>
    <annotation encoding="StarMath 5.0">442 div 17</annotation>
  </semantics>
</math>
</file>

<file path=Object 3/content.xml><?xml version="1.0" encoding="utf-8"?>
<math xmlns="http://www.w3.org/1998/Math/MathML" display="block">
  <semantics>
    <mfrac>
      <mn>39</mn>
      <mn>21</mn>
    </mfrac>
    <annotation encoding="StarMath 5.0">39 over 21</annotation>
  </semantics>
</math>
</file>

<file path=Object 4/content.xml><?xml version="1.0" encoding="utf-8"?>
<math xmlns="http://www.w3.org/1998/Math/MathML" display="block">
  <semantics>
    <mfrac>
      <mn>240</mn>
      <mn>105</mn>
    </mfrac>
    <annotation encoding="StarMath 5.0">240 over 105</annotation>
  </semantics>
</math>
</file>

<file path=Object 5/content.xml><?xml version="1.0" encoding="utf-8"?>
<math xmlns="http://www.w3.org/1998/Math/MathML" display="block">
  <semantics>
    <mfrac>
      <mn>126</mn>
      <mn>81</mn>
    </mfrac>
    <annotation encoding="StarMath 5.0">126 over 81</annotation>
  </semantics>
</math>
</file>

<file path=Object 6/content.xml><?xml version="1.0" encoding="utf-8"?>
<math xmlns="http://www.w3.org/1998/Math/MathML" display="block">
  <semantics>
    <mfrac>
      <mn>180</mn>
      <mn>210</mn>
    </mfrac>
    <annotation encoding="StarMath 5.0">180 over 210</annotation>
  </semantics>
</math>
</file>

<file path=Object 7/content.xml><?xml version="1.0" encoding="utf-8"?>
<math xmlns="http://www.w3.org/1998/Math/MathML" display="block">
  <semantics>
    <mfrac>
      <mn>850</mn>
      <mn>918</mn>
    </mfrac>
    <annotation encoding="StarMath 5.0">850 over 918</annotation>
  </semantics>
</math>
</file>

<file path=Object 8/content.xml><?xml version="1.0" encoding="utf-8"?>
<math xmlns="http://www.w3.org/1998/Math/MathML" display="block">
  <semantics>
    <mfrac>
      <mn>774</mn>
      <mn>1035</mn>
    </mfrac>
    <annotation encoding="StarMath 5.0">774 over 1035</annotation>
  </semantics>
</math>
</file>

<file path=Object 9/content.xml><?xml version="1.0" encoding="utf-8"?>
<math xmlns="http://www.w3.org/1998/Math/MathML" display="block">
  <semantics>
    <mfrac>
      <mn>322</mn>
      <mn>774</mn>
    </mfrac>
    <annotation encoding="StarMath 5.0">322 over 774</annotation>
  </semantics>
</math>
</file>