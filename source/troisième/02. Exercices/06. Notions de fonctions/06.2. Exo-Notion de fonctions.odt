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E0000019BCB111119977817D7.png" manifest:media-type="image/png"/>
  <manifest:file-entry manifest:full-path="Pictures/100002010000017A00000133B1B7AA4D86E609A4.png" manifest:media-type="image/png"/>
  <manifest:file-entry manifest:full-path="Pictures/10000201000002B20000019C83DCC6DA497B8EE6.png" manifest:media-type="image/png"/>
  <manifest:file-entry manifest:full-path="Pictures/10000201000001DE000001CBA454C04CC1422A1C.png" manifest:media-type="image/png"/>
  <manifest:file-entry manifest:full-path="Pictures/10000201000003880000030E81DC3423CCCCDD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3cm" style:rel-column-width="10922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29cm" style:rel-column-width="936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OpenDyslexic" officeooo:rsid="001f6321" officeooo:paragraph-rsid="001f6321"/>
    </style:style>
    <style:style style:name="P2" style:family="paragraph" style:parent-style-name="Table_20_Contents">
      <style:paragraph-properties fo:text-align="center" style:justify-single-word="false"/>
      <style:text-properties style:font-name="OpenDyslexic" officeooo:rsid="001f6321" officeooo:paragraph-rsid="001f6321"/>
    </style:style>
    <style:style style:name="P3" style:family="paragraph" style:parent-style-name="Table_20_Contents">
      <style:paragraph-properties fo:text-align="center" style:justify-single-word="false"/>
      <style:text-properties style:font-name="OpenDyslexic"/>
    </style:style>
    <style:style style:name="P4" style:family="paragraph" style:parent-style-name="Table_20_Contents">
      <style:paragraph-properties fo:text-align="center" style:justify-single-word="false"/>
      <style:text-properties style:font-name="OpenDyslexic" fo:font-style="italic" officeooo:rsid="001f6321" officeooo:paragraph-rsid="001f6321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Dyslexic" fo:font-style="italic" officeooo:rsid="001fe3ce" officeooo:paragraph-rsid="001fe3ce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OpenDyslexic" officeooo:rsid="001fe3ce" officeooo:paragraph-rsid="001fe3ce"/>
    </style:style>
    <style:style style:name="P7" style:family="paragraph" style:parent-style-name="Standard">
      <style:text-properties style:font-name="OpenDyslexic" officeooo:rsid="001f6321" officeooo:paragraph-rsid="001f6321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1f6321" officeooo:paragraph-rsid="001f6321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1fe3ce" officeooo:paragraph-rsid="001fe3ce"/>
    </style:style>
    <style:style style:name="P10" style:family="paragraph" style:parent-style-name="Standard">
      <style:text-properties style:font-name="OpenDyslexic" style:text-underline-style="none" officeooo:rsid="001f6321" officeooo:paragraph-rsid="001f6321"/>
    </style:style>
    <style:style style:name="P11" style:family="paragraph" style:parent-style-name="Standard" style:list-style-name="L1">
      <style:text-properties style:font-name="OpenDyslexic" style:text-underline-style="none" officeooo:rsid="001f6321" officeooo:paragraph-rsid="001f6321"/>
    </style:style>
    <style:style style:name="P12" style:family="paragraph" style:parent-style-name="Standard">
      <style:text-properties style:font-name="OpenDyslexic" style:text-underline-style="none" officeooo:rsid="001fe3ce" officeooo:paragraph-rsid="001fe3ce"/>
    </style:style>
    <style:style style:name="P13" style:family="paragraph" style:parent-style-name="Standard">
      <style:text-properties style:font-name="OpenDyslexic" style:text-underline-style="none" officeooo:rsid="00202f66" officeooo:paragraph-rsid="00202f66"/>
    </style:style>
    <style:style style:name="T1" style:family="text">
      <style:text-properties officeooo:rsid="001f632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officeooo:rsid="001fe3c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A.Lejeune <text:s text:c="65"/>3ème</text:p>
            <text:p text:style-name="P1">Exercices <text:s text:c="23"/>Chapitre notion de fonction </text:p>
          </table:table-cell>
        </table:table-row>
      </table:table>
      <text:p text:style-name="P7"/>
      <text:p text:style-name="P7"/>
      <text:p text:style-name="P8">Exercice 1 :</text:p>
      <text:p text:style-name="P10">Ce graphique représente une fonction <text:span text:style-name="T2">k.</text:span></text:p>
      <text:p text:style-name="P10"><draw:frame draw:style-name="fr1" draw:name="Image1" text:anchor-type="paragraph" svg:width="14.342cm" svg:height="10.874cm" draw:z-index="0"><draw:image xlink:href="Pictures/100002010000021E0000019BCB111119977817D7.png" xlink:type="simple" xlink:show="embed" xlink:actuate="onLoad" loext:mime-type="image/png"/></draw:frame><text:span text:style-name="T3">Recopie et complète le tableau suivant.</text:span></text:p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4">x</text:p>
          </table:table-cell>
          <table:table-cell table:style-name="Tableau2.A1" office:value-type="string">
            <text:p text:style-name="P3">-<text:span text:style-name="T1">1,25</text:span>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>-<text:span text:style-name="T1">1</text:span></text:p>
          </table:table-cell>
          <table:table-cell table:style-name="Tableau2.E1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4">k(x)</text:p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2">1,5</text:p>
          </table:table-cell>
          <table:table-cell table:style-name="Tableau2.A2" office:value-type="string">
            <text:p text:style-name="P3"/>
          </table:table-cell>
          <table:table-cell table:style-name="Tableau2.E2" office:value-type="string">
            <text:p text:style-name="P2">1,25</text:p>
          </table:table-cell>
        </table:table-row>
      </table:table>
      <text:p text:style-name="P10"><text:span text:style-name="T3"/></text:p>
      <text:p text:style-name="P8"><text:span text:style-name="T3">Exercice 2 :</text:span></text:p>
      <text:p text:style-name="P10"><text:span text:style-name="T3">Soit un tableau de valeurs d’une fonction </text:span><text:span text:style-name="T2">f</text:span><text:span text:style-name="T3">.</text:span></text:p>
      <table:table table:name="Tableau3" table:style-name="Tableau3">
        <table:table-column table:style-name="Tableau3.A" table:number-columns-repeated="6"/>
        <table:table-row>
          <table:table-cell table:style-name="Tableau3.A1" office:value-type="string">
            <text:p text:style-name="P2">x</text:p>
          </table:table-cell>
          <table:table-cell table:style-name="Tableau3.A1" office:value-type="string">
            <text:p text:style-name="P3">-<text:span text:style-name="T1">2</text:span></text:p>
          </table:table-cell>
          <table:table-cell table:style-name="Tableau3.A1" office:value-type="string">
            <text:p text:style-name="P3">-<text:span text:style-name="T1">1</text:span></text:p>
          </table:table-cell>
          <table:table-cell table:style-name="Tableau3.A1" office:value-type="string">
            <text:p text:style-name="P2">0</text:p>
          </table:table-cell>
          <table:table-cell table:style-name="Tableau3.A1" office:value-type="string">
            <text:p text:style-name="P2">1</text:p>
          </table:table-cell>
          <table:table-cell table:style-name="Tableau3.F1" office:value-type="string">
            <text:p text:style-name="P2">2</text:p>
          </table:table-cell>
        </table:table-row>
        <table:table-row>
          <table:table-cell table:style-name="Tableau3.A2" office:value-type="string">
            <text:p text:style-name="P2">f(x)</text:p>
          </table:table-cell>
          <table:table-cell table:style-name="Tableau3.A2" office:value-type="string">
            <text:p text:style-name="P2">1</text:p>
          </table:table-cell>
          <table:table-cell table:style-name="Tableau3.A2" office:value-type="string">
            <text:p text:style-name="P3">-<text:span text:style-name="T1">2</text:span></text:p>
          </table:table-cell>
          <table:table-cell table:style-name="Tableau3.A2" office:value-type="string">
            <text:p text:style-name="P3">-<text:span text:style-name="T1">1,5</text:span></text:p>
          </table:table-cell>
          <table:table-cell table:style-name="Tableau3.A2" office:value-type="string">
            <text:p text:style-name="P2">2</text:p>
          </table:table-cell>
          <table:table-cell table:style-name="Tableau3.F2" office:value-type="string">
            <text:p text:style-name="P2">3</text:p>
          </table:table-cell>
        </table:table-row>
      </table:table>
      <text:p text:style-name="P10"><text:span text:style-name="T3">Avec ce tableau de valeurs, construis la représentation graphique de la fonction </text:span><text:span text:style-name="T2">f</text:span><text:span text:style-name="T3">.</text:span></text:p>
      <text:p text:style-name="P8"><text:span text:style-name="T3">Exercice 3 :</text:span></text:p>
      <text:p text:style-name="P10"><text:span text:style-name="T3">Ce graphique représente une fonction </text:span><text:span text:style-name="T2">h</text:span><text:span text:style-name="T3">.</text:span></text:p>
      <text:p text:style-name="P10"><draw:frame draw:style-name="fr1" draw:name="Image2" text:anchor-type="paragraph" svg:width="12.649cm" svg:height="12.146cm" draw:z-index="1"><draw:image xlink:href="Pictures/10000201000001DE000001CBA454C04CC1422A1C.png" xlink:type="simple" xlink:show="embed" xlink:actuate="onLoad" loext:mime-type="image/png"/></draw:frame><text:soft-page-break/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>a. Quelle est l’image de 0 par la fonction </text:span><text:span text:style-name="T2">h </text:span><text:span text:style-name="T3">?</text:span></text:p>
      <text:p text:style-name="P10"><text:span text:style-name="T3">b. Quels nombres ont pour image 0 par la fonction </text:span><text:span text:style-name="T2">h </text:span><text:span text:style-name="T3">?</text:span></text:p>
      <text:p text:style-name="P10"><text:span text:style-name="T3">c. Donne une valeur approchée de :</text:span></text:p>
      <text:list xml:id="list115644531" text:style-name="L1">
        <text:list-item>
          <text:p text:style-name="P11"><text:span text:style-name="T3">l’image de 4 par la fonction </text:span><text:span text:style-name="T2">h </text:span><text:span text:style-name="T3">;</text:span></text:p>
        </text:list-item>
        <text:list-item>
          <text:p text:style-name="P11"><text:span text:style-name="T3">l’image de -3 par la fonction </text:span><text:span text:style-name="T2">h</text:span><text:span text:style-name="T3">.</text:span></text:p>
        </text:list-item>
      </text:list>
      <text:p text:style-name="P9"><text:span text:style-name="T3">Exercice 4 :</text:span></text:p>
      <text:p text:style-name="P12"><text:span text:style-name="T3">Une station a mesuré la hauteur des marées le 20 décembre 2011 à Saint-Malo. On obtient le graphique suivant.</text:span></text:p>
      <text:p text:style-name="P12"><draw:frame draw:style-name="fr2" draw:name="Image3" text:anchor-type="paragraph" svg:width="17cm" svg:height="10.151cm" draw:z-index="2"><draw:image xlink:href="Pictures/10000201000002B20000019C83DCC6DA497B8EE6.png" xlink:type="simple" xlink:show="embed" xlink:actuate="onLoad" loext:mime-type="image/png"/></draw:frame><text:soft-page-break/><text:span text:style-name="T3">a. Décris par une phrase la fonction M représentée sur ce graphique.</text:span></text:p>
      <text:p text:style-name="P12"><text:span text:style-name="T3">b. A quelle heure, la marée a-t-elle été la plus haute ? La plus basse ? Traduis chaque réponse par une égalité du type « M(...)=... ».</text:span></text:p>
      <text:p text:style-name="P12"><text:span text:style-name="T3">c. A quelle(s) heure(s), la marée a été à 6m ? Traduis ta réponse par une phrase avec le langage des fonctions.</text:span></text:p>
      <text:p text:style-name="P12"><text:span text:style-name="T3">d. Quelle est la hauteur d’eau à 5h ?</text:span></text:p>
      <text:p text:style-name="P12"><text:span text:style-name="T3">e. Un navire a un tirant d’eau de 6m. Dans quelle(s) tranche(s) horaire(s), peut-il manœuvrer à Saint-Malo sachant qu’il lui faut une marge de 2m pour ne pas toucher le fond. (Tirant d’eau hauteur de la partie immergée du bateau.)</text:span></text:p>
      <text:p text:style-name="P9"><text:span text:style-name="T3">Exercice 5 :</text:span></text:p>
      <text:p text:style-name="P12"><text:span text:style-name="T3">Dans chaque cas, explique pourquoi il n’existe pas de fonction qui, à </text:span><text:span text:style-name="T2">x</text:span><text:span text:style-name="T3">, associe </text:span><text:span text:style-name="T2">y</text:span><text:span text:style-name="T3">.</text:span></text:p>
      <text:p text:style-name="P12"><text:span text:style-name="T3">a. </text:span></text:p>
      <table:table table:name="Tableau4" table:style-name="Tableau4">
        <table:table-column table:style-name="Tableau4.A" table:number-columns-repeated="7"/>
        <table:table-row>
          <table:table-cell table:style-name="Tableau4.A1" office:value-type="string">
            <text:p text:style-name="P5">x</text:p>
          </table:table-cell>
          <table:table-cell table:style-name="Tableau4.A1" office:value-type="string">
            <text:p text:style-name="P3">-<text:span text:style-name="T5">2</text:span>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2</text:p>
          </table:table-cell>
          <table:table-cell table:style-name="Tableau4.A1" office:value-type="string">
            <text:p text:style-name="P3">-<text:span text:style-name="T5">1</text:span></text:p>
          </table:table-cell>
          <table:table-cell table:style-name="Tableau4.G1" office:value-type="string">
            <text:p text:style-name="P6">1</text:p>
          </table:table-cell>
        </table:table-row>
        <table:table-row>
          <table:table-cell table:style-name="Tableau4.A2" office:value-type="string">
            <text:p text:style-name="P5">y</text:p>
          </table:table-cell>
          <table:table-cell table:style-name="Tableau4.A2" office:value-type="string">
            <text:p text:style-name="P3">-<text:span text:style-name="T5">4</text:span></text:p>
          </table:table-cell>
          <table:table-cell table:style-name="Tableau4.A2" office:value-type="string">
            <text:p text:style-name="P6">3</text:p>
          </table:table-cell>
          <table:table-cell table:style-name="Tableau4.A2" office:value-type="string">
            <text:p text:style-name="P3">-<text:span text:style-name="T5">3</text:span></text:p>
          </table:table-cell>
          <table:table-cell table:style-name="Tableau4.A2" office:value-type="string">
            <text:p text:style-name="P6">5</text:p>
          </table:table-cell>
          <table:table-cell table:style-name="Tableau4.A2" office:value-type="string">
            <text:p text:style-name="P6">2</text:p>
          </table:table-cell>
          <table:table-cell table:style-name="Tableau4.G2" office:value-type="string">
            <text:p text:style-name="P6">4</text:p>
          </table:table-cell>
        </table:table-row>
      </table:table>
      <text:p text:style-name="P12"><text:span text:style-name="T3">b.</text:span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draw:frame draw:style-name="fr3" draw:name="Image4" text:anchor-type="paragraph" svg:x="3.528cm" svg:y="0.254cm" svg:width="10.001cm" svg:height="8.123cm" draw:z-index="3"><draw:image xlink:href="Pictures/100002010000017A00000133B1B7AA4D86E609A4.png" xlink:type="simple" xlink:show="embed" xlink:actuate="onLoad" loext:mime-type="image/png"/></draw:frame><text:soft-page-break/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3"><text:span text:style-name="T4">Exercice 6 :</text:span><text:span text:style-name="T3"> Niveau seconde générale </text:span></text:p>
      <text:p text:style-name="P13"><draw:frame draw:style-name="fr4" draw:name="Image5" text:anchor-type="paragraph" svg:width="17cm" svg:height="14.704cm" draw:z-index="4"><draw:image xlink:href="Pictures/10000201000003880000030E81DC3423CCCCDD31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2T21:28:29.046000000</meta:creation-date>
    <dc:date>2021-12-02T21:51:31.973000000</dc:date>
    <meta:editing-duration>PT2M41S</meta:editing-duration>
    <meta:editing-cycles>1</meta:editing-cycles>
    <meta:document-statistic meta:table-count="4" meta:image-count="5" meta:object-count="0" meta:page-count="4" meta:paragraph-count="59" meta:word-count="293" meta:character-count="1524" meta:non-whitespace-character-count="1201"/>
    <meta:generator>LibreOffice/6.2.3.2$Windows_X86_64 LibreOffice_project/aecc05fe267cc68dde00352a451aa867b3b546ac</meta:generator>
  </office:meta>
</office:document-meta>
</file>