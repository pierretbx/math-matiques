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01342" officeooo:paragraph-rsid="00101342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01342" officeooo:paragraph-rsid="00101342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18a1e" officeooo:paragraph-rsid="00118a1e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18a1e" officeooo:paragraph-rsid="00125604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25604" officeooo:paragraph-rsid="00125604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2655e" officeooo:paragraph-rsid="0012655e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42519" officeooo:paragraph-rsid="00142519"/>
    </style:style>
    <style:style style:name="P9" style:family="paragraph" style:parent-style-name="Standard">
      <style:text-properties style:font-name="OpenDyslexic" style:text-underline-style="none" officeooo:rsid="0012655e" officeooo:paragraph-rsid="0012655e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125604"/>
    </style:style>
    <style:style style:name="T6" style:family="text">
      <style:text-properties style:text-position="0% 100%" fo:font-style="italic" style:text-underline-style="none" style:font-style-asian="italic" style:font-style-complex="italic"/>
    </style:style>
    <style:style style:name="T7" style:family="text">
      <style:text-properties style:text-position="0% 100%" fo:font-style="italic" style:text-underline-style="none" officeooo:rsid="00125604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3"/>3ème</text:p>
            <text:p text:style-name="P1">Exercices <text:s text:c="24"/>Chapitre 3 : Puissances</text:p>
          </table:table-cell>
        </table:table-row>
      </table:table>
      <text:p text:style-name="P2"/>
      <text:p text:style-name="P3">Exercice 1 :</text:p>
      <text:p text:style-name="P3"><text:span text:style-name="T1">Écris sous la forme a</text:span><text:span text:style-name="T2">n</text:span><text:span text:style-name="T4">, où a est un nombre relatif et </text:span><text:span text:style-name="T6">n</text:span><text:span text:style-name="T4"> est un entier relatif.</text:span></text:p>
      <text:p text:style-name="P3"><text:span text:style-name="T4">a. </text:span><text:span text:style-name="T4"><draw:frame draw:style-name="fr1" draw:name="Objet1" text:anchor-type="as-char" svg:y="-0.57cm" svg:width="1.401cm" svg:height="0.78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 text:c="6"/>b. </text:span><text:span text:style-name="T4"><draw:frame draw:style-name="fr1" draw:name="Objet2" text:anchor-type="as-char" svg:y="-0.57cm" svg:width="1.616cm" svg:height="0.78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 text:c="6"/>c. </text:span><text:span text:style-name="T4"><draw:frame draw:style-name="fr1" draw:name="Objet3" text:anchor-type="as-char" svg:y="-0.57cm" svg:width="1.422cm" svg:height="0.78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 text:c="4"/>d. </text:span><text:span text:style-name="T4"><draw:frame draw:style-name="fr1" draw:name="Objet4" text:anchor-type="as-char" svg:y="-0.57cm" svg:width="2.658cm" svg:height="0.78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4">e. </text:span><text:span text:style-name="T4"><draw:frame draw:style-name="fr1" draw:name="Objet5" text:anchor-type="as-char" svg:y="-0.57cm" svg:width="2.425cm" svg:height="0.78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<text:s text:c="4"/>f. </text:span><text:span text:style-name="T4"><draw:frame draw:style-name="fr1" draw:name="Objet6" text:anchor-type="as-char" svg:y="-0.57cm" svg:width="1.415cm" svg:height="0.78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 text:c="5"/>g. </text:span><text:span text:style-name="T4"><draw:frame draw:style-name="fr1" draw:name="Objet7" text:anchor-type="as-char" svg:y="-0.57cm" svg:width="2.81cm" svg:height="0.78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 text:c="3"/>h. </text:span><text:span text:style-name="T4"><draw:frame draw:style-name="fr1" draw:name="Objet8" text:anchor-type="as-char" svg:y="-0.891cm" svg:width="2.545cm" svg:height="1.5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4"/></text:p>
      <text:p text:style-name="P3"><text:span text:style-name="T3">Exercice 2 :</text:span></text:p>
      <text:p text:style-name="P4"><text:span text:style-name="T5">Écris</text:span><text:span text:style-name="T4"> </text:span><text:span text:style-name="T5">sous la forme </text:span><text:span text:style-name="T5"><draw:frame draw:style-name="fr1" draw:name="Objet9" text:anchor-type="as-char" svg:y="-0.57cm" svg:width="0.631cm" svg:height="0.78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5">, où a est un nombre relatif et </text:span><text:span text:style-name="T7">n</text:span><text:span text:style-name="T5"> est un entier relatif.</text:span></text:p>
      <text:p text:style-name="P6"><text:span text:style-name="T4">a. </text:span><text:span text:style-name="T4"><draw:frame draw:style-name="fr1" draw:name="Objet10" text:anchor-type="as-char" svg:y="-0.933cm" svg:width="0.912cm" svg:height="1.625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s text:c="3"/>b. </text:span><text:span text:style-name="T4"><draw:frame draw:style-name="fr1" draw:name="Objet11" text:anchor-type="as-char" svg:y="-0.933cm" svg:width="0.714cm" svg:height="1.625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 text:c="3"/>c. </text:span><text:span text:style-name="T4"><draw:frame draw:style-name="fr1" draw:name="Objet12" text:anchor-type="as-char" svg:y="-0.933cm" svg:width="0.736cm" svg:height="1.625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s text:c="3"/>d. </text:span><text:span text:style-name="T4"><draw:frame draw:style-name="fr1" draw:name="Objet13" text:anchor-type="as-char" svg:y="-0.933cm" svg:width="1.79cm" svg:height="1.625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"><text:s text:c="3"/>e. </text:span><text:span text:style-name="T4"><draw:frame draw:style-name="fr1" draw:name="Objet14" text:anchor-type="as-char" svg:y="-0.933cm" svg:width="1.939cm" svg:height="1.625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4"><text:s text:c="2"/>f.</text:span><text:span text:style-name="T4"><draw:frame draw:style-name="fr1" draw:name="Objet15" text:anchor-type="as-char" svg:y="-0.933cm" svg:width="1.33cm" svg:height="1.625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6"><text:span text:style-name="T4"/></text:p>
      <text:p text:style-name="P6"><text:span text:style-name="T3">Exercice 3 :</text:span></text:p>
      <text:p text:style-name="P5"><text:span text:style-name="T5">Écris</text:span><text:span text:style-name="T4"> </text:span><text:span text:style-name="T5">sous la forme </text:span><text:span text:style-name="T5"><draw:frame draw:style-name="fr1" draw:name="Objet16" text:anchor-type="as-char" svg:y="-0.57cm" svg:width="0.631cm" svg:height="0.781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5">, où a est un nombre relatif et </text:span><text:span text:style-name="T7">n</text:span><text:span text:style-name="T5"> est un entier relatif.</text:span></text:p>
      <text:p text:style-name="P6"><text:span text:style-name="T4">a. </text:span><text:span text:style-name="T4"><draw:frame draw:style-name="fr1" draw:name="Objet17" text:anchor-type="as-char" svg:y="-0.57cm" svg:width="1.094cm" svg:height="0.78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s text:c="3"/>b. </text:span><text:span text:style-name="T4"><draw:frame draw:style-name="fr1" draw:name="Objet18" text:anchor-type="as-char" svg:y="-0.57cm" svg:width="1.884cm" svg:height="0.78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4"><text:s text:c="4"/>c. </text:span><text:span text:style-name="T4"><draw:frame draw:style-name="fr1" draw:name="Objet19" text:anchor-type="as-char" svg:y="-0.57cm" svg:width="1.626cm" svg:height="0.781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6"><text:span text:style-name="T4"/></text:p>
      <text:p text:style-name="P7"><text:span text:style-name="T3">Exercice 4 :</text:span></text:p>
      <text:p text:style-name="P7"><text:span text:style-name="T4">Écris sous la forme d’une seule puissance.</text:span></text:p>
      <text:p text:style-name="P7"><text:span text:style-name="T4">a. </text:span><text:span text:style-name="T4"><draw:frame draw:style-name="fr1" draw:name="Objet20" text:anchor-type="as-char" svg:y="-0.57cm" svg:width="2.332cm" svg:height="0.78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s text:c="4"/>b. </text:span><text:span text:style-name="T4"><draw:frame draw:style-name="fr1" draw:name="Objet21" text:anchor-type="as-char" svg:y="-0.933cm" svg:width="0.908cm" svg:height="1.625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s text:c="3"/>c. </text:span><text:span text:style-name="T4"><draw:frame draw:style-name="fr1" draw:name="Objet22" text:anchor-type="as-char" svg:y="-0.57cm" svg:width="2.318cm" svg:height="0.78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4"><text:s text:c="2"/>d. </text:span><text:span text:style-name="T4"><draw:frame draw:style-name="fr1" draw:name="Objet23" text:anchor-type="as-char" svg:y="-0.933cm" svg:width="0.891cm" svg:height="1.625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4"><text:s text:c="2"/>e. </text:span><text:span text:style-name="T4"><draw:frame draw:style-name="fr1" draw:name="Objet24" text:anchor-type="as-char" svg:y="-0.57cm" svg:width="2.221cm" svg:height="0.781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7"><text:span text:style-name="T4"/></text:p>
      <text:p text:style-name="P7"><text:span text:style-name="T4">f. </text:span><text:span text:style-name="T4"><draw:frame draw:style-name="fr1" draw:name="Objet25" text:anchor-type="as-char" svg:y="-0.57cm" svg:width="2.09cm" svg:height="0.78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text:s text:c="4"/>g. </text:span><text:span text:style-name="T4"><draw:frame draw:style-name="fr1" draw:name="Objet26" text:anchor-type="as-char" svg:y="-0.57cm" svg:width="2.856cm" svg:height="0.781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4"><text:s text:c="4"/>h. </text:span><text:span text:style-name="T4"><draw:frame draw:style-name="fr1" draw:name="Objet27" text:anchor-type="as-char" svg:y="-0.57cm" svg:width="2.254cm" svg:height="0.781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4"><text:s text:c="3"/>i. </text:span><text:span text:style-name="T4"><draw:frame draw:style-name="fr1" draw:name="Objet28" text:anchor-type="as-char" svg:y="-0.933cm" svg:width="1.963cm" svg:height="1.625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7"><text:span text:style-name="T4"/></text:p>
      <text:p text:style-name="P7"><text:span text:style-name="T3">Exercice 5 :</text:span></text:p>
      <text:p text:style-name="P9"><text:span text:style-name="T3">Écris les expressions suivantes sous la forme d’un produit de puissances de nombres entiers, ayant le moins de facteurs possibles. Tu détailleras les étapes de calcul.</text:span></text:p>
      <text:p text:style-name="P9"><text:soft-page-break/><text:span text:style-name="T3"><draw:frame draw:style-name="fr1" draw:name="Objet29" text:anchor-type="as-char" svg:y="-0.933cm" svg:width="2.967cm" svg:height="1.625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3"><text:s text:c="4"/></text:span><text:span text:style-name="T3"><draw:frame draw:style-name="fr1" draw:name="Objet30" text:anchor-type="as-char" svg:y="-0.933cm" svg:width="4.043cm" svg:height="1.625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3"><text:s text:c="4"/></text:span><text:span text:style-name="T3"><draw:frame draw:style-name="fr1" draw:name="Objet31" text:anchor-type="as-char" svg:y="-0.933cm" svg:width="4.353cm" svg:height="1.625cm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9"><text:span text:style-name="T3"/></text:p>
      <text:p text:style-name="P9"><text:span text:style-name="T3"><draw:frame draw:style-name="fr1" draw:name="Objet32" text:anchor-type="as-char" svg:y="-0.933cm" svg:width="2.422cm" svg:height="1.625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3"><text:s text:c="5"/></text:span><text:span text:style-name="T3"><draw:frame draw:style-name="fr1" draw:name="Objet33" text:anchor-type="as-char" svg:y="-0.933cm" svg:width="3.066cm" svg:height="1.625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3"><text:s text:c="6"/></text:span><text:span text:style-name="T3"><draw:frame draw:style-name="fr1" draw:name="Objet34" text:anchor-type="as-char" svg:y="-0.933cm" svg:width="3.649cm" svg:height="1.625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9"><text:span text:style-name="T3"/></text:p>
      <text:p text:style-name="P8"><text:span text:style-name="T3">Exercice 6 :</text:span></text:p>
      <text:p text:style-name="P8"><text:span text:style-name="T4">Voici les vitesses atteintes par les cinq mammifères terrestres les plus rapides au sprint.</text:span></text:p>
      <text:p text:style-name="P8"><text:span text:style-name="T4">Antilope : 88 000 m.h</text:span><text:span text:style-name="T2">-1 ;</text:span></text:p>
      <text:p text:style-name="P8"><text:span text:style-name="T4">Chevreuil : 27,22 m.s</text:span><text:span text:style-name="T2">-1 </text:span><text:span text:style-name="T4">;</text:span></text:p>
      <text:p text:style-name="P8"><text:span text:style-name="T4">Springbok : 0,0264 km.s</text:span><text:span text:style-name="T2">-1</text:span></text:p>
      <text:p text:style-name="P8"><text:span text:style-name="T4">Lion : 22,22 m.s</text:span><text:span text:style-name="T2">-1</text:span></text:p>
      <text:p text:style-name="P8"><text:span text:style-name="T4">Guépard : 0,0306 km.s</text:span><text:span text:style-name="T2">-1</text:span></text:p>
      <text:p text:style-name="P8"><text:span text:style-name="T4">Classe ces champions dans l’ordre décroissant de leur vitesse exprimée en km.h</text:span><text:span text:style-name="T2">-1</text:span></text:p>
      <text:p text:style-name="P8"><text:span text:style-name="T4"/></text:p>
      <text:p text:style-name="P8"><text:span text:style-name="T3">Exercice 7 :</text:span></text:p>
      <text:p text:style-name="P8"><text:span text:style-name="T4">Une analyse chimique a montré qu’il y avait 120 mg de magnésium dans 5L d’eau.</text:span></text:p>
      <text:p text:style-name="P8"><text:span text:style-name="T4">Calcule la concentration, en g/L, de magnésium dans cette eau.</text:span></text:p>
      <text:p text:style-name="P8"><text:span text:style-name="T4"/></text:p>
      <text:p text:style-name="P8"><text:span text:style-name="T3">Exercice 8 :</text:span></text:p>
      <text:p text:style-name="P8"><text:span text:style-name="T4">Un passionné d’aviron rame à une cadence moyenne de 45 coups de rame par minute.</text:span></text:p>
      <text:p text:style-name="P8"><text:span text:style-name="T4">a. Calcule sa cadence en nombre de coups de rame par heure.</text:span></text:p>
      <text:p text:style-name="P8"><text:span text:style-name="T4">b. En combien de temps donne-t-il 1000 coups de rame ? Arrondis le résultat à la seconde.</text:span></text:p>
      <text:p text:style-name="P8"><text:span text:style-name="T4"/></text:p>
      <text:p text:style-name="P8"><text:span text:style-name="T3">Exercice 9 :</text:span></text:p>
      <text:p text:style-name="P8"><text:span text:style-name="T4">La vitesse commerciale des TGV est en moyenne de 300 km.h</text:span><text:span text:style-name="T2">-1</text:span></text:p>
      <text:p text:style-name="P8"><text:span text:style-name="T4">a. Combien de kilomètres un TGV parcourt-il en 10 min ?</text:span></text:p>
      <text:p text:style-name="P8"><text:span text:style-name="T4">b. Calcule la vitesse moyenne d’un TGV en km.min</text:span><text:span text:style-name="T2">-1</text:span></text:p>
      <text:p text:style-name="P8"><text:span text:style-name="T4">c. Calcule cette vitesse en m.s</text:span><text:span text:style-name="T2">-1</text:span><text:span text:style-name="T4">, arrondis le résultat à l’un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18:44:32.361000000</meta:creation-date>
    <dc:date>2021-10-10T21:02:10.397000000</dc:date>
    <meta:editing-duration>PT11M5S</meta:editing-duration>
    <meta:editing-cycles>1</meta:editing-cycles>
    <meta:document-statistic meta:table-count="1" meta:image-count="0" meta:object-count="34" meta:page-count="2" meta:paragraph-count="40" meta:word-count="305" meta:character-count="1741" meta:non-whitespace-character-count="1292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sup>
        <mn>5</mn>
        <mn>2</mn>
      </msup>
      <mo stretchy="false">×</mo>
      <msup>
        <mn>5</mn>
        <mn>4</mn>
      </msup>
    </mrow>
    <annotation encoding="StarMath 5.0">5^2 times 5^4</annotation>
  </semantics>
</math>
</file>

<file path=Object 10/content.xml><?xml version="1.0" encoding="utf-8"?>
<math xmlns="http://www.w3.org/1998/Math/MathML" display="block">
  <semantics>
    <mfrac>
      <msup>
        <mn>3</mn>
        <mn>8</mn>
      </msup>
      <msup>
        <mn>3</mn>
        <mrow>
          <mo stretchy="false">−</mo>
          <mn>4</mn>
        </mrow>
      </msup>
    </mfrac>
    <annotation encoding="StarMath 5.0">3^8 over 3^{ -4 }</annotation>
  </semantics>
</math>
</file>

<file path=Object 11/content.xml><?xml version="1.0" encoding="utf-8"?>
<math xmlns="http://www.w3.org/1998/Math/MathML" display="block">
  <semantics>
    <mfrac>
      <msup>
        <mn>6</mn>
        <mn>5</mn>
      </msup>
      <msup>
        <mn>3</mn>
        <mn>5</mn>
      </msup>
    </mfrac>
    <annotation encoding="StarMath 5.0">6^5 over 3^5</annotation>
  </semantics>
</math>
</file>

<file path=Object 12/content.xml><?xml version="1.0" encoding="utf-8"?>
<math xmlns="http://www.w3.org/1998/Math/MathML" display="block">
  <semantics>
    <mfrac>
      <msup>
        <mn>4</mn>
        <mn>6</mn>
      </msup>
      <msup>
        <mn>4</mn>
        <mn>2</mn>
      </msup>
    </mfrac>
    <annotation encoding="StarMath 5.0">4^6 over 4^2</annotation>
  </semantics>
</math>
</file>

<file path=Object 13/content.xml><?xml version="1.0" encoding="utf-8"?>
<math xmlns="http://www.w3.org/1998/Math/MathML" display="block">
  <semantics>
    <mfrac>
      <msup>
        <mrow>
          <mo fence="true" stretchy="false">(</mo>
          <mrow>
            <mrow>
              <mrow>
                <mo stretchy="false">−</mo>
                <mn>4</mn>
              </mrow>
              <mn>,5</mn>
            </mrow>
          </mrow>
          <mo fence="true" stretchy="false">)</mo>
        </mrow>
        <mn>4</mn>
      </msup>
      <msup>
        <mn>3</mn>
        <mn>4</mn>
      </msup>
    </mfrac>
    <annotation encoding="StarMath 5.0">( -4,5 )^4 over 3^4</annotation>
  </semantics>
</math>
</file>

<file path=Object 14/content.xml><?xml version="1.0" encoding="utf-8"?>
<math xmlns="http://www.w3.org/1998/Math/MathML" display="block">
  <semantics>
    <mfrac>
      <msup>
        <mn>9</mn>
        <mrow>
          <mo stretchy="false">−</mo>
          <mn>3</mn>
        </mrow>
      </msup>
      <msup>
        <mrow>
          <mo fence="true" stretchy="false">(</mo>
          <mrow>
            <mrow>
              <mrow>
                <mo stretchy="false">−</mo>
                <mn>2</mn>
              </mrow>
              <mn>,5</mn>
            </mrow>
          </mrow>
          <mo fence="true" stretchy="false">)</mo>
        </mrow>
        <mrow>
          <mo stretchy="false">−</mo>
          <mn>3</mn>
        </mrow>
      </msup>
    </mfrac>
    <annotation encoding="StarMath 5.0">9^{ -3 } over ( -2,5 )^{ -3 }</annotation>
  </semantics>
</math>
</file>

<file path=Object 15/content.xml><?xml version="1.0" encoding="utf-8"?>
<math xmlns="http://www.w3.org/1998/Math/MathML" display="block">
  <semantics>
    <mfrac>
      <mrow>
        <mn>3</mn>
        <msup>
          <mn>,2</mn>
          <mrow>
            <mo stretchy="false">−</mo>
            <mn>5</mn>
          </mrow>
        </msup>
      </mrow>
      <mrow>
        <mn>3</mn>
        <msup>
          <mn>,2</mn>
          <mrow>
            <mo stretchy="false">−</mo>
            <mn>2</mn>
          </mrow>
        </msup>
      </mrow>
    </mfrac>
    <annotation encoding="StarMath 5.0">{3,2^{ -5 }} over {3,2^{ -2 }}</annotation>
  </semantics>
</math>
</file>

<file path=Object 16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17/content.xml><?xml version="1.0" encoding="utf-8"?>
<math xmlns="http://www.w3.org/1998/Math/MathML" display="block">
  <semantics>
    <msup>
      <mrow>
        <mo fence="true" stretchy="false">(</mo>
        <mrow>
          <msup>
            <mn>2</mn>
            <mn>4</mn>
          </msup>
        </mrow>
        <mo fence="true" stretchy="false">)</mo>
      </mrow>
      <mn>3</mn>
    </msup>
    <annotation encoding="StarMath 5.0">( 2^4)^3 </annotation>
  </semantics>
</math>
</file>

<file path=Object 18/content.xml><?xml version="1.0" encoding="utf-8"?>
<math xmlns="http://www.w3.org/1998/Math/MathML" display="block">
  <semantics>
    <msup>
      <mrow>
        <mo fence="true" stretchy="false">(</mo>
        <mrow>
          <msup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  <mrow>
              <mo stretchy="false">−</mo>
              <mn>3</mn>
            </mrow>
          </msup>
        </mrow>
        <mo fence="true" stretchy="false">)</mo>
      </mrow>
      <mn>2</mn>
    </msup>
    <annotation encoding="StarMath 5.0">( (-5 )^{ -3 })^2</annotation>
  </semantics>
</math>
</file>

<file path=Object 19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sup>
              <mn>4</mn>
              <mn>7</mn>
            </msup>
          </mrow>
        </mrow>
        <mo fence="true" stretchy="false">)</mo>
      </mrow>
      <mrow>
        <mo stretchy="false">−</mo>
        <mn>8</mn>
      </mrow>
    </msup>
    <annotation encoding="StarMath 5.0">( -4^7 )^{ -8 }</annotation>
  </semantics>
</math>
</file>

<file path=Object 2/content.xml><?xml version="1.0" encoding="utf-8"?>
<math xmlns="http://www.w3.org/1998/Math/MathML" display="block">
  <semantics>
    <mrow>
      <msup>
        <mn>6</mn>
        <mn>5</mn>
      </msup>
      <mo stretchy="false">×</mo>
      <msup>
        <mn>6</mn>
        <mrow>
          <mo stretchy="false">−</mo>
          <mn>8</mn>
        </mrow>
      </msup>
    </mrow>
    <annotation encoding="StarMath 5.0">6^5 times 6^{ -8 }</annotation>
  </semantics>
</math>
</file>

<file path=Object 20/content.xml><?xml version="1.0" encoding="utf-8"?>
<math xmlns="http://www.w3.org/1998/Math/MathML" display="block">
  <semantics>
    <mrow>
      <mn>2</mn>
      <mrow>
        <mn>,8</mn>
        <mo stretchy="false">×</mo>
        <mn>2</mn>
      </mrow>
      <msup>
        <mn>,8</mn>
        <mrow>
          <mo stretchy="false">−</mo>
          <mn>3</mn>
        </mrow>
      </msup>
    </mrow>
    <annotation encoding="StarMath 5.0">2,8 times 2,8^{ -3 }</annotation>
  </semantics>
</math>
</file>

<file path=Object 21/content.xml><?xml version="1.0" encoding="utf-8"?>
<math xmlns="http://www.w3.org/1998/Math/MathML" display="block">
  <semantics>
    <mfrac>
      <msup>
        <mn>5</mn>
        <mrow>
          <mo stretchy="false">−</mo>
          <mn>2</mn>
        </mrow>
      </msup>
      <msup>
        <mn>5</mn>
        <mrow>
          <mo stretchy="false">−</mo>
          <mn>4</mn>
        </mrow>
      </msup>
    </mfrac>
    <annotation encoding="StarMath 5.0">5^{ -2 } over 5^{ -4 }</annotation>
  </semantics>
</math>
</file>

<file path=Object 22/content.xml><?xml version="1.0" encoding="utf-8"?>
<math xmlns="http://www.w3.org/1998/Math/MathML" display="block">
  <semantics>
    <msup>
      <mrow>
        <mo fence="true" stretchy="false">(</mo>
        <mrow>
          <msup>
            <mrow>
              <mo fence="true" stretchy="false">(</mo>
              <mrow>
                <mrow>
                  <mrow>
                    <mo stretchy="false">−</mo>
                    <mn>3</mn>
                  </mrow>
                  <mn>,7</mn>
                </mrow>
              </mrow>
              <mo fence="true" stretchy="false">)</mo>
            </mrow>
            <mrow>
              <mo stretchy="false">−</mo>
              <mn>2</mn>
            </mrow>
          </msup>
        </mrow>
        <mo fence="true" stretchy="false">)</mo>
      </mrow>
      <mn>5</mn>
    </msup>
    <annotation encoding="StarMath 5.0">( (-3,7)^{-2} )^{ 5 }</annotation>
  </semantics>
</math>
</file>

<file path=Object 23/content.xml><?xml version="1.0" encoding="utf-8"?>
<math xmlns="http://www.w3.org/1998/Math/MathML" display="block">
  <semantics>
    <mfrac>
      <msup>
        <mn>7</mn>
        <mrow>
          <mo stretchy="false">−</mo>
          <mn>3</mn>
        </mrow>
      </msup>
      <msup>
        <mn>2</mn>
        <mrow>
          <mo stretchy="false">−</mo>
          <mn>3</mn>
        </mrow>
      </msup>
    </mfrac>
    <annotation encoding="StarMath 5.0">7^{ -3 } over 2^{ -3 }</annotation>
  </semantics>
</math>
</file>

<file path=Object 24/content.xml><?xml version="1.0" encoding="utf-8"?>
<math xmlns="http://www.w3.org/1998/Math/MathML" display="block">
  <semantics>
    <msup>
      <mrow>
        <mo fence="true" stretchy="false">(</mo>
        <mrow>
          <msup>
            <mrow>
              <mo fence="true" stretchy="false">(</mo>
              <mrow>
                <mrow>
                  <mn>5</mn>
                  <mn>,6</mn>
                </mrow>
              </mrow>
              <mo fence="true" stretchy="false">)</mo>
            </mrow>
            <mrow>
              <mo stretchy="false">−</mo>
              <mn>4</mn>
            </mrow>
          </msup>
        </mrow>
        <mo fence="true" stretchy="false">)</mo>
      </mrow>
      <mrow>
        <mo stretchy="false">−</mo>
        <mn>2</mn>
      </mrow>
    </msup>
    <annotation encoding="StarMath 5.0">( (5,6)^{-4} )^{ -2 }</annotation>
  </semantics>
</math>
</file>

<file path=Object 25/content.xml><?xml version="1.0" encoding="utf-8"?>
<math xmlns="http://www.w3.org/1998/Math/MathML" display="block">
  <semantics>
    <mrow>
      <msup>
        <mn>10</mn>
        <mn>7</mn>
      </msup>
      <mo stretchy="false">×</mo>
      <msup>
        <mn>10</mn>
        <mrow>
          <mo stretchy="false">−</mo>
          <mn>7</mn>
        </mrow>
      </msup>
    </mrow>
    <annotation encoding="StarMath 5.0">10^7 times 10^{ -7 }</annotation>
  </semantics>
</math>
</file>

<file path=Object 26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6</mn>
            </mrow>
          </mrow>
          <mo fence="true" stretchy="false">)</mo>
        </mrow>
        <mn>8</mn>
      </msup>
      <mo stretchy="false">×</mo>
      <msup>
        <mrow>
          <mo fence="true" stretchy="false">(</mo>
          <mrow>
            <mrow>
              <mo stretchy="false">−</mo>
              <mn>6</mn>
            </mrow>
          </mrow>
          <mo fence="true" stretchy="false">)</mo>
        </mrow>
        <mrow>
          <mo stretchy="false">−</mo>
          <mn>3</mn>
        </mrow>
      </msup>
    </mrow>
    <annotation encoding="StarMath 5.0">( -6 )^8 times ( -6 )^{ -3 }</annotation>
  </semantics>
</math>
</file>

<file path=Object 27/content.xml><?xml version="1.0" encoding="utf-8"?>
<math xmlns="http://www.w3.org/1998/Math/MathML" display="block">
  <semantics>
    <mrow>
      <mn>5</mn>
      <mrow>
        <msup>
          <mn>,3</mn>
          <mrow>
            <mo stretchy="false">−</mo>
            <mn>6</mn>
          </mrow>
        </msup>
        <mo stretchy="false">×</mo>
        <msup>
          <mn>4</mn>
          <mrow>
            <mo stretchy="false">−</mo>
            <mn>6</mn>
          </mrow>
        </msup>
      </mrow>
    </mrow>
    <annotation encoding="StarMath 5.0">5,3^{ -6 } times 4^{ -6 }</annotation>
  </semantics>
</math>
</file>

<file path=Object 28/content.xml><?xml version="1.0" encoding="utf-8"?>
<math xmlns="http://www.w3.org/1998/Math/MathML" display="block">
  <semantics>
    <mfrac>
      <msup>
        <mrow>
          <mo fence="true" stretchy="false">(</mo>
          <mrow>
            <mrow>
              <mrow>
                <mo stretchy="false">−</mo>
                <mn>4</mn>
              </mrow>
              <mn>,2</mn>
            </mrow>
          </mrow>
          <mo fence="true" stretchy="false">)</mo>
        </mrow>
        <mrow>
          <mo stretchy="false">−</mo>
          <mn>5</mn>
        </mrow>
      </msup>
      <msup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  <mrow>
          <mo stretchy="false">−</mo>
          <mn>5</mn>
        </mrow>
      </msup>
    </mfrac>
    <annotation encoding="StarMath 5.0">( -4,2)^{-5} over (-3)^{ -5 }</annotation>
  </semantics>
</math>
</file>

<file path=Object 29/content.xml><?xml version="1.0" encoding="utf-8"?>
<math xmlns="http://www.w3.org/1998/Math/MathML" display="block">
  <semantics>
    <mrow>
      <mi>A</mi>
      <mo stretchy="false">=</mo>
      <mfrac>
        <mrow>
          <msup>
            <mn>3</mn>
            <mn>4</mn>
          </msup>
          <mo stretchy="false">×</mo>
          <msup>
            <mn>2</mn>
            <mn>5</mn>
          </msup>
          <mo stretchy="false">×</mo>
          <msup>
            <mn>5</mn>
            <mn>6</mn>
          </msup>
        </mrow>
        <mrow>
          <msup>
            <mn>3</mn>
            <mn>7</mn>
          </msup>
          <mo stretchy="false">×</mo>
          <msup>
            <mn>2</mn>
            <mn>9</mn>
          </msup>
          <mo stretchy="false">×</mo>
          <msup>
            <mn>5</mn>
            <mn>3</mn>
          </msup>
        </mrow>
      </mfrac>
    </mrow>
    <annotation encoding="StarMath 5.0">A= {3^4 times 2^5 times 5^6} over { 3^7 times 2^9 times 5^3 }</annotation>
  </semantics>
</math>
</file>

<file path=Object 3/content.xml><?xml version="1.0" encoding="utf-8"?>
<math xmlns="http://www.w3.org/1998/Math/MathML" display="block">
  <semantics>
    <mrow>
      <msup>
        <mn>3</mn>
        <mn>4</mn>
      </msup>
      <mo stretchy="false">×</mo>
      <msup>
        <mn>5</mn>
        <mn>4</mn>
      </msup>
    </mrow>
    <annotation encoding="StarMath 5.0">3^4 times 5^4</annotation>
  </semantics>
</math>
</file>

<file path=Object 30/content.xml><?xml version="1.0" encoding="utf-8"?>
<math xmlns="http://www.w3.org/1998/Math/MathML" display="block">
  <semantics>
    <mrow>
      <mi>B</mi>
      <mo stretchy="false">=</mo>
      <mfrac>
        <mrow>
          <msup>
            <mn>7</mn>
            <mn>12</mn>
          </msup>
          <mo stretchy="false">×</mo>
          <msup>
            <mrow>
              <mo fence="true" stretchy="false">(</mo>
              <mrow>
                <msup>
                  <mn>9</mn>
                  <mn>4</mn>
                </msup>
              </mrow>
              <mo fence="true" stretchy="false">)</mo>
            </mrow>
            <mn>3</mn>
          </msup>
          <mo stretchy="false">×</mo>
          <msup>
            <mn>5</mn>
            <mrow>
              <mo stretchy="false">−</mo>
              <mn>5</mn>
            </mrow>
          </msup>
        </mrow>
        <mrow>
          <msup>
            <mn>9</mn>
            <mn>10</mn>
          </msup>
          <mo stretchy="false">×</mo>
          <msup>
            <mrow>
              <mo fence="true" stretchy="false">(</mo>
              <mrow>
                <msup>
                  <mn>5</mn>
                  <mrow>
                    <mo stretchy="false">−</mo>
                    <mn>7</mn>
                  </mrow>
                </msup>
              </mrow>
              <mo fence="true" stretchy="false">)</mo>
            </mrow>
            <mn>6</mn>
          </msup>
          <mo stretchy="false">×</mo>
          <msup>
            <mn>7</mn>
            <mrow>
              <mo stretchy="false">−</mo>
              <mn>17</mn>
            </mrow>
          </msup>
        </mrow>
      </mfrac>
    </mrow>
    <annotation encoding="StarMath 5.0">B= {7^12 times (9^4)^3 times 5^{-5} } over { 9^{10} times (5^{-7})^6 times 7^{-17} }</annotation>
  </semantics>
</math>
</file>

<file path=Object 31/content.xml><?xml version="1.0" encoding="utf-8"?>
<math xmlns="http://www.w3.org/1998/Math/MathML" display="block">
  <semantics>
    <mrow>
      <mi>C</mi>
      <mo stretchy="false">=</mo>
      <mfrac>
        <mrow>
          <msup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n>7</mn>
          </msup>
          <mo stretchy="false">×</mo>
          <msup>
            <mrow>
              <mo fence="true" stretchy="false">(</mo>
              <mrow>
                <mrow>
                  <mo stretchy="false">−</mo>
                  <mn>6</mn>
                </mrow>
              </mrow>
              <mo fence="true" stretchy="false">)</mo>
            </mrow>
            <mn>2</mn>
          </msup>
          <mo stretchy="false">×</mo>
          <msup>
            <mn>3</mn>
            <mrow>
              <mo stretchy="false">−</mo>
              <mn>7</mn>
            </mrow>
          </msup>
        </mrow>
        <mrow>
          <msup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n>5</mn>
          </msup>
          <mo stretchy="false">×</mo>
          <msup>
            <mn>4</mn>
            <mrow>
              <mo stretchy="false">−</mo>
              <mn>11</mn>
            </mrow>
          </msup>
          <mo stretchy="false">×</mo>
          <msup>
            <mn>6</mn>
            <mrow>
              <mo stretchy="false">−</mo>
              <mn>3</mn>
            </mrow>
          </msup>
        </mrow>
      </mfrac>
    </mrow>
    <annotation encoding="StarMath 5.0">C={( -4 )^7 times ( -6 )^2 times 3^{ -7 }} over { (-3)^5 times 4^{-11} times 6^{-3} } </annotation>
  </semantics>
</math>
</file>

<file path=Object 32/content.xml><?xml version="1.0" encoding="utf-8"?>
<math xmlns="http://www.w3.org/1998/Math/MathML" display="block">
  <semantics>
    <mrow>
      <mi>D</mi>
      <mo stretchy="false">=</mo>
      <mfrac>
        <mrow>
          <msup>
            <mn>8</mn>
            <mn>5</mn>
          </msup>
          <mo stretchy="false">×</mo>
          <msup>
            <mn>12</mn>
            <mn>9</mn>
          </msup>
        </mrow>
        <mrow>
          <msup>
            <mn>8</mn>
            <mn>2</mn>
          </msup>
          <mo stretchy="false">×</mo>
          <msup>
            <mn>12</mn>
            <mn>6</mn>
          </msup>
        </mrow>
      </mfrac>
    </mrow>
    <annotation encoding="StarMath 5.0">D= { 8^5 times 12^9 } over { 8^2 times 12^6 }</annotation>
  </semantics>
</math>
</file>

<file path=Object 33/content.xml><?xml version="1.0" encoding="utf-8"?>
<math xmlns="http://www.w3.org/1998/Math/MathML" display="block">
  <semantics>
    <mrow>
      <mi>E</mi>
      <mo stretchy="false">=</mo>
      <mfrac>
        <mrow>
          <msup>
            <mn>3</mn>
            <mn>5</mn>
          </msup>
          <mo stretchy="false">×</mo>
          <msup>
            <mrow>
              <mo fence="true" stretchy="false">(</mo>
              <mrow>
                <msup>
                  <mn>4</mn>
                  <mn>5</mn>
                </msup>
              </mrow>
              <mo fence="true" stretchy="false">)</mo>
            </mrow>
            <mn>3</mn>
          </msup>
        </mrow>
        <mrow>
          <msup>
            <mrow>
              <mo fence="true" stretchy="false">(</mo>
              <mrow>
                <msup>
                  <mn>4</mn>
                  <mn>6</mn>
                </msup>
              </mrow>
              <mo fence="true" stretchy="false">)</mo>
            </mrow>
            <mn>3</mn>
          </msup>
          <mo stretchy="false">×</mo>
          <msup>
            <mrow>
              <mo fence="true" stretchy="false">(</mo>
              <mrow>
                <msup>
                  <mn>3</mn>
                  <mn>4</mn>
                </msup>
              </mrow>
              <mo fence="true" stretchy="false">)</mo>
            </mrow>
            <mn>2</mn>
          </msup>
        </mrow>
      </mfrac>
    </mrow>
    <annotation encoding="StarMath 5.0">E= {3^5 times ( 4^5)^3 } over { (4^6)^3 times (3^4)^2 }</annotation>
  </semantics>
</math>
</file>

<file path=Object 34/content.xml><?xml version="1.0" encoding="utf-8"?>
<math xmlns="http://www.w3.org/1998/Math/MathML" display="block">
  <semantics>
    <mrow>
      <mi>F</mi>
      <mo stretchy="false">=</mo>
      <mfrac>
        <mrow>
          <msup>
            <mn>7</mn>
            <mn>5</mn>
          </msup>
          <mo stretchy="false">×</mo>
          <msup>
            <mn>6</mn>
            <mn>3</mn>
          </msup>
          <mo stretchy="false">×</mo>
          <msup>
            <mn>3</mn>
            <mn>5</mn>
          </msup>
          <mo stretchy="false">×</mo>
          <msup>
            <mn>8</mn>
            <mn>2</mn>
          </msup>
        </mrow>
        <mrow>
          <msup>
            <mn>21</mn>
            <mn>3</mn>
          </msup>
          <mo stretchy="false">×</mo>
          <msup>
            <mn>2</mn>
            <mn>2</mn>
          </msup>
          <mo stretchy="false">×</mo>
          <mn>6</mn>
        </mrow>
      </mfrac>
    </mrow>
    <annotation encoding="StarMath 5.0">F= 7^5 times 6^3 times 3^5 times 8^2 over {21^3 times 2^2 times 6}</annotation>
  </semantics>
</math>
</file>

<file path=Object 4/content.xml><?xml version="1.0" encoding="utf-8"?>
<math xmlns="http://www.w3.org/1998/Math/MathML" display="block">
  <semantics>
    <mrow>
      <mn>2</mn>
      <mrow>
        <msup>
          <mn>,5</mn>
          <mrow>
            <mo stretchy="false">−</mo>
            <mn>7</mn>
          </mrow>
        </msup>
        <mo stretchy="false">×</mo>
        <mn>4</mn>
      </mrow>
      <msup>
        <mn>,2</mn>
        <mrow>
          <mo stretchy="false">−</mo>
          <mn>7</mn>
        </mrow>
      </msup>
    </mrow>
    <annotation encoding="StarMath 5.0">2,5 ^{ -7 } times 4,2^{ -7 }</annotation>
  </semantics>
</math>
</file>

<file path=Object 5/content.xml><?xml version="1.0" encoding="utf-8"?>
<math xmlns="http://www.w3.org/1998/Math/MathML" display="block">
  <semantics>
    <mrow>
      <mrow>
        <mo stretchy="false">−</mo>
        <mn>4</mn>
      </mrow>
      <mo stretchy="false">×</mo>
      <msup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row>
          <mo stretchy="false">−</mo>
          <mn>7</mn>
        </mrow>
      </msup>
    </mrow>
    <annotation encoding="StarMath 5.0">-4 times ( -4 )^{ -7 }</annotation>
  </semantics>
</math>
</file>

<file path=Object 6/content.xml><?xml version="1.0" encoding="utf-8"?>
<math xmlns="http://www.w3.org/1998/Math/MathML" display="block">
  <semantics>
    <mrow>
      <msup>
        <mn>7</mn>
        <mrow>
          <mo stretchy="false">−</mo>
          <mn>5</mn>
        </mrow>
      </msup>
      <mo stretchy="false">×</mo>
      <mn>7</mn>
    </mrow>
    <annotation encoding="StarMath 5.0">7^{ -5 } times 7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row>
          <mo stretchy="false">−</mo>
          <mn>3</mn>
        </mrow>
      </msup>
      <mo stretchy="false">×</mo>
      <msup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n>5</mn>
      </msup>
    </mrow>
    <annotation encoding="StarMath 5.0">( -2 )^{ -3 } times ( -2 )^5</annotation>
  </semantics>
</math>
</file>

<file path=Object 8/content.xml><?xml version="1.0" encoding="utf-8"?>
<math xmlns="http://www.w3.org/1998/Math/MathML" display="block">
  <semantics>
    <mrow>
      <msup>
        <mrow>
          <mo fence="true" stretchy="false">(</mo>
          <mrow>
            <mfrac>
              <mn>2</mn>
              <mn>3</mn>
            </mfrac>
          </mrow>
          <mo fence="true" stretchy="false">)</mo>
        </mrow>
        <mrow>
          <mo stretchy="false">−</mo>
          <mn>3</mn>
        </mrow>
      </msup>
      <mo stretchy="false">×</mo>
      <msup>
        <mrow>
          <mo fence="true" stretchy="false">(</mo>
          <mrow>
            <mfrac>
              <mn>2</mn>
              <mn>3</mn>
            </mfrac>
          </mrow>
          <mo fence="true" stretchy="false">)</mo>
        </mrow>
        <mrow>
          <mo stretchy="false">−</mo>
          <mn>5</mn>
        </mrow>
      </msup>
    </mrow>
    <annotation encoding="StarMath 5.0">(2 over 3 )^{ -3 } times ( 2 over 3 )^{ -5 }</annotation>
  </semantics>
</math>
</file>

<file path=Object 9/content.xml><?xml version="1.0" encoding="utf-8"?>
<math xmlns="http://www.w3.org/1998/Math/MathML" display="block">
  <semantics>
    <msup>
      <mi>a</mi>
      <mi>n</mi>
    </msup>
    <annotation encoding="StarMath 5.0">a^n</annotation>
  </semantics>
</math>
</file>