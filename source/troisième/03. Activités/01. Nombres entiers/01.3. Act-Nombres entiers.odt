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2010000032D0000019EEC5868611FD92DA5.png" manifest:media-type="image/png"/>
  <manifest:file-entry manifest:full-path="Pictures/10000201000003310000011FAB6FF56DAC9C58F0.png" manifest:media-type="image/png"/>
  <manifest:file-entry manifest:full-path="Pictures/10000201000003170000010198E8EC1077EDB752.png" manifest:media-type="image/png"/>
  <manifest:file-entry manifest:full-path="Pictures/10000201000003270000015F01B5298B557DE064.png" manifest:media-type="image/png"/>
  <manifest:file-entry manifest:full-path="Pictures/100002010000032800000210FD2F37377B7EEB85.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OpenDyslexic" svg:font-family="OpenDyslexic"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Table_20_Contents">
      <style:text-properties style:font-name="OpenDyslexic" officeooo:rsid="0008d996" officeooo:paragraph-rsid="0008d996"/>
    </style:style>
    <style:style style:name="P2" style:family="paragraph" style:parent-style-name="Standard">
      <style:text-properties style:font-name="OpenDyslexic"/>
    </style:style>
    <style:style style:name="P3" style:family="paragraph" style:parent-style-name="Standard">
      <style:text-properties style:font-name="OpenDyslexic" style:text-underline-style="solid" style:text-underline-width="auto" style:text-underline-color="font-color" officeooo:rsid="0008d996" officeooo:paragraph-rsid="0008d996"/>
    </style:style>
    <style:style style:name="P4" style:family="paragraph" style:parent-style-name="Standard">
      <style:text-properties style:font-name="OpenDyslexic" style:text-underline-style="none" officeooo:rsid="0008d996" officeooo:paragraph-rsid="0008d996"/>
    </style:style>
    <style:style style:name="P5" style:family="paragraph" style:parent-style-name="Standard">
      <style:text-properties style:font-name="OpenDyslexic" style:text-underline-style="solid" style:text-underline-width="auto" style:text-underline-color="font-color" officeooo:rsid="002014a3" officeooo:paragraph-rsid="0008d996"/>
    </style:style>
    <style:style style:name="P6" style:family="paragraph" style:parent-style-name="Standard">
      <style:text-properties style:font-name="OpenDyslexic" style:text-underline-style="solid" style:text-underline-width="auto" style:text-underline-color="font-color" officeooo:rsid="001e6cd7" officeooo:paragraph-rsid="0008d996"/>
    </style:style>
    <style:style style:name="P7" style:family="paragraph" style:parent-style-name="Standard">
      <style:text-properties style:font-name="OpenDyslexic" style:text-underline-style="solid" style:text-underline-width="auto" style:text-underline-color="font-color" officeooo:rsid="001e9bfb" officeooo:paragraph-rsid="0008d996"/>
    </style:style>
    <style:style style:name="P8" style:family="paragraph" style:parent-style-name="Standard">
      <style:text-properties style:font-name="OpenDyslexic" style:text-underline-style="none" officeooo:rsid="001e9bfb" officeooo:paragraph-rsid="0008d996"/>
    </style:style>
    <style:style style:name="T1" style:family="text">
      <style:text-properties officeooo:rsid="0008d996"/>
    </style:style>
    <style:style style:name="T2" style:family="text">
      <style:text-properties style:text-underline-style="none"/>
    </style:style>
    <style:style style:name="T3" style:family="text">
      <style:text-properties style:text-underline-style="none" officeooo:rsid="001e9bfb"/>
    </style:style>
    <style:style style:name="T4" style:family="text">
      <style:text-properties style:text-underline-style="none" officeooo:rsid="002014a3"/>
    </style:style>
    <style:style style:name="T5" style:family="text">
      <style:text-properties style:text-position="super 5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table-cell table:style-name="Tableau1.A1" office:value-type="string">
            <text:p text:style-name="P1">Collège A.Lejeune <text:s text:c="66"/>3ème</text:p>
            <text:p text:style-name="P1">Exercices en groupe </text:p>
          </table:table-cell>
        </table:table-row>
      </table:table>
      <text:p text:style-name="P2"/>
      <text:p text:style-name="P3">Exercice 1 :</text:p>
      <text:p text:style-name="P3"><draw:frame draw:style-name="fr1" draw:name="Image1" text:anchor-type="paragraph" svg:width="17cm" svg:height="5.971cm" draw:z-index="0"><draw:image xlink:href="Pictures/10000201000003310000011FAB6FF56DAC9C58F0.png" xlink:type="simple" xlink:show="embed" xlink:actuate="onLoad" loext:mime-type="image/png"/></draw:frame>Exercice 2 :</text:p>
      <text:p text:style-name="P3"><draw:frame draw:style-name="fr1" draw:name="Image2" text:anchor-type="paragraph" svg:width="17cm" svg:height="5.523cm" draw:z-index="1"><draw:image xlink:href="Pictures/10000201000003170000010198E8EC1077EDB752.png" xlink:type="simple" xlink:show="embed" xlink:actuate="onLoad" loext:mime-type="image/png"/></draw:frame><draw:frame draw:style-name="fr2" draw:name="Image3" text:anchor-type="paragraph" svg:x="-0.206cm" svg:y="7.945cm" svg:width="17cm" svg:height="7.394cm" draw:z-index="2"><draw:image xlink:href="Pictures/10000201000003270000015F01B5298B557DE064.png" xlink:type="simple" xlink:show="embed" xlink:actuate="onLoad" loext:mime-type="image/png"/></draw:frame>Exercice 3 :</text:p>
      <text:p text:style-name="P4"><draw:frame draw:style-name="fr2" draw:name="Image4" text:anchor-type="paragraph" svg:x="0cm" svg:y="0.06cm" svg:width="17cm" svg:height="11.107cm" draw:z-index="3"><draw:image xlink:href="Pictures/100002010000032800000210FD2F37377B7EEB85.png" xlink:type="simple" xlink:show="embed" xlink:actuate="onLoad" loext:mime-type="image/png"/></draw:frame><text:soft-page-break/></text:p>
      <text:p text:style-name="P6"><draw:frame draw:style-name="fr2" draw:name="Image5" text:anchor-type="paragraph" svg:x="0.323cm" svg:y="0.644cm" svg:width="17cm" svg:height="8.657cm" draw:z-index="4"><draw:image xlink:href="Pictures/100002010000032D0000019EEC5868611FD92DA5.png" xlink:type="simple" xlink:show="embed" xlink:actuate="onLoad" loext:mime-type="image/png"/></draw:frame></text:p>
      <text:p text:style-name="P6"/>
      <text:p text:style-name="P6"/>
      <text:p text:style-name="P6"/>
      <text:p text:style-name="P6"/>
      <text:p text:style-name="P6"/>
      <text:p text:style-name="P6"><text:soft-page-break/></text:p>
      <text:p text:style-name="P6">Exercice <text:span text:style-name="T1">4</text:span> :<text:span text:style-name="T2"> <text:s text:c="5"/>BREVET</text:span></text:p>
      <text:p text:style-name="P6"><text:span text:style-name="T2">Pierre a gagné 84 sucettes et 147 bonbons à un jeu. Étant très généreux, et ayant surtout très peur du dentiste, il décide de les partager avec des amis. Pour ne pas faire de jaloux, chacun doit avoir le même nombre de sucettes </text:span><text:span text:style-name="T3">et le même nombre de bonbons.</text:span></text:p>
      <text:p text:style-name="P8">1) Combien de personnes au maximum pourront bénéficier de ces friandises (Pierre étant inclus dans ces personnes) ? Expliquer votre raisonnement.</text:p>
      <text:p text:style-name="P8">2) Combien de sucettes et de bonbons aura alors chaque personne ?</text:p>
      <text:p text:style-name="P8"/>
      <text:p text:style-name="P7">Exercice 7 :</text:p>
      <text:p text:style-name="P8">1. Calculer le PGCD des nombres 135 et 210.</text:p>
      <text:p text:style-name="P8">2. Dans une salle de bains, on veut recouvrir le mur situé au dessus de la baignoire avec un nombre entier de carreaux de faïence de forme carrée dont le côté est un nombre entier de centimètres le plus grand possible.</text:p>
      <text:p text:style-name="P8">a) Déterminer la longueur, en cm, du côté d’un carreau, sachant que le mur mesure 210cm de hauteur et 135 cm de largeur.</text:p>
      <text:p text:style-name="P8">b) Combien faudra-t-il alors de carreaux ?</text:p>
      <text:p text:style-name="P8"/>
      <text:p text:style-name="P7">Exercice <text:span text:style-name="T1">5</text:span> :</text:p>
      <text:p text:style-name="P8">Pour le 1<text:span text:style-name="T5">er</text:span> Mai, Julie dispose de 182 brins de muguet et 78 roses.</text:p>
      <text:p text:style-name="P8">Elle veut faire le plus grand nombre de bouquets identiques en utilisant toutes ses fleurs.</text:p>
      <text:p text:style-name="P8">Combien de bouquets identiques pourra-t-elle faire ?</text:p>
      <text:p text:style-name="P8">Quelle sera la composition de chaque bouquet ?</text:p>
      <text:p text:style-name="P8"/>
      <text:p text:style-name="P7">Exercice <text:span text:style-name="T1">6</text:span> :</text:p>
      <text:p text:style-name="P8">1) Trouver le PGCD de 6 209 et 4 435 en détaillant la méthode.</text:p>
      <text:p text:style-name="P7"><text:span text:style-name="T2">2) En utilisant le résultat de la question précédente, expliquer pourquoi la fraction </text:span><text:span text:style-name="T2"><draw:frame draw:style-name="fr3" draw:name="Objet1" text:anchor-type="as-char" svg:y="-0.891cm" svg:width="1.423cm" svg:height="1.54cm" draw:z-index="6"><draw:object xlink:href="./Object 2" xlink:type="simple" xlink:show="embed" xlink:actuate="onLoad"/><draw:image xlink:href="./ObjectReplacements/Object 2" xlink:type="simple" xlink:show="embed" xlink:actuate="onLoad"/><svg:desc>formule</svg:desc></draw:frame></text:span><text:span text:style-name="T4">n’est pas irréductible.</text:span></text:p>
      <text:p text:style-name="P5"><text:span text:style-name="T2">3) Donner la fraction irréductible égale à </text:span><text:span text:style-name="T2"><draw:frame draw:style-name="fr3" draw:name="Objet2" text:anchor-type="as-char" svg:y="-0.891cm" svg:width="1.381cm" svg:height="1.54cm" draw:z-index="5"><draw:object xlink:href="./Object 1" xlink:type="simple" xlink:show="embed" xlink:actuate="onLoad"/><draw:image xlink:href="./ObjectReplacements/Object 1" xlink:type="simple" xlink:show="embed" xlink:actuate="onLoad"/><svg:desc>formule</svg:desc></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OpenDyslexic" svg:font-family="OpenDyslexic"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26T23:31:17.785000000</meta:creation-date>
    <dc:date>2021-10-03T15:23:53.496000000</dc:date>
    <meta:editing-duration>P6DT12H39M46S</meta:editing-duration>
    <meta:editing-cycles>1</meta:editing-cycles>
    <meta:document-statistic meta:table-count="1" meta:image-count="5" meta:object-count="2" meta:page-count="3" meta:paragraph-count="23" meta:word-count="271" meta:character-count="1563" meta:non-whitespace-character-count="1242"/>
    <meta:generator>LibreOffice/6.2.3.2$Windows_X86_64 LibreOffice_project/aecc05fe267cc68dde00352a451aa867b3b546ac</meta:generator>
  </office:meta>
</office:document-meta>
</file>

<file path=Object 1/content.xml><?xml version="1.0" encoding="utf-8"?>
<math xmlns="http://www.w3.org/1998/Math/MathML" display="block">
  <semantics>
    <mfrac>
      <mn>4435</mn>
      <mn>6209</mn>
    </mfrac>
    <annotation encoding="StarMath 5.0">{ 4435 } over { 6209 }</annotation>
  </semantics>
</math>
</file>

<file path=Object 2/content.xml><?xml version="1.0" encoding="utf-8"?>
<math xmlns="http://www.w3.org/1998/Math/MathML" display="block">
  <semantics>
    <mfrac>
      <mrow>
        <mn>4</mn>
        <mn>435</mn>
      </mrow>
      <mrow>
        <mn>6</mn>
        <mn>209</mn>
      </mrow>
    </mfrac>
    <annotation encoding="StarMath 5.0">{4 435} over {6 209}</annotation>
  </semantics>
</math>
</file>