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c6482" officeooo:paragraph-rsid="001c6482"/>
    </style:style>
    <style:style style:name="P2" style:family="paragraph" style:parent-style-name="Table_20_Contents" style:list-style-name="L1">
      <style:text-properties style:font-name="OpenDyslexic" officeooo:rsid="001cee4b" officeooo:paragraph-rsid="001edc9b"/>
    </style:style>
    <style:style style:name="P3" style:family="paragraph" style:parent-style-name="Table_20_Contents">
      <style:text-properties style:font-name="OpenDyslexic" style:text-underline-style="solid" style:text-underline-width="auto" style:text-underline-color="font-color" officeooo:rsid="00220594" officeooo:paragraph-rsid="00220594"/>
    </style:style>
    <style:style style:name="P4" style:family="paragraph" style:parent-style-name="Table_20_Contents" style:list-style-name="L2">
      <style:text-properties style:font-name="OpenDyslexic" style:text-underline-style="solid" style:text-underline-width="auto" style:text-underline-color="font-color" officeooo:rsid="00220594" officeooo:paragraph-rsid="00220594"/>
    </style:style>
    <style:style style:name="P5" style:family="paragraph" style:parent-style-name="Table_20_Contents" style:list-style-name="L3">
      <style:text-properties style:font-name="OpenDyslexic" style:text-underline-style="solid" style:text-underline-width="auto" style:text-underline-color="font-color" officeooo:rsid="00220594" officeooo:paragraph-rsid="00220594"/>
    </style:style>
    <style:style style:name="P6" style:family="paragraph" style:parent-style-name="Table_20_Contents" style:list-style-name="L3">
      <style:text-properties style:font-name="OpenDyslexic" style:text-underline-style="solid" style:text-underline-width="auto" style:text-underline-color="font-color" officeooo:rsid="0023a50d" officeooo:paragraph-rsid="0023a50d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c6482" officeooo:paragraph-rsid="001edc9b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edc9b" officeooo:paragraph-rsid="001edc9b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202b84" officeooo:paragraph-rsid="00202b84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21a7f3" officeooo:paragraph-rsid="0021a7f3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220594" officeooo:paragraph-rsid="00220594"/>
    </style:style>
    <style:style style:name="P12" style:family="paragraph" style:parent-style-name="Standard">
      <style:text-properties style:font-name="OpenDyslexic" style:text-underline-style="none" officeooo:rsid="001c6482" officeooo:paragraph-rsid="001edc9b"/>
    </style:style>
    <style:style style:name="P13" style:family="paragraph" style:parent-style-name="Standard">
      <style:text-properties style:font-name="OpenDyslexic" style:text-underline-style="none" officeooo:rsid="001db5fa"/>
    </style:style>
    <style:style style:name="P14" style:family="paragraph" style:parent-style-name="Standard">
      <style:text-properties style:font-name="OpenDyslexic" style:text-underline-style="none" officeooo:rsid="001db5fa" officeooo:paragraph-rsid="001edc9b"/>
    </style:style>
    <style:style style:name="P15" style:family="paragraph" style:parent-style-name="Standard">
      <style:text-properties style:font-name="OpenDyslexic" style:text-underline-style="none" officeooo:rsid="001edc9b" officeooo:paragraph-rsid="001edc9b"/>
    </style:style>
    <style:style style:name="P16" style:family="paragraph" style:parent-style-name="Standard">
      <style:text-properties style:font-name="OpenDyslexic" style:text-underline-style="none" officeooo:rsid="00202b84" officeooo:paragraph-rsid="00202b84"/>
    </style:style>
    <style:style style:name="P17" style:family="paragraph" style:parent-style-name="Standard">
      <style:text-properties style:font-name="OpenDyslexic" style:text-underline-style="none" officeooo:rsid="0021a7f3" officeooo:paragraph-rsid="0021a7f3"/>
    </style:style>
    <style:style style:name="P18" style:family="paragraph" style:parent-style-name="Standard">
      <style:text-properties style:font-name="OpenDyslexic" style:text-underline-style="none" officeooo:rsid="00220594" officeooo:paragraph-rsid="00220594"/>
    </style:style>
    <style:style style:name="T1" style:family="text">
      <style:text-properties officeooo:rsid="001db5fa"/>
    </style:style>
    <style:style style:name="T2" style:family="text">
      <style:text-properties officeooo:rsid="001edc9b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6"/>3ème</text:p>
            <text:p text:style-name="P1">Exercices de groupe <text:s text:c="18"/></text:p>
          </table:table-cell>
        </table:table-row>
      </table:table>
      <text:p text:style-name="P1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Règles :<text:span text:style-name="T3"> </text:span></text:p>
            <text:list xml:id="list1704988666" text:style-name="L2">
              <text:list-item>
                <text:p text:style-name="P4"><text:span text:style-name="T3">Il faut des groupes de maximum 4 élèves.</text:span></text:p>
              </text:list-item>
              <text:list-item>
                <text:p text:style-name="P4"><text:span text:style-name="T3">Il faut travailler dans le calme et en harmonie</text:span></text:p>
              </text:list-item>
              <text:list-item>
                <text:p text:style-name="P4"><text:span text:style-name="T3">Il faut que l’ensemble des élèves participent au travail</text:span></text:p>
              </text:list-item>
              <text:list-item>
                <text:p text:style-name="P4"><text:span text:style-name="T3">Vous avez une copie A3 (grande feuille) à rendre par groupe</text:span></text:p>
              </text:list-item>
              <text:list-item>
                <text:p text:style-name="P4"><text:span text:style-name="T3">Vous avez des copies A4 à utiliser comme brouillon</text:span></text:p>
              </text:list-item>
              <text:list-item>
                <text:p text:style-name="P4"><text:span text:style-name="T3">Vous pouvez demander de l’aide</text:span></text:p>
              </text:list-item>
              <text:list-item>
                <text:p text:style-name="P4"><text:span text:style-name="T3">Il faut réfléchir ensemble.</text:span></text:p>
              </text:list-item>
              <text:list-item>
                <text:p text:style-name="P4"><text:span text:style-name="T3">Les exercices peuvent être fait dans le désordre</text:span></text:p>
              </text:list-item>
            </text:list>
          </table:table-cell>
        </table:table-row>
      </table:table>
      <text:p text:style-name="P13"/>
      <text:p text:style-name="P13"/>
      <text:p text:style-name="P8">Exercice 1 :</text:p>
      <text:p text:style-name="P15">Pour chaque proposition, indiquer si elle est vraie ou fausse. Justifier chaque réponse.</text:p>
      <text:p text:style-name="P15">a) Le nombre 880 est un multiple de 11.</text:p>
      <text:p text:style-name="P15">b) 175 est un diviseur de 25.</text:p>
      <text:p text:style-name="P15">c) Le nombre 45 divise 15.</text:p>
      <text:p text:style-name="P15">d) Le nombre 340 est divisible par 17.</text:p>
      <text:p text:style-name="P15"/>
      <text:p text:style-name="P7">Exercice <text:span text:style-name="T2">2</text:span> :</text:p>
      <table:table table:name="Tableau2" table:style-name="Tableau2">
        <table:table-column table:style-name="Tableau2.A"/>
        <table:table-row>
          <table:table-cell table:style-name="Tableau2.A1" office:value-type="string">
            <text:list xml:id="list3837528490" text:style-name="L1">
              <text:list-item>
                <text:p text:style-name="P2">Je suis un nombre entier strictement compris entre 100 et 1000.</text:p>
              </text:list-item>
              <text:list-item>
                <text:p text:style-name="P2">Je suis à la fois <text:span text:style-name="T1">divisible par 5 et par 9.</text:span></text:p>
              </text:list-item>
            </text:list>
          </table:table-cell>
        </table:table-row>
      </table:table>
      <text:p text:style-name="P12"/>
      <text:p text:style-name="P14">1) Ce nombre peut-il être égal à :</text:p>
      <text:p text:style-name="P14">a) 545 ? <text:s text:c="12"/>b) 324 ? <text:s text:c="10"/>c) 720 ?</text:p>
      <text:p text:style-name="P14">2) Des nombres <text:span text:style-name="T2">respectant ces contraintes, lequel est le plus grand ? Le plus petit ?</text:span></text:p>
      <text:p text:style-name="P14"/>
      <text:p text:style-name="P9">Exercice 3 :</text:p>
      <text:p text:style-name="P16">Le quotient d’une division euclidienne est 24 et son diviseur est 9.</text:p>
      <text:p text:style-name="P16"><text:soft-page-break/>1) Quels sont tous les restes possibles ?</text:p>
      <text:p text:style-name="P16">2) En déduire tous les dividendes possibles de cette division.</text:p>
      <text:p text:style-name="P16"/>
      <text:p text:style-name="P9">Exercice 4 :</text:p>
      <text:p text:style-name="P16">Est-il vrai que les nombres 51 et 21 ont le même nombre de diviseurs ?</text:p>
      <text:p text:style-name="P16">Justifier la réponse ?</text:p>
      <text:p text:style-name="P16"/>
      <text:p text:style-name="P10">Exercice 5 :</text:p>
      <text:p text:style-name="P17">Un petit garçon raconte ses vacances :</text:p>
      <text:p text:style-name="P17">Il y a eu 11 jours de pluie. Pendant ces 11 jours, quand il pleuvait le matin, il faisait beau l’après midi. Et s’il pleuvait l’après-midi, il faisait beau le matin suivant.</text:p>
      <text:p text:style-name="P17">Au total, ce petit garçon a eu 9 matinées et 12 après-midi sans pluie.</text:p>
      <text:p text:style-name="P17">Combien a-t-il eu de jours de vacances ?</text:p>
      <text:p text:style-name="P17"/>
      <text:p text:style-name="P10">Exercice 6 :</text:p>
      <text:p text:style-name="P17">Pour les vacances, un centre sportif accueille 120 adolescents.</text:p>
      <text:p text:style-name="P17">L’organisateur veut répartir tous les adolescents présents en plusieurs groupes de même effectif.</text:p>
      <text:p text:style-name="P17">Le nombre d’adolescents par groupe doit être strictement compris entre 15 et 30.</text:p>
      <text:p text:style-name="P17">1) Écrire la liste des diviseurs de 120.</text:p>
      <text:p text:style-name="P17">2) Donner toutes les répartitions possibles des groupes constitués.</text:p>
      <text:p text:style-name="P17"/>
      <text:p text:style-name="P11">Exercice 7 :</text:p>
      <text:p text:style-name="P18">Deux nombres entiers sont divisibles par 13.</text:p>
      <text:p text:style-name="P18">1) Démontrer que leur somme est divisible par 13.</text:p>
      <text:p text:style-name="P18">2) En est-il de même pour leur produit ?</text:p>
      <text:p text:style-name="P18">Justifier la réponse.</text:p>
      <text:p text:style-name="P18"/>
      <text:p text:style-name="P11">Exercice 8 :</text:p>
      <text:p text:style-name="P11"><text:span text:style-name="T3">a) Déterminer le PGCD de 1 147 et 925 à l’aide de l’algorithme des soustractions successive.</text:span></text:p>
      <text:p text:style-name="P11"><text:span text:style-name="T3">b) Combien de soustractions a-t-on effectués ?</text:span></text:p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3">Objectif :</text:p>
            <text:list xml:id="list4061344441" text:style-name="L3">
              <text:list-item>
                <text:p text:style-name="P5"><text:span text:style-name="T3">être capable de travailler en groupe : <text:s text:c="4"/>….../5 </text:span></text:p>
                <text:list>
                  <text:list-item>
                    <text:p text:style-name="P6"><text:span text:style-name="T3">prendre la parole et parler à l’ensemble du groupe</text:span></text:p>
                  </text:list-item>
                  <text:list-item>
                    <text:p text:style-name="P6"><text:span text:style-name="T3">proposer ses idées dans le calme</text:span></text:p>
                  </text:list-item>
                  <text:list-item>
                    <text:p text:style-name="P6"><text:span text:style-name="T3">être capable d’écouter les idées des autres</text:span></text:p>
                  </text:list-item>
                </text:list>
              </text:list-item>
              <text:list-item>
                <text:p text:style-name="P5"><text:span text:style-name="T3">être capable de faire des recherches en maths : ….../5</text:span></text:p>
                <text:list>
                  <text:list-item>
                    <text:p text:style-name="P6"><text:span text:style-name="T3">essayer, se tromper, ré-essayer et continuer sans abandonner</text:span></text:p>
                  </text:list-item>
                </text:list>
              </text:list-item>
              <text:list-item>
                <text:p text:style-name="P6"><text:span text:style-name="T3">travailler en respectant les consignes : …./2</text:span></text:p>
                <text:list>
                  <text:list-item>
                    <text:p text:style-name="P6"><text:span text:style-name="T3">discuter seulement avec son groupe et seulement de maths et rester sérieux et actif dans le travail durant une heure.</text:span></text:p>
                  </text:list-item>
                </text:list>
              </text:list-item>
              <text:list-item>
                <text:p text:style-name="P6"><text:span text:style-name="T3">exposer et utiliser ses connaissances en maths : …../3</text:span></text:p>
                <text:list>
                  <text:list-item>
                    <text:p text:style-name="P6"><text:span text:style-name="T3">être capable d’utiliser ses connaissances de cours pour résoudre les problèmes</text:span></text:p>
                  </text:list-item>
                </text:list>
              </text:list-item>
              <text:list-item>
                <text:p text:style-name="P6"><text:span text:style-name="T3">être capable de résoudre plusieurs problèmes en une heure : …./5</text:span></text:p>
                <text:list>
                  <text:list-item>
                    <text:p text:style-name="P6"><text:span text:style-name="T3">résoudre plusieurs exercices en moins d’une heure</text:span></text:p>
                  </text:list-item>
                </text:list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20:48:09.064000000</meta:creation-date>
    <dc:date>2021-09-14T22:34:17.254000000</dc:date>
    <meta:editing-duration>PT23M3S</meta:editing-duration>
    <meta:editing-cycles>1</meta:editing-cycles>
    <meta:document-statistic meta:table-count="4" meta:image-count="0" meta:object-count="0" meta:page-count="3" meta:paragraph-count="62" meta:word-count="543" meta:character-count="3032" meta:non-whitespace-character-count="2460"/>
    <meta:generator>LibreOffice/6.2.3.2$Windows_X86_64 LibreOffice_project/aecc05fe267cc68dde00352a451aa867b3b546ac</meta:generator>
  </office:meta>
</office:document-meta>
</file>