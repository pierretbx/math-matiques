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9500000114F0CD789EE4A8B1D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Table_20_Contents">
      <style:text-properties style:font-name="OpenDyslexic" officeooo:rsid="001d34e2" officeooo:paragraph-rsid="001d34e2"/>
    </style:style>
    <style:style style:name="P2" style:family="paragraph" style:parent-style-name="Table_20_Contents">
      <style:text-properties style:font-name="OpenDyslexic" officeooo:rsid="001e6cd7" officeooo:paragraph-rsid="001e6cd7"/>
    </style:style>
    <style:style style:name="P3" style:family="paragraph" style:parent-style-name="Standard">
      <style:text-properties style:font-name="OpenDyslexic"/>
    </style:style>
    <style:style style:name="P4" style:family="paragraph" style:parent-style-name="Standard">
      <style:text-properties style:font-name="OpenDyslexic" officeooo:rsid="001d34e2" officeooo:paragraph-rsid="001d34e2"/>
    </style:style>
    <style:style style:name="P5" style:family="paragraph" style:parent-style-name="Standard">
      <style:text-properties style:font-name="OpenDyslexic" style:text-underline-style="solid" style:text-underline-width="auto" style:text-underline-color="font-color" officeooo:rsid="001d34e2" officeooo:paragraph-rsid="001d34e2"/>
    </style:style>
    <style:style style:name="P6" style:family="paragraph" style:parent-style-name="Standard">
      <style:text-properties style:font-name="OpenDyslexic" style:text-underline-style="solid" style:text-underline-width="auto" style:text-underline-color="font-color" officeooo:rsid="001e6cd7" officeooo:paragraph-rsid="001e6cd7"/>
    </style:style>
    <style:style style:name="P7" style:family="paragraph" style:parent-style-name="Standard">
      <style:text-properties style:font-name="OpenDyslexic" style:text-underline-style="solid" style:text-underline-width="auto" style:text-underline-color="font-color" officeooo:rsid="001e9bfb" officeooo:paragraph-rsid="001e9bfb"/>
    </style:style>
    <style:style style:name="P8" style:family="paragraph" style:parent-style-name="Standard">
      <style:text-properties style:font-name="OpenDyslexic" style:text-underline-style="solid" style:text-underline-width="auto" style:text-underline-color="font-color" officeooo:rsid="002014a3" officeooo:paragraph-rsid="002014a3"/>
    </style:style>
    <style:style style:name="P9" style:family="paragraph" style:parent-style-name="Standard">
      <style:text-properties style:font-name="OpenDyslexic" style:text-underline-style="none" officeooo:rsid="001d34e2" officeooo:paragraph-rsid="001d34e2"/>
    </style:style>
    <style:style style:name="P10" style:family="paragraph" style:parent-style-name="Standard">
      <style:text-properties style:font-name="OpenDyslexic" style:text-underline-style="none" officeooo:rsid="001e6cd7" officeooo:paragraph-rsid="001e6cd7"/>
    </style:style>
    <style:style style:name="P11" style:family="paragraph" style:parent-style-name="Standard">
      <style:text-properties style:font-name="OpenDyslexic" style:text-underline-style="none" officeooo:rsid="001e9bfb" officeooo:paragraph-rsid="001e9bfb"/>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9bfb"/>
    </style:style>
    <style:style style:name="T4" style:family="text">
      <style:text-properties style:text-underline-style="none" officeooo:rsid="002014a3"/>
    </style:style>
    <style:style style:name="T5" style:family="text">
      <style:text-properties officeooo:rsid="001e6cd7"/>
    </style:style>
    <style:style style:name="T6" style:family="text">
      <style:text-properties style:text-position="super 58%"/>
    </style:style>
    <style:style style:name="T7"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Collège A. Lejeune <text:s text:c="64"/>3ème</text:p>
            <text:p text:style-name="P1">Travail en groupe <text:s text:c="16"/>Nombre premier</text:p>
          </table:table-cell>
        </table:table-row>
      </table:table>
      <text:p text:style-name="Standard"/>
      <text:p text:style-name="Standard"/>
      <table:table table:name="Tableau2" table:style-name="Tableau2">
        <table:table-column table:style-name="Tableau2.A"/>
        <table:table-row>
          <table:table-cell table:style-name="Tableau2.A1" office:value-type="string">
            <text:p text:style-name="P1">Définition : Un nombre premier est un nombre entier naturel (supérieur ou égale à 2) s’il admet exactement 2 diviseurs : 1 et lui même.</text:p>
          </table:table-cell>
        </table:table-row>
      </table:table>
      <text:p text:style-name="P3"/>
      <text:p text:style-name="P4"><text:span text:style-name="T1">Exemple :</text:span> 13 est un nombre premier car il admet 2 diviseurs : 1 et 13.</text:p>
      <text:p text:style-name="P4"/>
      <text:p text:style-name="P5">Exercice 1 :</text:p>
      <text:p text:style-name="P9">1) Observer le tableau de nombres ci-dessous :</text:p>
      <text:p text:style-name="P9"><draw:frame draw:style-name="fr1" draw:name="Image1" text:anchor-type="paragraph" svg:width="10.717cm" svg:height="7.303cm" draw:z-index="0"><draw:image xlink:href="Pictures/100002010000019500000114F0CD789EE4A8B1D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2) Barrer 1, puis barrer tous les multiples de 2 sauf 2.</text:p>
      <text:p text:style-name="P9">3) Le premier nombre non barré après 2 est 3. Barrer tous les multiples de 3 sauf 3.</text:p>
      <text:p text:style-name="P9">4) Le premier nombre non barré après 3 est 5. Barrer tous les multiples de 5 sauf 5.</text:p>
      <text:p text:style-name="P9">5) Continue ainsi le procédé.</text:p>
      <table:table table:name="Tableau3" table:style-name="Tableau3">
        <table:table-column table:style-name="Tableau3.A"/>
        <table:table-row>
          <table:table-cell table:style-name="Tableau3.A1" office:value-type="string">
            <text:p text:style-name="P2">Appeler un professeur pour vérification</text:p>
          </table:table-cell>
        </table:table-row>
      </table:table>
      <text:p text:style-name="P9"/>
      <text:p text:style-name="P6">Exercice 2 :</text:p>
      <text:p text:style-name="P10">VRAI ou Faux ? Justifier votre réponse.</text:p>
      <text:p text:style-name="P10">1) La somme de deux nombres premiers est toujours un nombre premier.</text:p>
      <text:p text:style-name="P10">2) L’entier 111 est un nombre premier.</text:p>
      <text:p text:style-name="P10">3) Aucun nombre pair n’est premier.</text:p>
      <text:p text:style-name="P10"><text:soft-page-break/>4) Tous les nombres impairs sont des nombres premiers.</text:p>
      <text:p text:style-name="P10">5) La différence entre deux nombres premiers consécutifs (qui se suivent) est toujours 2.</text:p>
      <text:p text:style-name="P10">6) Aucun multiple de 5 n’est premier.</text:p>
      <text:p text:style-name="P10"/>
      <text:p text:style-name="P6">Exercice 3 :</text:p>
      <text:p text:style-name="P10">1) Tiphaine dit à Johan : « 53 est un nombre premier. » Johan lui répond : « Alors 106 aussi ! ». Tiphaine et Johan ont-ils raison ? Justifier votre réponse.</text:p>
      <text:p text:style-name="P10"/>
      <text:p text:style-name="P10">2) Julia annonce : « La date du jour de mon anniversaire est un nombre premier plus grand que 10 et dont la somme des chiffres est 11. » Quelle est la date du jour de son anniversaire ?</text:p>
      <text:p text:style-name="P10"/>
      <text:p text:style-name="P6">Exercice 4 :</text:p>
      <text:p text:style-name="P10">Lorsque je divise 134 par ce nombre le reste est 2.</text:p>
      <text:p text:style-name="P10">Lorsque je divise 183 par ce nombre le reste est 3.</text:p>
      <text:p text:style-name="P10">Quel peut-être ce nombre ?</text:p>
      <text:p text:style-name="P10">Donne toutes les solutions possibles.</text:p>
      <text:p text:style-name="P9"/>
      <text:p text:style-name="P5">Exercice <text:span text:style-name="T5">5</text:span> :</text:p>
      <text:p text:style-name="P5"><text:span text:style-name="T2">1) Donner la liste des diviseurs de 154 puis la liste des diviseurs de 182.</text:span></text:p>
      <text:p text:style-name="P5"><text:span text:style-name="T2">2) Dans un centre de loisir, on veut répartir la totalité des 154 garçons et des 182 filles dans des groupes tous de même composition (c’est à dire que tous les groupes compteront le même nombre de garçons et le même nombre de filles).</text:span></text:p>
      <text:p text:style-name="P5"><text:span text:style-name="T2"><text:s text:c="4"/>a) Est-il possible de réaliser 2 groupes ?</text:span></text:p>
      <text:p text:style-name="P5"><text:span text:style-name="T2"><text:s text:c="4"/>b) Est-il possible de réaliser 11 groupes ?</text:span></text:p>
      <text:p text:style-name="P5"><text:span text:style-name="T2">c) Combien de groupes peut-on réaliser ? Donner toutes les possibilités.</text:span></text:p>
      <text:p text:style-name="P5"><text:span text:style-name="T2"/></text:p>
      <text:p text:style-name="P6">Exercice 6 :<text:span text:style-name="T2"> <text:s text:c="5"/>BREVET</text:span></text:p>
      <text:p text:style-name="P6"><text:span text:style-name="T2">Pierre a gagné 84 sucettes et 147 bonbons à un jeu. Étant très généreux, et ayant surtout très peur du dentiste, il décide de les partager avec des </text:span><text:soft-page-break/><text:span text:style-name="T2">amis. Pour ne pas faire de jaloux, chacun doit avoir le même nombre de sucettes </text:span><text:span text:style-name="T3">et le même nombre de bonbons.</text:span></text:p>
      <text:p text:style-name="P7"><text:span text:style-name="T2">1) Combien de personnes au maximum pourront bénéficier de ces friandises (Pierre étant inclus dans ces personnes) ? Expliquer votre raisonnement.</text:span></text:p>
      <text:p text:style-name="P7"><text:span text:style-name="T2">2) Combien de sucettes et de bonbons aura alors chaque personne ?</text:span></text:p>
      <text:p text:style-name="P7"><text:span text:style-name="T2"/></text:p>
      <text:p text:style-name="P7">Exercice 7 :</text:p>
      <text:p text:style-name="P11">1. Calculer le PGCD des nombres 135 et 210.</text:p>
      <text:p text:style-name="P11">2. Dans une salle de bains, on veut recouvrir le mur situé au dessus de la baignoire avec un nombre entier de carreaux de faïence de forme carrée dont le côté est un nombre entier de centimètres le plus grand possible.</text:p>
      <text:p text:style-name="P11">a) Déterminer la longueur, en cm, du côté d’un carreau, sachant que le mur mesure 210cm de hauteur et 135 cm de largeur.</text:p>
      <text:p text:style-name="P11">b) Combien faudra-t-il alors de carreaux ?</text:p>
      <text:p text:style-name="P11"/>
      <text:p text:style-name="P7">Exercice 8 :</text:p>
      <text:p text:style-name="P11">Pour le 1<text:span text:style-name="T6">er</text:span> Mai, Julie dispose de 182 brins de muguet et 78 roses.</text:p>
      <text:p text:style-name="P11">Elle veut faire le plus grand nombre de bouquets identiques en utilisant toutes ses fleurs.</text:p>
      <text:p text:style-name="P11">Combien de bouquets identiques pourra-t-elle faire ?</text:p>
      <text:p text:style-name="P11">Quelle sera la composition de chaque bouquet ?</text:p>
      <text:p text:style-name="P11"/>
      <text:p text:style-name="P7">Exercice 9 :</text:p>
      <text:p text:style-name="P7"><text:span text:style-name="T2">1) Trouver le PGCD de 6 209 et 4 435 en détaillant la méthode.</text:span></text:p>
      <text:p text:style-name="P7"><text:span text:style-name="T2">2) En utilisant le résultat de la question précédente, expliquer pourquoi la fraction </text:span><text:span text:style-name="T2"><draw:frame draw:style-name="fr2" draw:name="Objet1" text:anchor-type="as-char" svg:y="-0.891cm" svg:width="1.423cm" svg:height="1.54cm" draw:z-index="1"><draw:object xlink:href="./Object 1" xlink:type="simple" xlink:show="embed" xlink:actuate="onLoad"/><draw:image xlink:href="./ObjectReplacements/Object 1" xlink:type="simple" xlink:show="embed" xlink:actuate="onLoad"/></draw:frame></text:span><text:span text:style-name="T4">n’est pas irréductible.</text:span></text:p>
      <text:p text:style-name="P8"><text:span text:style-name="T4">3</text:span><text:span text:style-name="T2">) Donner la fraction irréductible égale à </text:span><text:span text:style-name="T2"><draw:frame draw:style-name="fr2" draw:name="Objet2" text:anchor-type="as-char" svg:y="-0.891cm" svg:width="1.381cm" svg:height="1.54cm" draw:z-index="2"><draw:object xlink:href="./Object 2" xlink:type="simple" xlink:show="embed" xlink:actuate="onLoad"/><draw:image xlink:href="./ObjectReplacements/Object 2"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0T21:37:33.512000000</meta:creation-date>
    <dc:date>2021-09-20T22:11:25.083000000</dc:date>
    <meta:editing-duration>PT1M8S</meta:editing-duration>
    <meta:editing-cycles>1</meta:editing-cycles>
    <meta:document-statistic meta:table-count="3" meta:image-count="1" meta:object-count="2" meta:page-count="3" meta:paragraph-count="51" meta:word-count="638" meta:character-count="3499" meta:non-whitespace-character-count="2818"/>
    <meta:generator>LibreOffice/6.2.3.2$Windows_X86_64 LibreOffice_project/aecc05fe267cc68dde00352a451aa867b3b546ac</meta:generator>
  </office:meta>
</office:document-meta>
</file>

<file path=Object 1/content.xml><?xml version="1.0" encoding="utf-8"?>
<math xmlns="http://www.w3.org/1998/Math/MathML" display="block">
  <semantics>
    <mfrac>
      <mrow>
        <mn>4</mn>
        <mn>435</mn>
      </mrow>
      <mrow>
        <mn>6</mn>
        <mn>209</mn>
      </mrow>
    </mfrac>
    <annotation encoding="StarMath 5.0">{4 435} over {6 209}</annotation>
  </semantics>
</math>
</file>

<file path=Object 2/content.xml><?xml version="1.0" encoding="utf-8"?>
<math xmlns="http://www.w3.org/1998/Math/MathML" display="block">
  <semantics>
    <mfrac>
      <mn>4435</mn>
      <mn>6209</mn>
    </mfrac>
    <annotation encoding="StarMath 5.0">{ 4435 } over { 6209 }</annotation>
  </semantics>
</math>
</file>