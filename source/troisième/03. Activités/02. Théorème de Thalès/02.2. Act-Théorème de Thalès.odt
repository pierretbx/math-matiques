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19D0000009826CA54CF92F3CB10.png" manifest:media-type="image/png"/>
  <manifest:file-entry manifest:full-path="Pictures/1000020100000191000000CE06C766F625FA30BC.png" manifest:media-type="image/png"/>
  <manifest:file-entry manifest:full-path="Pictures/100002010000011C000000F3CD3158C94283B1A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2.601cm" table:align="margins"/>
    </style:style>
    <style:style style:name="Tableau1.A" style:family="table-column">
      <style:table-column-properties style:column-width="12.601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OpenDyslexic" officeooo:rsid="001d5415" officeooo:paragraph-rsid="001d5415"/>
    </style:style>
    <style:style style:name="P2" style:family="paragraph" style:parent-style-name="Standard">
      <style:text-properties style:font-name="OpenDyslexic" style:text-underline-style="solid" style:text-underline-width="auto" style:text-underline-color="font-color" officeooo:rsid="001d5415" officeooo:paragraph-rsid="001d5415"/>
    </style:style>
    <style:style style:name="P3" style:family="paragraph" style:parent-style-name="Standard">
      <style:text-properties style:font-name="OpenDyslexic" style:text-underline-style="solid" style:text-underline-width="auto" style:text-underline-color="font-color" officeooo:rsid="001eb673" officeooo:paragraph-rsid="001eb673"/>
    </style:style>
    <style:style style:name="P4" style:family="paragraph" style:parent-style-name="Standard">
      <style:text-properties style:font-name="OpenDyslexic" style:text-underline-style="solid" style:text-underline-width="auto" style:text-underline-color="font-color" officeooo:rsid="001f4c42" officeooo:paragraph-rsid="001f4c42"/>
    </style:style>
    <style:style style:name="P5" style:family="paragraph" style:parent-style-name="Standard">
      <style:text-properties style:font-name="OpenDyslexic" style:text-underline-style="none" officeooo:rsid="001d5415" officeooo:paragraph-rsid="001d5415"/>
    </style:style>
    <style:style style:name="P6" style:family="paragraph" style:parent-style-name="Standard">
      <style:text-properties style:font-name="OpenDyslexic" style:text-underline-style="none" officeooo:rsid="001eb673" officeooo:paragraph-rsid="001eb673"/>
    </style:style>
    <style:style style:name="P7" style:family="paragraph" style:parent-style-name="Standard">
      <style:text-properties style:font-name="OpenDyslexic" style:text-underline-style="none" officeooo:rsid="001f4c42" officeooo:paragraph-rsid="001f4c42"/>
    </style:style>
    <style:style style:name="T1" style:family="text">
      <style:text-properties style:text-underline-style="none"/>
    </style:style>
    <style:style style:name="T2" style:family="text">
      <style:text-properties officeooo:rsid="001eb67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Collège A.Lejeune <text:s text:c="38"/>3ème B</text:p>
            <text:p text:style-name="P1">Exercices en groupe</text:p>
          </table:table-cell>
        </table:table-row>
      </table:table>
      <text:p text:style-name="Standard"/>
      <text:p text:style-name="P2">Exercice 1 :</text:p>
      <text:p text:style-name="P5">a) Donner les huit diviseurs de l’entier 30 et les huit diviseurs de l’entier 24.</text:p>
      <text:p text:style-name="P5">b) Quels sont les diviseurs communs aux entiers 30 et 24 ?</text:p>
      <text:p text:style-name="P5"/>
      <text:p text:style-name="P2">Exercice 2 :</text:p>
      <text:p text:style-name="P2"><text:span text:style-name="T1">1) Parmi les égalités suivantes, donner la division euclidienne de 375 par 14 :</text:span></text:p>
      <text:p text:style-name="P2"><text:span text:style-name="T1"/></text:p>
      <text:p text:style-name="P2"><text:span text:style-name="T1">a) </text:span><text:span text:style-name="T1"><draw:frame draw:style-name="fr4" draw:name="Objet1" text:anchor-type="as-char" svg:y="-0.527cm" svg:width="3.544cm" svg:height="0.73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<text:s text:c="3"/>b) </text:span><text:span text:style-name="T1"><draw:frame draw:style-name="fr4" draw:name="Objet2" text:anchor-type="as-char" svg:y="-0.527cm" svg:width="3.528cm" svg:height="0.739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<text:s text:c="3"/>c) </text:span><text:span text:style-name="T1"><draw:frame draw:style-name="fr4" draw:name="Objet3" text:anchor-type="as-char" svg:y="-0.527cm" svg:width="3.348cm" svg:height="0.739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2"><text:span text:style-name="T1"/></text:p>
      <text:p text:style-name="P2">Exercice 3 :</text:p>
      <text:p text:style-name="P5">Indiquer en justifiant si l’affirmation suivante est vraie ou fausse.</text:p>
      <text:p text:style-name="P5">Affirmation « Le nombre 231 est un nombre premier »</text:p>
      <text:p text:style-name="P5"/>
      <text:p text:style-name="P2">Exercice 4 :</text:p>
      <text:p text:style-name="P5">Dans le plan, on considère la configuration :</text:p>
      <text:p text:style-name="P5"><draw:frame draw:style-name="fr1" draw:name="Image1" text:anchor-type="paragraph" svg:width="10.927cm" svg:height="4.022cm" draw:z-index="3"><draw:image xlink:href="Pictures/100002010000019D0000009826CA54CF92F3CB1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>Les droites (BC) et (MN) sont respectivement para<text:span text:style-name="T2">llèles entre elles.</text:span></text:p>
      <text:p text:style-name="P6">A l’aide du théorème de Thalès, déterminer la longueur du segment [AN].</text:p>
      <text:p text:style-name="P6"/>
      <text:p text:style-name="P3">Exercice 5 :</text:p>
      <text:p text:style-name="P3"><text:span text:style-name="T1">Joachim doit traverser une rivière avec un groupe d’amis.</text:span></text:p>
      <text:p text:style-name="P3"><text:span text:style-name="T1">Il souhaite traverser installer une corde afin que les personnes peu rassurés puissent se tenir.</text:span></text:p>
      <text:p text:style-name="P3"><text:soft-page-break/><text:span text:style-name="T1">Il veut connaître la largeur de la rivière à cet endroit (nommé D) pour déterminer si la corde dont il dispose est assez longue.</text:span></text:p>
      <text:p text:style-name="P3"><text:span text:style-name="T1">Pour cela, il a repéré un arbre (nommé A) sur l’autre rive. Il parcourt 20 mètres sur la rive rectiligne où il se situe et trouve un nouveau repère : un rocher ( nommé R).</text:span></text:p>
      <text:p text:style-name="P3"><text:span text:style-name="T1">Ensuite, il poursuit sur 12 mètres et s’éloigne alors de la rivière, à angle droit, jusqu’à ce que le rocher soit aligné avec l’arbre depuis son point d’observation (nommé B).</text:span></text:p>
      <text:p text:style-name="P3"><text:span text:style-name="T1">Il parcourt pour cela 15 m.</text:span></text:p>
      <text:p text:style-name="P3"><text:span text:style-name="T1">Il est alors satisfait : sa corde d’une longueur de 30 mètres est assez longue pour qu’il puisse l’installer entre les points D et A.</text:span></text:p>
      <text:p text:style-name="P3"><draw:frame draw:style-name="fr2" draw:name="Image2" text:anchor-type="paragraph" svg:x="0.131cm" svg:y="0.972cm" svg:width="10.612cm" svg:height="5.45cm" draw:z-index="4"><draw:image xlink:href="Pictures/1000020100000191000000CE06C766F625FA30BC.png" xlink:type="simple" xlink:show="embed" xlink:actuate="onLoad" loext:mime-type="image/png"/></draw:frame><text:span text:style-name="T1">A l’aide de la figure, confirmer sa décision.</text:span></text:p>
      <text:p text:style-name="P4">Exercice 6 :</text:p>
      <text:p text:style-name="P7">1. On suppose que le triangle AMN est une réduction du triangle ABC dont le facteur de réduction vaut <draw:frame draw:style-name="fr4" draw:name="Objet4" text:anchor-type="as-char" svg:y="-0.891cm" svg:width="0.549cm" svg:height="1.54cm" draw:z-index="6"><draw:object xlink:href="./Object 4" xlink:type="simple" xlink:show="embed" xlink:actuate="onLoad"/><draw:image xlink:href="./ObjectReplacements/Object 4" xlink:type="simple" xlink:show="embed" xlink:actuate="onLoad"/></draw:frame>. Le triangle ABC ayant une aire de 6,75 cm². Donner l’aire du triangle AMN.</text:p>
      <text:p text:style-name="P7"/>
      <text:p text:style-name="P4">Exercice 7 :</text:p>
      <text:p text:style-name="P7">On considère la configuration ci-dessous représentant des configurations de Thalès.</text:p>
      <text:p text:style-name="P7"><draw:frame draw:style-name="fr3" draw:name="Image3" text:anchor-type="paragraph" svg:width="7.514cm" svg:height="6.429cm" draw:z-index="5"><draw:image xlink:href="Pictures/100002010000011C000000F3CD3158C94283B1A1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Montrer que les droites (FG) et (PQ) sont parallèles.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0.497cm">
          <style:column style:rel-width="7284*" fo:start-indent="0cm" fo:end-indent="0.249cm"/>
          <style:column style:rel-width="7286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8T21:46:38.625000000</meta:creation-date>
    <dc:date>2021-10-18T22:17:58.232000000</dc:date>
    <meta:editing-duration>PT9M18S</meta:editing-duration>
    <meta:editing-cycles>1</meta:editing-cycles>
    <meta:document-statistic meta:table-count="1" meta:image-count="3" meta:object-count="4" meta:page-count="2" meta:paragraph-count="29" meta:word-count="329" meta:character-count="1848" meta:non-whitespace-character-count="1505"/>
    <meta:generator>LibreOffice/6.2.3.2$Windows_X86_64 LibreOffice_project/aecc05fe267cc68dde00352a451aa867b3b546ac</meta:generator>
  </office:meta>
</office:document-meta>
</file>

<file path=Object 1/content.xml><?xml version="1.0" encoding="utf-8"?>
<math xmlns="http://www.w3.org/1998/Math/MathML" display="block">
  <semantics>
    <mrow>
      <mn>375</mn>
      <mo stretchy="false">=</mo>
      <mrow>
        <mrow>
          <mn>25</mn>
          <mo stretchy="false">×</mo>
          <mn>14</mn>
        </mrow>
        <mo stretchy="false">+</mo>
        <mn>25</mn>
      </mrow>
    </mrow>
    <annotation encoding="StarMath 5.0">375=25 times 14 + 25</annotation>
  </semantics>
</math>
</file>

<file path=Object 2/content.xml><?xml version="1.0" encoding="utf-8"?>
<math xmlns="http://www.w3.org/1998/Math/MathML" display="block">
  <semantics>
    <mrow>
      <mn>375</mn>
      <mo stretchy="false">=</mo>
      <mrow>
        <mrow>
          <mn>26</mn>
          <mo stretchy="false">×</mo>
          <mn>14</mn>
        </mrow>
        <mo stretchy="false">+</mo>
        <mn>11</mn>
      </mrow>
    </mrow>
    <annotation encoding="StarMath 5.0">375 = 26 times 14  + 11</annotation>
  </semantics>
</math>
</file>

<file path=Object 3/content.xml><?xml version="1.0" encoding="utf-8"?>
<math xmlns="http://www.w3.org/1998/Math/MathML" display="block">
  <semantics>
    <mrow>
      <mn>375</mn>
      <mo stretchy="false">=</mo>
      <mrow>
        <mrow>
          <mn>27</mn>
          <mo stretchy="false">×</mo>
          <mn>14</mn>
        </mrow>
        <mo stretchy="false">−</mo>
        <mn>3</mn>
      </mrow>
    </mrow>
    <annotation encoding="StarMath 5.0">375 = 27 times 14 - 3</annotation>
  </semantics>
</math>
</file>

<file path=Object 4/content.xml><?xml version="1.0" encoding="utf-8"?>
<math xmlns="http://www.w3.org/1998/Math/MathML" display="block">
  <semantics>
    <mfrac>
      <mn>2</mn>
      <mn>3</mn>
    </mfrac>
    <annotation encoding="StarMath 5.0">2 over 3</annotation>
  </semantics>
</math>
</file>