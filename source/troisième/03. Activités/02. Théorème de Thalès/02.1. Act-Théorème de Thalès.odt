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9D0000011B68EF4D1CB7276CB0.png" manifest:media-type="image/png"/>
  <manifest:file-entry manifest:full-path="Pictures/1000020100000114000001275C72F0D03DAE66A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085cd4" officeooo:paragraph-rsid="00085cd4"/>
    </style:style>
    <style:style style:name="P2" style:family="paragraph" style:parent-style-name="Table_20_Contents">
      <style:text-properties style:font-name="OpenDyslexic" officeooo:rsid="00101c9e" officeooo:paragraph-rsid="00085cd4"/>
    </style:style>
    <style:style style:name="P3" style:family="paragraph" style:parent-style-name="Standard">
      <style:text-properties style:font-name="OpenDyslexic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85cd4" officeooo:paragraph-rsid="00085cd4"/>
    </style:style>
    <style:style style:name="P5" style:family="paragraph" style:parent-style-name="Standard">
      <style:text-properties style:font-name="OpenDyslexic" style:text-underline-style="none" officeooo:rsid="000ede15" officeooo:paragraph-rsid="00085cd4"/>
    </style:style>
    <style:style style:name="P6" style:family="paragraph" style:parent-style-name="Standard">
      <style:text-properties style:font-name="OpenDyslexic" style:text-underline-style="none" officeooo:rsid="00085cd4" officeooo:paragraph-rsid="00085cd4"/>
    </style:style>
    <style:style style:name="P7" style:family="paragraph" style:parent-style-name="Standard">
      <style:text-properties style:font-name="OpenDyslexic" style:text-underline-style="none" officeooo:rsid="0010371c" officeooo:paragraph-rsid="00085cd4"/>
    </style:style>
    <style:style style:name="P8" style:family="paragraph" style:parent-style-name="Standard">
      <style:text-properties style:font-name="OpenDyslexic" style:text-underline-style="none" officeooo:rsid="00101c9e" officeooo:paragraph-rsid="00085cd4"/>
    </style:style>
    <style:style style:name="P9" style:family="paragraph" style:parent-style-name="Standard">
      <style:text-properties style:font-name="OpenDyslexic" style:text-underline-style="none" officeooo:rsid="000d316d" officeooo:paragraph-rsid="00085cd4"/>
    </style:style>
    <style:style style:name="P10" style:family="paragraph" style:parent-style-name="Standard">
      <style:text-properties style:font-name="OpenDyslexic" style:text-underline-style="none" officeooo:rsid="000cf01e" officeooo:paragraph-rsid="00085cd4"/>
    </style:style>
    <style:style style:name="P11" style:family="paragraph" style:parent-style-name="Standard">
      <style:text-properties style:font-name="OpenDyslexic" style:text-underline-style="solid" style:text-underline-width="auto" style:text-underline-color="font-color" officeooo:rsid="00085cd4" officeooo:paragraph-rsid="00085cd4"/>
    </style:style>
    <style:style style:name="P12" style:family="paragraph" style:parent-style-name="Standard">
      <style:text-properties style:font-name="OpenDyslexic" fo:font-style="italic" style:text-underline-style="none" officeooo:rsid="00101c9e" officeooo:paragraph-rsid="00085cd4" style:font-style-asian="italic" style:font-style-complex="italic"/>
    </style:style>
    <style:style style:name="P13" style:family="paragraph" style:parent-style-name="Standard">
      <style:text-properties style:font-name="OpenDyslexic" fo:font-style="italic" style:text-underline-style="none" officeooo:rsid="0010371c" officeooo:paragraph-rsid="00085cd4" style:font-style-asian="italic" style:font-style-complex="italic"/>
    </style:style>
    <style:style style:name="P14" style:family="paragraph" style:parent-style-name="Standard">
      <style:text-properties style:font-name="OpenDyslexic" fo:font-style="normal" style:text-underline-style="none" officeooo:rsid="0010371c" officeooo:paragraph-rsid="00085cd4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6"/>3ème</text:p>
            <text:p text:style-name="P1">Exercices en groupe <text:s text:c="20"/></text:p>
          </table:table-cell>
        </table:table-row>
      </table:table>
      <text:p text:style-name="P3"/>
      <text:p text:style-name="P4">Exercice 1 :</text:p>
      <text:p text:style-name="P5">Cynthia est partie de chez elle à 8h30 et est arrivée à son lieu de vacances à 16h50 après avoir parcouru 625 km en voiture. </text:p>
      <text:p text:style-name="P5">Quelle a été la vitesse moyenne du trajet ?</text:p>
      <text:p text:style-name="P5"/>
      <text:p text:style-name="P4">Exercice 2 :</text:p>
      <text:p text:style-name="P6">a) Le record du monde du 100m en 2006 est détenu par Asafa Powell en 9,77 s. Quelle a été sa vitesse en m/s lors de sa course ? Puis déterminer sa vitesse en km/h.</text:p>
      <text:p text:style-name="P6"/>
      <text:p text:style-name="P6">b) Le record du monde actuel du 100m est détenu par Usain Bolt en 9,58s. Quelle a été sa vitesse en m/s lors de sa course ? Puis déterminer sa vitesse en km/h.</text:p>
      <text:p text:style-name="P6"/>
      <text:p text:style-name="P4">Exercice 3 :</text:p>
      <text:p text:style-name="P10">On a : <draw:frame draw:style-name="fr3" draw:name="Objet3" text:anchor-type="as-char" svg:y="-0.527cm" svg:width="1.617cm" svg:height="0.739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, <draw:frame draw:style-name="fr3" draw:name="Objet4" text:anchor-type="as-char" svg:y="-0.527cm" svg:width="1.686cm" svg:height="0.739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et (AH)//(MO) .</text:p>
      <text:p text:style-name="P10">Le théorème de Thalès permet-il de conclure que :</text:p>
      <text:p text:style-name="P10"><draw:frame draw:style-name="fr2" draw:name="Image8" text:anchor-type="paragraph" svg:x="0.116cm" svg:y="0cm" svg:width="7.303cm" svg:height="7.805cm" draw:z-index="9"><draw:image xlink:href="Pictures/1000020100000114000001275C72F0D03DAE66A0.png" xlink:type="simple" xlink:show="embed" xlink:actuate="onLoad" loext:mime-type="image/png"/></draw:frame>a) <draw:frame draw:style-name="fr3" draw:name="Objet5" text:anchor-type="as-char" svg:y="-0.891cm" svg:width="1.707cm" svg:height="1.54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s text:c="3"/>b) <draw:frame draw:style-name="fr3" draw:name="Objet6" text:anchor-type="as-char" svg:y="-0.891cm" svg:width="1.715cm" svg:height="1.54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0"/>
      <text:p text:style-name="P9">c) <draw:frame draw:style-name="fr3" draw:name="Objet7" text:anchor-type="as-char" svg:y="-0.891cm" svg:width="1.946cm" svg:height="1.54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text:s text:c="2"/>d) <draw:frame draw:style-name="fr3" draw:name="Objet8" text:anchor-type="as-char" svg:y="-0.891cm" svg:width="1.905cm" svg:height="1.54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9"/>
      <text:p text:style-name="P9">e) <draw:frame draw:style-name="fr3" draw:name="Objet9" text:anchor-type="as-char" svg:y="-0.891cm" svg:width="1.946cm" svg:height="1.54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text:s text:c="2"/>f) <draw:frame draw:style-name="fr3" draw:name="Objet10" text:anchor-type="as-char" svg:y="-0.891cm" svg:width="2.138cm" svg:height="1.54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Exercice 4 :</text:p>
      <text:p text:style-name="P8">D’après le code de la route (Article R313-3)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Les feux de croisement d’une voiture permettent d’éclairer efficacement la route, la nuit par temps clair, sur une distance minimale de 30m.</text:p>
          </table:table-cell>
        </table:table-row>
      </table:table>
      <text:p text:style-name="P8"/>
      <text:p text:style-name="P8">Afin de contrôler régulièrement la portée des feux de sa voiture, Jacques veut tracer un repère sur le mur au fond de son garage.</text:p>
      <text:p text:style-name="P12"/>
      <text:p text:style-name="P13">La figure n’est pas à l’échelle</text:p>
      <text:p text:style-name="P14"><draw:frame draw:style-name="fr1" draw:name="Image9" text:anchor-type="paragraph" svg:width="17cm" svg:height="7.19cm" draw:z-index="0"><draw:image xlink:href="Pictures/100002010000029D0000011B68EF4D1CB7276CB0.png" xlink:type="simple" xlink:show="embed" xlink:actuate="onLoad" loext:mime-type="image/png"/></draw:frame></text:p>
      <text:p text:style-name="P7">Les feux de croisement sont à 60 cm du sol.</text:p>
      <text:p text:style-name="P7">A quelle hauteur doit-il placer le repère sur son mur pour pouvoir régler correctement ses phar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2:49:22.483000000</meta:creation-date>
    <dc:date>2021-10-09T12:56:07.722000000</dc:date>
    <meta:editing-duration>PT16S</meta:editing-duration>
    <meta:editing-cycles>1</meta:editing-cycles>
    <meta:document-statistic meta:table-count="2" meta:image-count="2" meta:object-count="8" meta:page-count="2" meta:paragraph-count="21" meta:word-count="230" meta:character-count="1252" meta:non-whitespace-character-count="945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I</mi>
      <mo stretchy="false">∈</mo>
      <mrow>
        <mo fence="true" stretchy="false">(</mo>
        <mrow>
          <mi mathvariant="italic">AO</mi>
        </mrow>
        <mo fence="true" stretchy="false">)</mo>
      </mrow>
    </mrow>
    <annotation encoding="StarMath 5.0">I in ( AO )</annotation>
  </semantics>
</math>
</file>

<file path=Object 2/content.xml><?xml version="1.0" encoding="utf-8"?>
<math xmlns="http://www.w3.org/1998/Math/MathML" display="block">
  <semantics>
    <mrow>
      <mi>I</mi>
      <mo stretchy="false">∈</mo>
      <mrow>
        <mo fence="true" stretchy="false">(</mo>
        <mrow>
          <mi mathvariant="italic">HM</mi>
        </mrow>
        <mo fence="true" stretchy="false">)</mo>
      </mrow>
    </mrow>
    <annotation encoding="StarMath 5.0">I in ( HM )</annotation>
  </semantics>
</math>
</file>

<file path=Object 3/content.xml><?xml version="1.0" encoding="utf-8"?>
<math xmlns="http://www.w3.org/1998/Math/MathML" display="block">
  <semantics>
    <mrow>
      <mfrac>
        <mi mathvariant="italic">AI</mi>
        <mi mathvariant="italic">MI</mi>
      </mfrac>
      <mo stretchy="false">=</mo>
      <mfrac>
        <mi mathvariant="italic">HI</mi>
        <mi mathvariant="italic">IO</mi>
      </mfrac>
    </mrow>
    <annotation encoding="StarMath 5.0">AI over {MI}= HI over IO</annotation>
  </semantics>
</math>
</file>

<file path=Object 4/content.xml><?xml version="1.0" encoding="utf-8"?>
<math xmlns="http://www.w3.org/1998/Math/MathML" display="block">
  <semantics>
    <mrow>
      <mfrac>
        <mi mathvariant="italic">IA</mi>
        <mi mathvariant="italic">IO</mi>
      </mfrac>
      <mo stretchy="false">=</mo>
      <mfrac>
        <mi mathvariant="italic">IH</mi>
        <mi mathvariant="italic">MI</mi>
      </mfrac>
    </mrow>
    <annotation encoding="StarMath 5.0">IA over IO = IH over MI</annotation>
  </semantics>
</math>
</file>

<file path=Object 5/content.xml><?xml version="1.0" encoding="utf-8"?>
<math xmlns="http://www.w3.org/1998/Math/MathML" display="block">
  <semantics>
    <mrow>
      <mfrac>
        <mi mathvariant="italic">MI</mi>
        <mi mathvariant="italic">IH</mi>
      </mfrac>
      <mo stretchy="false">=</mo>
      <mfrac>
        <mi mathvariant="italic">AH</mi>
        <mi mathvariant="italic">MO</mi>
      </mfrac>
    </mrow>
    <annotation encoding="StarMath 5.0">MI over IH = AH over MO</annotation>
  </semantics>
</math>
</file>

<file path=Object 6/content.xml><?xml version="1.0" encoding="utf-8"?>
<math xmlns="http://www.w3.org/1998/Math/MathML" display="block">
  <semantics>
    <mrow>
      <mfrac>
        <mi mathvariant="italic">IO</mi>
        <mi mathvariant="italic">IA</mi>
      </mfrac>
      <mo stretchy="false">=</mo>
      <mfrac>
        <mi mathvariant="italic">MO</mi>
        <mi mathvariant="italic">AH</mi>
      </mfrac>
    </mrow>
    <annotation encoding="StarMath 5.0">IO over IA = MO over AH</annotation>
  </semantics>
</math>
</file>

<file path=Object 7/content.xml><?xml version="1.0" encoding="utf-8"?>
<math xmlns="http://www.w3.org/1998/Math/MathML" display="block">
  <semantics>
    <mrow>
      <mfrac>
        <mi mathvariant="italic">HI</mi>
        <mi mathvariant="italic">MI</mi>
      </mfrac>
      <mo stretchy="false">=</mo>
      <mfrac>
        <mi mathvariant="italic">HA</mi>
        <mi mathvariant="italic">MO</mi>
      </mfrac>
    </mrow>
    <annotation encoding="StarMath 5.0">HI over MI = HA over MO</annotation>
  </semantics>
</math>
</file>

<file path=Object 8/content.xml><?xml version="1.0" encoding="utf-8"?>
<math xmlns="http://www.w3.org/1998/Math/MathML" display="block">
  <semantics>
    <mrow>
      <mfrac>
        <mi mathvariant="italic">AH</mi>
        <mi mathvariant="italic">OM</mi>
      </mfrac>
      <mo stretchy="false">=</mo>
      <mfrac>
        <mi mathvariant="italic">IH</mi>
        <mi mathvariant="italic">MH</mi>
      </mfrac>
    </mrow>
    <annotation encoding="StarMath 5.0">AH over OM = IH over MH</annotation>
  </semantics>
</math>
</file>