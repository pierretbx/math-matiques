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300000010FB94C7745E8385938.png" manifest:media-type="image/png"/>
  <manifest:file-entry manifest:full-path="Pictures/100002010000015A000001106E2B4F7849327614.png" manifest:media-type="image/png"/>
  <manifest:file-entry manifest:full-path="Pictures/1000020100000148000000EEB6E419336EBEFD1B.png" manifest:media-type="image/png"/>
  <manifest:file-entry manifest:full-path="Pictures/10000201000001E600000159975080EFD72CEDE6.png" manifest:media-type="image/png"/>
  <manifest:file-entry manifest:full-path="Pictures/10000201000001CA000000EAEF0D9230F7A9457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0eed1a" officeooo:paragraph-rsid="000eed1a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eed1a" officeooo:paragraph-rsid="000eed1a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f8134" officeooo:paragraph-rsid="000f8134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f8134" officeooo:paragraph-rsid="000f9dfe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f9dfe" officeooo:paragraph-rsid="000f9dfe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089a5" officeooo:paragraph-rsid="001089a5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1b501" officeooo:paragraph-rsid="0011b501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3904e" officeooo:paragraph-rsid="0013904e"/>
    </style:style>
    <style:style style:name="P10" style:family="paragraph" style:parent-style-name="Standard">
      <style:text-properties style:font-name="OpenDyslexic" style:text-underline-style="none" officeooo:rsid="000eed1a" officeooo:paragraph-rsid="000eed1a"/>
    </style:style>
    <style:style style:name="P11" style:family="paragraph" style:parent-style-name="Standard">
      <style:text-properties style:font-name="OpenDyslexic" style:text-underline-style="none" officeooo:rsid="000f9dfe" officeooo:paragraph-rsid="000f9dfe"/>
    </style:style>
    <style:style style:name="P12" style:family="paragraph" style:parent-style-name="Standard">
      <style:text-properties style:font-name="OpenDyslexic" style:text-underline-style="none" officeooo:rsid="0011b501" officeooo:paragraph-rsid="0011b501"/>
    </style:style>
    <style:style style:name="P13" style:family="paragraph" style:parent-style-name="Standard">
      <style:text-properties style:font-name="OpenDyslexic" style:text-underline-style="none" officeooo:rsid="0013904e" officeooo:paragraph-rsid="0013904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8134"/>
    </style:style>
    <style:style style:name="T3" style:family="text">
      <style:text-properties style:text-underline-style="none" officeooo:rsid="000f9dfe"/>
    </style:style>
    <style:style style:name="T4" style:family="text">
      <style:text-properties style:text-underline-style="none" officeooo:rsid="0011b501"/>
    </style:style>
    <style:style style:name="T5" style:family="text">
      <style:text-properties style:text-underline-style="none" officeooo:rsid="00139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0"/>3ème D</text:p>
            <text:p text:style-name="P1">Exercices de groupe</text:p>
          </table:table-cell>
        </table:table-row>
      </table:table>
      <text:p text:style-name="P2"/>
      <text:p text:style-name="P3">Exercice 1 :<text:span text:style-name="T1"> </text:span><text:span text:style-name="T2">ceinture </text:span><text:span text:style-name="T3">jaune</text:span></text:p>
      <text:p text:style-name="P4"><text:span text:style-name="T1">On considère la figure ci-dessous.</text:span></text:p>
      <text:p text:style-name="P6"><draw:frame draw:style-name="fr1" draw:name="Image1" text:anchor-type="paragraph" svg:x="0.131cm" svg:y="0cm" svg:width="9.155cm" svg:height="7.197cm" draw:z-index="0"><draw:image xlink:href="Pictures/100002010000015A000001106E2B4F7849327614.png" xlink:type="simple" xlink:show="embed" xlink:actuate="onLoad" loext:mime-type="image/png"/></draw:frame><text:span text:style-name="T1">Les droites (DB) et (EF) sont-elles parallèles ?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Exercice 2 :<text:span text:style-name="T1"> ceinture jaune</text:span></text:p>
      <text:p text:style-name="P11">On considère la figure ci-dessous.</text:p>
      <text:p text:style-name="P11"><draw:frame draw:style-name="fr1" draw:name="Image2" text:anchor-type="paragraph" svg:x="-1.078cm" svg:y="0cm" svg:width="8.043cm" svg:height="7.17cm" draw:z-index="1"><draw:image xlink:href="Pictures/10000201000001300000010FB94C7745E8385938.png" xlink:type="simple" xlink:show="embed" xlink:actuate="onLoad" loext:mime-type="image/png"/></draw:frame>1. Montrer que les droites (DE) et (AC) sont parallèles.</text:p>
      <text:p text:style-name="P11"/>
      <text:p text:style-name="P11">2. Calculer DE, puis en donner une valeur approchée au dixième.</text:p>
      <text:p text:style-name="P11"/>
      <text:p text:style-name="P11"/>
      <text:p text:style-name="P11"/>
      <text:p text:style-name="P11"/>
      <text:p text:style-name="P11"/>
      <text:p text:style-name="P6">Exercice 3 :<text:span text:style-name="T1"> ceinture <text:s/>verte</text:span></text:p>
      <text:p text:style-name="P6"><text:span text:style-name="T1">Dans la figure ci-dessous, les droites (SU) et (RT) se coupent en V, et les droites (UT) et (RS) sont parallèles.</text:span></text:p>
      <text:p text:style-name="P6"><draw:frame draw:style-name="fr2" draw:name="Image3" text:anchor-type="paragraph" svg:width="12.861cm" svg:height="9.128cm" draw:z-index="2"><draw:image xlink:href="Pictures/10000201000001E600000159975080EFD72CEDE6.png" xlink:type="simple" xlink:show="embed" xlink:actuate="onLoad" loext:mime-type="image/png"/></draw:frame><text:soft-page-break/><text:span text:style-name="T1"/></text:p>
      <text:p text:style-name="P5"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Exercice 4 :<text:span text:style-name="T1"> </text:span><text:span text:style-name="T4">ceinture verte</text:span></text:p>
      <text:p text:style-name="P12">Les droites (AM) et (ST) se coupent en R et (AS) et (MT) sont parallèles. Compléter et écrire les égalités du théorème du Thalès.</text:p>
      <text:p text:style-name="P12"><draw:frame draw:style-name="fr1" draw:name="Image4" text:anchor-type="paragraph" svg:x="-1.588cm" svg:y="0.205cm" svg:width="12.12cm" svg:height="6.191cm" draw:z-index="3"><draw:image xlink:href="Pictures/10000201000001CA000000EAEF0D9230F7A94573.png" xlink:type="simple" xlink:show="embed" xlink:actuate="onLoad" loext:mime-type="image/png"/></draw:frame>- Les points … sont alignés.</text:p>
      <text:p text:style-name="P12">- Les points … sont alignés.</text:p>
      <text:p text:style-name="P12">- … // … </text:p>
      <text:p text:style-name="P12"/>
      <text:p text:style-name="P12"/>
      <text:p text:style-name="P12"/>
      <text:p text:style-name="P12"/>
      <text:p text:style-name="P12"/>
      <text:p text:style-name="P12"/>
      <text:p text:style-name="P12">Donc, d’après le théorème de .....…… on a : <text:s/>.…...=.…...=.…….</text:p>
      <text:p text:style-name="P12"/>
      <text:p text:style-name="P8">Exercice 5 :</text:p>
      <text:p text:style-name="P8"><text:span text:style-name="T1">1) Construire un triangle OLK tel que :</text:span></text:p>
      <text:p text:style-name="P8"><text:span text:style-name="T1">OL=6,3 cm, LK=5 cm et KO= 3,5 cm.</text:span></text:p>
      <text:p text:style-name="P8"><text:span text:style-name="T1">Placer les points M et P tels que : </text:span><text:span text:style-name="T1"><draw:frame draw:style-name="fr3" draw:name="Objet1" text:anchor-type="as-char" svg:y="-0.527cm" svg:width="1.804cm" svg:height="0.739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">, </text:span><text:span text:style-name="T1"><draw:frame draw:style-name="fr3" draw:name="Objet2" text:anchor-type="as-char" svg:y="-0.527cm" svg:width="2.695cm" svg:height="0.739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3" draw:name="Objet3" text:anchor-type="as-char" svg:y="-0.527cm" svg:width="1.752cm" svg:height="0.739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5">et OP=2,5 cm.</text:span></text:p>
      <text:p text:style-name="P9"><text:span text:style-name="T1">2) Démontrer que les droites (PK) et (LK) sont parallèles.</text:span></text:p>
      <text:p text:style-name="P9"><text:span text:style-name="T1"/></text:p>
      <text:p text:style-name="P9"><text:soft-page-break/>Exercice 6 :</text:p>
      <text:p text:style-name="P13">On considère la figure ci-dessous pour laquelle :</text:p>
      <text:p text:style-name="P13">- les points E, A et C sont alignés ;</text:p>
      <text:p text:style-name="P13">- les points F, A et B sont alignés ;</text:p>
      <text:p text:style-name="P13">- AF= 12 cm, AC= 5 cm, AB= 7,5 cm et AE = 8 cm.</text:p>
      <text:p text:style-name="P13"><draw:frame draw:style-name="fr1" draw:name="Image5" text:anchor-type="paragraph" svg:x="-1.453cm" svg:y="0.176cm" svg:width="8.678cm" svg:height="6.297cm" draw:z-index="7"><draw:image xlink:href="Pictures/1000020100000148000000EEB6E419336EBEFD1B.png" xlink:type="simple" xlink:show="embed" xlink:actuate="onLoad" loext:mime-type="image/png"/></draw:frame>1) Montrer que les droites (BC) t (EF) sont parallèles.</text:p>
      <text:p text:style-name="P13">2) Calculer la longueur EF sachant que BC=5,5 cm. Justifie la réponse.</text:p>
      <text:p text:style-name="P13">3) Le triangle ABC est-il rectangle en C ?</text:p>
      <text:p text:style-name="P13">Justifie la réponse.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1:53.299000000</meta:creation-date>
    <dc:date>2021-11-07T16:43:01.626000000</dc:date>
    <meta:editing-duration>PT9M24S</meta:editing-duration>
    <meta:editing-cycles>1</meta:editing-cycles>
    <meta:document-statistic meta:table-count="1" meta:image-count="5" meta:object-count="3" meta:page-count="3" meta:paragraph-count="31" meta:word-count="260" meta:character-count="1379" meta:non-whitespace-character-count="1087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O</mi>
      <mo stretchy="false">∈</mo>
      <mrow>
        <mo fence="true" stretchy="false">[</mo>
        <mrow>
          <mi mathvariant="italic">LM</mi>
        </mrow>
        <mo fence="true" stretchy="false">]</mo>
      </mrow>
    </mrow>
    <annotation encoding="StarMath 5.0">O in [ LM ]</annotation>
  </semantics>
</math>
</file>

<file path=Object 2/content.xml><?xml version="1.0" encoding="utf-8"?>
<math xmlns="http://www.w3.org/1998/Math/MathML" display="block">
  <semantics>
    <mrow>
      <mrow>
        <mi mathvariant="italic">OM</mi>
        <mo stretchy="false">=</mo>
        <mn>4</mn>
      </mrow>
      <mn>,5</mn>
      <mi mathvariant="italic">cm</mi>
    </mrow>
    <annotation encoding="StarMath 5.0">OM=4,5 cm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stretchy="false">[</mo>
        <mrow>
          <mi mathvariant="italic">KP</mi>
        </mrow>
        <mo fence="true" stretchy="false">]</mo>
      </mrow>
    </mrow>
    <annotation encoding="StarMath 5.0">O in [ KP ]</annotation>
  </semantics>
</math>
</file>