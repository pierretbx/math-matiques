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11C0000008F22F3759D551EC210.png" manifest:media-type="image/png"/>
  <manifest:file-entry manifest:full-path="Pictures/10000201000000CD0000007D13347BE90A87D745.png" manifest:media-type="image/png"/>
  <manifest:file-entry manifest:full-path="Pictures/10000201000001FD000000CBA0D1717D6F337E4E.png" manifest:media-type="image/png"/>
  <manifest:file-entry manifest:full-path="Pictures/100002010000015700000057393774349A403676.png" manifest:media-type="image/png"/>
  <manifest:file-entry manifest:full-path="Pictures/10000201000001B40000006AF59CD920233BAC40.png" manifest:media-type="image/png"/>
  <manifest:file-entry manifest:full-path="Pictures/100002010000016A00000056781E23385CE5E62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2.601cm" table:align="margins"/>
    </style:style>
    <style:style style:name="Tableau1.A" style:family="table-column">
      <style:table-column-properties style:column-width="12.601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2.601cm" table:align="margins"/>
    </style:style>
    <style:style style:name="Tableau2.A" style:family="table-column">
      <style:table-column-properties style:column-width="12.601cm" style:rel-column-width="65535*"/>
    </style:style>
    <style:style style:name="Tableau2.A1" style:family="table-cell">
      <style:table-cell-properties fo:padding="0.097cm" fo:border="0.05pt solid #000000"/>
    </style:style>
    <style:style style:name="Tableau4" style:family="table">
      <style:table-properties style:width="12.601cm" table:align="margins"/>
    </style:style>
    <style:style style:name="Tableau4.A" style:family="table-column">
      <style:table-column-properties style:column-width="12.601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2.601cm" table:align="margins"/>
    </style:style>
    <style:style style:name="Tableau5.A" style:family="table-column">
      <style:table-column-properties style:column-width="12.601cm" style:rel-column-width="65535*"/>
    </style:style>
    <style:style style:name="Tableau5.A1" style:family="table-cell">
      <style:table-cell-properties fo:padding="0.097cm" fo:border="0.05pt solid #000000"/>
    </style:style>
    <style:style style:name="Tableau3" style:family="table">
      <style:table-properties style:width="12.601cm" table:align="margins"/>
    </style:style>
    <style:style style:name="Tableau3.A" style:family="table-column">
      <style:table-column-properties style:column-width="12.601cm" style:rel-column-width="65535*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OpenDyslexic" officeooo:rsid="00199641" officeooo:paragraph-rsid="00199641"/>
    </style:style>
    <style:style style:name="P2" style:family="paragraph" style:parent-style-name="Table_20_Contents">
      <style:text-properties style:font-name="OpenDyslexic" officeooo:rsid="0026eeb3" officeooo:paragraph-rsid="0026eeb3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99641" officeooo:paragraph-rsid="00199641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d88d3" officeooo:paragraph-rsid="001d88d3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2566c1" officeooo:paragraph-rsid="002566c1"/>
    </style:style>
    <style:style style:name="P6" style:family="paragraph" style:parent-style-name="Standard">
      <style:text-properties style:font-name="OpenDyslexic" style:text-underline-style="none" officeooo:rsid="00199641" officeooo:paragraph-rsid="00199641"/>
    </style:style>
    <style:style style:name="P7" style:family="paragraph" style:parent-style-name="Standard">
      <style:text-properties style:font-name="OpenDyslexic" style:text-underline-style="none" officeooo:rsid="001aa3a3" officeooo:paragraph-rsid="001aa3a3"/>
    </style:style>
    <style:style style:name="P8" style:family="paragraph" style:parent-style-name="Standard">
      <style:text-properties style:font-name="OpenDyslexic" style:text-underline-style="none" officeooo:rsid="001aa3a3" officeooo:paragraph-rsid="001c8aa3"/>
    </style:style>
    <style:style style:name="P9" style:family="paragraph" style:parent-style-name="Standard">
      <style:text-properties style:font-name="OpenDyslexic" style:text-underline-style="none" officeooo:rsid="001bf8fb" officeooo:paragraph-rsid="001bf8fb"/>
    </style:style>
    <style:style style:name="P10" style:family="paragraph" style:parent-style-name="Standard">
      <style:text-properties style:font-name="OpenDyslexic" style:text-underline-style="none" officeooo:rsid="001bf8fb" officeooo:paragraph-rsid="0026eeb3"/>
    </style:style>
    <style:style style:name="P11" style:family="paragraph" style:parent-style-name="Standard">
      <style:text-properties style:font-name="OpenDyslexic" style:text-underline-style="none" officeooo:rsid="001ee328" officeooo:paragraph-rsid="001ee328"/>
    </style:style>
    <style:style style:name="P12" style:family="paragraph" style:parent-style-name="Standard">
      <style:text-properties style:font-name="OpenDyslexic" style:text-underline-style="none" officeooo:rsid="0020c927" officeooo:paragraph-rsid="0020c927"/>
    </style:style>
    <style:style style:name="P13" style:family="paragraph" style:parent-style-name="Standard">
      <style:text-properties style:font-name="OpenDyslexic" style:text-underline-style="none" officeooo:rsid="002163df" officeooo:paragraph-rsid="002163df"/>
    </style:style>
    <style:style style:name="P14" style:family="paragraph" style:parent-style-name="Standard">
      <style:text-properties style:font-name="OpenDyslexic" style:text-underline-style="none" officeooo:rsid="00240891" officeooo:paragraph-rsid="00240891"/>
    </style:style>
    <style:style style:name="P15" style:family="paragraph" style:parent-style-name="Standard">
      <style:text-properties style:font-name="OpenDyslexic" style:text-underline-style="none" officeooo:rsid="002566c1" officeooo:paragraph-rsid="002566c1"/>
    </style:style>
    <style:style style:name="P16" style:family="paragraph" style:parent-style-name="Standard">
      <style:text-properties style:font-name="OpenDyslexic" style:text-underline-style="none" officeooo:rsid="0026eeb3" officeooo:paragraph-rsid="0026eeb3"/>
    </style:style>
    <style:style style:name="P17" style:family="paragraph" style:parent-style-name="Standard">
      <style:text-properties style:font-name="OpenDyslexic" fo:font-style="normal" style:text-underline-style="none" officeooo:rsid="002566c1" officeooo:paragraph-rsid="002566c1" style:font-style-asian="normal" style:font-style-complex="normal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OpenDyslexic" style:text-underline-style="none" officeooo:rsid="00199641" officeooo:paragraph-rsid="00199641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OpenDyslexic" style:text-underline-style="none" officeooo:rsid="001bf8fb" officeooo:paragraph-rsid="001bf8fb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OpenDyslexic" style:text-underline-style="none" officeooo:rsid="001d88d3" officeooo:paragraph-rsid="001d88d3"/>
    </style:style>
    <style:style style:name="P2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OpenDyslexic" style:text-underline-style="none" officeooo:rsid="001bf8fb" officeooo:paragraph-rsid="001bf8fb"/>
    </style:style>
    <style:style style:name="P2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OpenDyslexic" style:text-underline-style="none" officeooo:rsid="00240891" officeooo:paragraph-rsid="00240891"/>
    </style:style>
    <style:style style:name="P2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OpenDyslexic" fo:font-style="normal" style:text-underline-style="none" officeooo:rsid="00240891" officeooo:paragraph-rsid="00240891" style:font-style-asian="normal" style:font-style-complex="normal"/>
    </style:style>
    <style:style style:name="P2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OpenDyslexic" fo:font-style="normal" style:text-underline-style="none" officeooo:rsid="002566c1" officeooo:paragraph-rsid="002566c1" style:font-style-asian="normal" style:font-style-complex="normal"/>
    </style:style>
    <style:style style:name="P25" style:family="paragraph" style:parent-style-name="Table_20_Contents">
      <style:text-properties style:font-name="OpenDyslexic" officeooo:rsid="0026eeb3" officeooo:paragraph-rsid="0028b658"/>
    </style:style>
    <style:style style:name="P26" style:family="paragraph" style:parent-style-name="Standard" style:list-style-name="L1">
      <style:text-properties style:font-name="OpenDyslexic" style:text-underline-style="none" officeooo:rsid="002566c1" officeooo:paragraph-rsid="002566c1"/>
    </style:style>
    <style:style style:name="P27" style:family="paragraph" style:parent-style-name="Standard">
      <style:text-properties style:font-name="OpenDyslexic" style:text-underline-style="none" officeooo:rsid="002163df" officeooo:paragraph-rsid="0028b658"/>
    </style:style>
    <style:style style:name="P28" style:family="paragraph" style:parent-style-name="Standard">
      <style:text-properties style:font-name="OpenDyslexic" style:text-underline-style="none" officeooo:rsid="00240891" officeooo:paragraph-rsid="0028b658"/>
    </style:style>
    <style:style style:name="P29" style:family="paragraph" style:parent-style-name="Standard">
      <style:text-properties style:font-name="OpenDyslexic" style:text-underline-style="none" officeooo:rsid="001bf8fb" officeooo:paragraph-rsid="0028b658"/>
    </style:style>
    <style:style style:name="P30" style:family="paragraph" style:parent-style-name="Standard">
      <style:text-properties style:font-name="OpenDyslexic" fo:font-style="normal" style:text-underline-style="none" officeooo:rsid="001bf8fb" officeooo:paragraph-rsid="001bf8fb" style:font-style-asian="normal" style:font-style-complex="normal"/>
    </style:style>
    <style:style style:name="P31" style:family="paragraph" style:parent-style-name="Standard">
      <style:text-properties style:font-name="OpenDyslexic" fo:font-style="normal" style:text-underline-style="none" officeooo:rsid="001bf8fb" officeooo:paragraph-rsid="0028b658" style:font-style-asian="normal" style:font-style-complex="normal"/>
    </style:style>
    <style:style style:name="P32" style:family="paragraph" style:parent-style-name="Standard">
      <style:text-properties style:font-name="OpenDyslexic" fo:font-style="normal" style:text-underline-style="none" officeooo:rsid="002566c1" officeooo:paragraph-rsid="0028b658" style:font-style-asian="normal" style:font-style-complex="normal"/>
    </style:style>
    <style:style style:name="P33" style:family="paragraph" style:parent-style-name="Standard">
      <style:text-properties style:font-name="OpenDyslexic" style:text-underline-style="solid" style:text-underline-width="auto" style:text-underline-color="font-color" officeooo:rsid="001bf8fb" officeooo:paragraph-rsid="0028b658"/>
    </style:style>
    <style:style style:name="P34" style:family="paragraph" style:parent-style-name="Standard">
      <style:text-properties style:font-name="OpenDyslexic" style:text-underline-style="solid" style:text-underline-width="auto" style:text-underline-color="font-color" officeooo:rsid="001d88d3" officeooo:paragraph-rsid="0028b658"/>
    </style:style>
    <style:style style:name="P3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OpenDyslexic" style:text-underline-style="none" officeooo:rsid="001d88d3" officeooo:paragraph-rsid="0028b658"/>
    </style:style>
    <style:style style:name="P3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OpenDyslexic" style:text-underline-style="none" officeooo:rsid="00240891" officeooo:paragraph-rsid="0028b658"/>
    </style:style>
    <style:style style:name="P3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OpenDyslexic" fo:font-style="normal" style:text-underline-style="none" officeooo:rsid="00240891" officeooo:paragraph-rsid="0028b658" style:font-style-asian="normal" style:font-style-complex="normal"/>
    </style:style>
    <style:style style:name="P3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OpenDyslexic" fo:font-style="normal" style:text-underline-style="none" officeooo:rsid="002566c1" officeooo:paragraph-rsid="0028b658" style:font-style-asian="normal" style:font-style-complex="normal"/>
    </style:style>
    <style:style style:name="P3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f8fb"/>
    </style:style>
    <style:style style:name="T3" style:family="text">
      <style:text-properties officeooo:rsid="0024089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8b658" style:font-style-asian="normal" style:font-style-complex="normal"/>
    </style:style>
    <style:style style:name="T7" style:family="text">
      <style:text-properties officeooo:rsid="0026eeb3"/>
    </style:style>
    <style:style style:name="T8" style:family="text">
      <style:text-properties officeooo:rsid="0028b6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A.Lejeune <text:s text:c="63"/>3ème</text:p>
            <text:p text:style-name="P1">Exercices sur ordinateur</text:p>
          </table:table-cell>
        </table:table-row>
      </table:table>
      <text:p text:style-name="Standard"/>
      <text:p text:style-name="Standard"/>
      <text:p text:style-name="P3">Exercice 1 :</text:p>
      <text:p text:style-name="P6">1) Ouvrir <text:span text:style-name="T1">Libre office</text:span> puis sélectionner <text:span text:style-name="T1">Libre Office Calc</text:span> sur l’ordinateur.</text:p>
      <text:p text:style-name="P6">2) Le tableau qui apparaît à l’écran est la <text:span text:style-name="T1">feuille de calculs</text:span>.</text:p>
      <text:p text:style-name="P6">Ses<text:span text:style-name="T1"> Lignes</text:span> sont nommées par des nombres entiers 1,2,3,4,...</text:p>
      <text:p text:style-name="P6">Ses <text:span text:style-name="T1">Colonnes</text:span> sont nommées par des lettres A,B,C,D,…</text:p>
      <text:p text:style-name="P6"><draw:frame draw:style-name="fr1" draw:name="Image1" text:anchor-type="paragraph" svg:x="4.918cm" svg:y="0.921cm" svg:width="7.514cm" svg:height="3.784cm" draw:z-index="2"><draw:image xlink:href="Pictures/100002010000011C0000008F22F3759D551EC210.png" xlink:type="simple" xlink:show="embed" xlink:actuate="onLoad" loext:mime-type="image/png"/></draw:frame>Ainsi chaque case, appelée <text:span text:style-name="T1">cellule</text:span>, est repérée par une lettre et un nombre.</text:p>
      <text:p text:style-name="P6">3) Quelle est le nom de la cellule sélectionnée ici :</text:p>
      <text:p text:style-name="P18"/>
      <text:p text:style-name="P6"/>
      <text:p text:style-name="P6"/>
      <text:p text:style-name="P6">Ce logiciel permet d’organiser des données dans des tableaux, d’effectuer des calculs, d’utiliser des formules, de construire des diagrammes et des graphiques</text:p>
      <text:p text:style-name="P7"><draw:frame draw:style-name="fr2" draw:name="Image2" text:anchor-type="paragraph" svg:width="13.469cm" svg:height="5.371cm" draw:z-index="1"><draw:image xlink:href="Pictures/10000201000001FD000000CBA0D1717D6F337E4E.png" xlink:type="simple" xlink:show="embed" xlink:actuate="onLoad" loext:mime-type="image/png"/></draw:frame><draw:frame draw:style-name="fr1" draw:name="Image3" text:anchor-type="paragraph" svg:x="9.687cm" svg:y="6.114cm" svg:width="9.075cm" svg:height="2.302cm" draw:z-index="0"><draw:image xlink:href="Pictures/100002010000015700000057393774349A403676.png" xlink:type="simple" xlink:show="embed" xlink:actuate="onLoad" loext:mime-type="image/png"/></draw:frame><draw:line text:anchor-type="paragraph" draw:z-index="5" draw:name="Forme2" draw:style-name="gr1" draw:text-style-name="P39" svg:x1="4.674cm" svg:y1="7.966cm" svg:x2="9.495cm" svg:y2="6.996cm"><text:p/></draw:line>4) Recopier ce tableau dans votre tableur à l’aide de votre clavier. Pour la cellule A9 jusqu’à F9, vous pouvez utiliser</text:p>
      <text:p text:style-name="P7"/>
      <text:p text:style-name="P7"/>
      <text:p text:style-name="P8">5) On souhaite déterminer le temps total de ce groupe d’élèves dans chaque application. <text:span text:style-name="T2">Pour cela, on va utiliser une formule dans le tableur pour calculer directement. Pour cela vous devez entrer dans la cellule B10 : «  =Somme(B2:B7) ». On tape le signe « = » qui signifie que l’on entre une formule.</text:span></text:p>
      <text:p text:style-name="P9"><text:soft-page-break/>6) Que faut-il placer dans la cellule <text:span text:style-name="T8">C10</text:span> et <text:span text:style-name="T8">D</text:span>1<text:span text:style-name="T8">0</text:span> pour calculer le temps total passé sur chaque application ?</text:p>
      <text:p text:style-name="P19"/>
      <text:p text:style-name="P9"/>
      <text:p text:style-name="P9">7) Quelle est l’application la plus utilisée par les élèves de cette classe ?</text:p>
      <text:p text:style-name="P21"/>
      <text:p text:style-name="P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Appeler le professeur ! <text:s text:c="5"/>Remarque du professeur :<text:line-break/></text:p>
          </table:table-cell>
        </table:table-row>
      </table:table>
      <text:p text:style-name="P30"/>
      <text:p text:style-name="P4">Exercice <text:span text:style-name="T8">2</text:span> :</text:p>
      <text:p text:style-name="P11">Dans un collège de Caen (Normandie) est organisé un échange avec le Mexique pour les élèves de 3ème qui étudient l’espagnol en seconde langue.</text:p>
      <text:p text:style-name="P11">Le tableau ci-dessous, réalisé sur un tableur, permet de déterminer la répartition de la seconde langue étudiée par les 320 élèves de 4ème et de 3ème de ce collège.</text:p>
      <text:p text:style-name="P11"><draw:frame draw:style-name="fr2" draw:name="Image7" text:anchor-type="paragraph" svg:width="11.538cm" svg:height="2.805cm" draw:z-index="3"><draw:image xlink:href="Pictures/10000201000001B40000006AF59CD920233BAC4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2">1) Combien d’élèves peuvent être concernés par cet échange ?</text:p>
      <text:p text:style-name="P12"/>
      <text:p text:style-name="P12">2) Finalement seuls 24 élèves participeront à ce voyage. Est-il vrai que cela représente 12 % des élèves de 3ème ?</text:p>
      <text:p text:style-name="P12"/>
      <text:p text:style-name="P12">3) Quelle formule peut-on utiliser pour compléter la cellule B5 ?</text:p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">Appeler le professeur ! <text:s text:c="5"/>Remarque du professeur :<text:line-break/></text:p>
          </table:table-cell>
        </table:table-row>
      </table:table>
      <text:p text:style-name="P10"/>
      <text:p text:style-name="P10"><text:soft-page-break/></text:p>
      <text:p text:style-name="P5">Exercice 4 :</text:p>
      <text:p text:style-name="P15">Un bijoutier achète un lot de 220 perles de Tahiti.</text:p>
      <text:p text:style-name="P15">Un contrôleur qualité s’intéresse à leurs formes (ronde ou <text:span text:style-name="T7">baroque</text:span>) et à leurs couleurs (grise ou verte).</text:p>
      <text:list xml:id="list2113870603" text:style-name="L1">
        <text:list-item>
          <text:p text:style-name="P26">35 % des perles sont de couleur verte, et parmi celles ci 13 sont de forme ronde.</text:p>
        </text:list-item>
        <text:list-item>
          <text:p text:style-name="P26">Il y a 176 perles de forme baroque.</text:p>
        </text:list-item>
      </text:list>
      <text:p text:style-name="P15">Il note les résultats dans la feuille de calcul ci-dessous</text:p>
      <text:p text:style-name="P15"><draw:frame draw:style-name="fr2" draw:name="Image5" text:anchor-type="paragraph" svg:width="9.58cm" svg:height="2.275cm" draw:z-index="4"><draw:image xlink:href="Pictures/100002010000016A00000056781E23385CE5E622.png" xlink:type="simple" xlink:show="embed" xlink:actuate="onLoad" loext:mime-type="image/png"/></draw:frame></text:p>
      <text:p text:style-name="P15"/>
      <text:p text:style-name="P15"/>
      <text:p text:style-name="P16">1. Pour obtenir le nombre de perles vertes à partir des informations données dans l’énoncé, quelle formule doit-il saisir en D3 ? Parmi les quatre formules proposées, entourer la bonne formule :</text:p>
      <text:p text:style-name="P16"/>
      <text:p text:style-name="P16"><text:tab/>=D4*1,35 <text:s text:c="9"/>220*35/100 <text:s text:c="6"/>=D4*0,35 <text:s text:c="6"/>=B3*C3</text:p>
      <text:p text:style-name="P16">2. Recopier et compléter le tableau sur votre feuille de calcul.</text:p>
      <text:p text:style-name="P16"/>
      <text:p text:style-name="P16">3. Quelle formule peut-on saisir en B4 pour déterminer le nombre de perles rondes. Parmi les quatre formules proposées, entourer la bonne formule :</text:p>
      <text:p text:style-name="P16"/>
      <text:p text:style-name="P16"><text:tab/>=D4-176 <text:s text:c="6"/>=220/176 <text:s text:c="6"/>=B2/B4 <text:s text:c="7"/>=C3*C2</text:p>
      <text:p text:style-name="P16"/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Appeler le professeur ! <text:s text:c="5"/>Remarque du professeur :<text:line-break/></text:p>
          </table:table-cell>
        </table:table-row>
      </table:table>
      <text:p text:style-name="P33">Exercice <text:span text:style-name="T8">5</text:span> :</text:p>
      <text:p text:style-name="P27">On <text:span text:style-name="T3">considère</text:span> la fonction <draw:frame draw:style-name="fr3" draw:name="Objet1" text:anchor-type="as-char" svg:y="-0.527cm" svg:width="2.471cm" svg:height="0.739cm" draw:z-index="6"><draw:object xlink:href="./Object 1" xlink:type="simple" xlink:show="embed" xlink:actuate="onLoad"/><draw:image xlink:href="./ObjectReplacements/Object 1" xlink:type="simple" xlink:show="embed" xlink:actuate="onLoad"/><svg:desc>formule</svg:desc></draw:frame>.</text:p>
      <text:p text:style-name="P28"><draw:frame draw:style-name="fr1" draw:name="Image4" text:anchor-type="paragraph" svg:x="6.713cm" svg:y="0.695cm" svg:width="5.424cm" svg:height="3.307cm" draw:z-index="8"><draw:image xlink:href="Pictures/10000201000000CD0000007D13347BE90A87D745.png" xlink:type="simple" xlink:show="embed" xlink:actuate="onLoad" loext:mime-type="image/png"/></draw:frame>On souhaite représenter le tableau de valeurs de la fonction entre -2 et 12.</text:p>
      <text:p text:style-name="P28"><draw:line text:anchor-type="paragraph" draw:z-index="9" draw:name="Forme1" draw:style-name="gr1" draw:text-style-name="P39" svg:x1="14.893cm" svg:y1="0.494cm" svg:x2="14.923cm" svg:y2="2.552cm"><text:p/></draw:line>Pour cela on va s’aider du tableur.</text:p>
      <text:p text:style-name="P28"/>
      <text:p text:style-name="P28"/>
      <text:p text:style-name="P28"><text:soft-page-break/>Veuillez recopier l’image ci-contre sur votre tableur Puis sélectionner les cellules A2 jusqu’à A4 puis cliquer sur le carré en bas à droite et étendez jusqu’à A16. </text:p>
      <text:p text:style-name="P28">1) Qu’est ce que les cellules affichent de A2 jusqu’à A16 ?</text:p>
      <text:p text:style-name="P35"/>
      <text:p text:style-name="P34"/>
      <text:p text:style-name="P36">2) Dans la cellule B2, on souhaite voir apparaître l’image de - 2 par la fonction <text:span text:style-name="T4">f</text:span><text:span text:style-name="T5">. On souhaite entrer dans la cellule B2 la formule : « =3*</text:span><text:span text:style-name="T6">A</text:span><text:span text:style-name="T5">2+4 ». Qu’est ce qu’affiche le tableur ? Que peut-on conclure sur l’image de – 2 par </text:span><text:span text:style-name="T4">f ?</text:span></text:p>
      <text:p text:style-name="P37"/>
      <text:p text:style-name="P38">3) Sélectionner la case B2 puis cliquer sur le carré jusqu’à la cellule B16. À l’aide du tableur, quelle est l’image de 2, 4, et 6 par la fonction <text:span text:style-name="T4">f</text:span>.</text:p>
      <text:p text:style-name="P38"/>
      <text:p text:style-name="P32"/>
      <text:p text:style-name="P32">4) Cette fois-ci on considère la fonction <draw:frame draw:style-name="fr3" draw:name="Objet2" text:anchor-type="as-char" svg:y="-0.527cm" svg:width="2.582cm" svg:height="0.739cm" draw:z-index="7"><draw:object xlink:href="./Object 2" xlink:type="simple" xlink:show="embed" xlink:actuate="onLoad"/><draw:image xlink:href="./ObjectReplacements/Object 2" xlink:type="simple" xlink:show="embed" xlink:actuate="onLoad"/><svg:desc>formule</svg:desc></draw:frame>. En utilisant la même méthode et avec l’aide du tableur. <text:s/>Représenter le tableau de valeurs de la fonction <text:span text:style-name="T4">g</text:span> entre -5 et 14.</text:p>
      <text:p text:style-name="P38">À l’aide du tableur, quelle est l’image de – 2 , 3, et 12 par la fonction <text:span text:style-name="T4">f</text:span>.</text:p>
      <text:p text:style-name="P38"/>
      <text:p text:style-name="P29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5">Appeler le professeur ! <text:s text:c="5"/>Remarque du professeur :<text:line-break/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4T21:14:57.977000000</meta:creation-date>
    <dc:date>2021-12-05T20:32:42.477000000</dc:date>
    <meta:editing-duration>PT21M4S</meta:editing-duration>
    <meta:editing-cycles>4</meta:editing-cycles>
    <meta:generator>LibreOffice/6.2.3.2$Windows_X86_64 LibreOffice_project/aecc05fe267cc68dde00352a451aa867b3b546ac</meta:generator>
    <meta:document-statistic meta:table-count="5" meta:image-count="6" meta:object-count="2" meta:page-count="4" meta:paragraph-count="45" meta:word-count="668" meta:character-count="3888" meta:non-whitespace-character-count="3133"/>
  </office:meta>
</office:document-meta>
</file>

<file path=Object 1/content.xml><?xml version="1.0" encoding="utf-8"?>
<math xmlns="http://www.w3.org/1998/Math/MathML" display="block">
  <semantics>
    <mrow>
      <mi>f</mi>
      <mi mathvariant="normal">:</mi>
      <mrow>
        <mi>x</mi>
        <mo stretchy="false">→</mo>
        <mn>3</mn>
      </mrow>
      <mrow>
        <mi>x</mi>
        <mo stretchy="false">+</mo>
        <mn>4</mn>
      </mrow>
    </mrow>
    <annotation encoding="StarMath 5.0">f: x toward 3x+4 </annotation>
  </semantics>
</math>
</file>

<file path=Object 2/content.xml><?xml version="1.0" encoding="utf-8"?>
<math xmlns="http://www.w3.org/1998/Math/MathML" display="block">
  <semantics>
    <mrow>
      <mi>g</mi>
      <mi mathvariant="normal">:</mi>
      <mrow>
        <mi>x</mi>
        <mo stretchy="false">→</mo>
        <mn>2</mn>
      </mrow>
      <mrow>
        <mi>x</mi>
        <mo stretchy="false">−</mo>
        <mn>4</mn>
      </mrow>
    </mrow>
    <annotation encoding="StarMath 5.0">g: x  toward 2x-4 </annotation>
  </semantics>
</math>
</file>