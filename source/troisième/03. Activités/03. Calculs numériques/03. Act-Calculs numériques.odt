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C000001B705C7C1763401A5DE.png" manifest:media-type="image/png"/>
  <manifest:file-entry manifest:full-path="Pictures/100002010000030F000001FFC51A523D300A7EE6.png" manifest:media-type="image/png"/>
  <manifest:file-entry manifest:full-path="Pictures/10000201000002EA0000017D556FE437FD49F01E.png" manifest:media-type="image/png"/>
  <manifest:file-entry manifest:full-path="Pictures/100002010000033300000179BABF8240D03183DB.png" manifest:media-type="image/png"/>
  <manifest:file-entry manifest:full-path="Pictures/10000201000003290000019169A115A6FBE43843.png" manifest:media-type="image/png"/>
  <manifest:file-entry manifest:full-path="Pictures/100002010000032000000214AA6F40A09C8F30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OpenDyslexic" officeooo:rsid="00144c87" officeooo:paragraph-rsid="00144c87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144c87" officeooo:paragraph-rsid="00144c87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482f4" officeooo:paragraph-rsid="001482f4"/>
    </style:style>
    <style:style style:name="P5" style:family="paragraph" style:parent-style-name="Standard">
      <style:text-properties style:font-name="OpenDyslexic" style:text-underline-style="none" officeooo:rsid="00144c87" officeooo:paragraph-rsid="00144c87"/>
    </style:style>
    <style:style style:name="P6" style:family="paragraph" style:parent-style-name="Standard">
      <style:text-properties style:font-name="OpenDyslexic" style:text-underline-style="none" officeooo:rsid="001482f4" officeooo:paragraph-rsid="001482f4"/>
    </style:style>
    <style:style style:name="P7" style:family="paragraph" style:parent-style-name="Standard">
      <style:text-properties style:font-name="OpenDyslexic" style:text-underline-style="none" officeooo:rsid="00160e7f" officeooo:paragraph-rsid="00160e7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ollège A.Lejeune <text:s text:c="64"/>3ème</text:p>
            <text:p text:style-name="P1">Exercices de groupe <text:s text:c="13"/></text:p>
          </table:table-cell>
        </table:table-row>
      </table:table>
      <text:p text:style-name="P2"/>
      <text:p text:style-name="P3">Exercice 1 :</text:p>
      <text:p text:style-name="P5">Entoure la bonne réponse pour chaque question.</text:p>
      <text:p text:style-name="P3"><draw:frame draw:style-name="fr1" draw:name="Image1" text:anchor-type="paragraph" svg:width="17cm" svg:height="9.567cm" draw:z-index="0"><draw:image xlink:href="Pictures/100002010000030C000001B705C7C1763401A5DE.png" xlink:type="simple" xlink:show="embed" xlink:actuate="onLoad" loext:mime-type="image/png"/></draw:frame>Exercice 2 :</text:p>
      <text:p text:style-name="P5"><draw:frame draw:style-name="fr2" draw:name="Image2" text:anchor-type="paragraph" svg:x="-0.235cm" svg:y="1.291cm" svg:width="17cm" svg:height="11.095cm" draw:z-index="1"><draw:image xlink:href="Pictures/100002010000030F000001FFC51A523D300A7EE6.png" xlink:type="simple" xlink:show="embed" xlink:actuate="onLoad" loext:mime-type="image/png"/></draw:frame>Pour chaque affirmation, entoure la bonne réponse.</text:p>
      <text:p text:style-name="P3"><text:soft-page-break/>Exercice 3 :</text:p>
      <text:p text:style-name="P3"><draw:frame draw:style-name="fr1" draw:name="Image3" text:anchor-type="paragraph" svg:width="17cm" svg:height="7.825cm" draw:z-index="2"><draw:image xlink:href="Pictures/100002010000033300000179BABF8240D03183DB.png" xlink:type="simple" xlink:show="embed" xlink:actuate="onLoad" loext:mime-type="image/png"/></draw:frame>Exercice 4 :</text:p>
      <text:p text:style-name="P5">Traduis chaque phrase par une égalité.</text:p>
      <text:p text:style-name="P3"><draw:frame draw:style-name="fr1" draw:name="Image4" text:anchor-type="paragraph" svg:width="17cm" svg:height="8.682cm" draw:z-index="3"><draw:image xlink:href="Pictures/10000201000002EA0000017D556FE437FD49F01E.png" xlink:type="simple" xlink:show="embed" xlink:actuate="onLoad" loext:mime-type="image/png"/></draw:frame>Exercice 5 :</text:p>
      <text:p text:style-name="P5">On considère une fonction <text:span text:style-name="T1">h</text:span><text:span text:style-name="T2"> qui à tout nombre associe la moitié de ce nombre.</text:span></text:p>
      <text:p text:style-name="P5"><draw:frame draw:style-name="fr2" draw:name="Image5" text:anchor-type="paragraph" svg:x="0.295cm" svg:y="0.931cm" svg:width="17cm" svg:height="8.426cm" draw:z-index="4"><draw:image xlink:href="Pictures/10000201000003290000019169A115A6FBE43843.png" xlink:type="simple" xlink:show="embed" xlink:actuate="onLoad" loext:mime-type="image/png"/></draw:frame><text:soft-page-break/><text:span text:style-name="T2"/></text:p>
      <text:p text:style-name="P4"><text:span text:style-name="T2">Exercice 6 :</text:span></text:p>
      <text:p text:style-name="P6"><text:span text:style-name="T2">Soit la fonction </text:span><text:span text:style-name="T1">k </text:span><text:span text:style-name="T2">qui à tout nombre associe son inverse.</text:span></text:p>
      <text:p text:style-name="P4"><draw:frame draw:style-name="fr1" draw:name="Image6" text:anchor-type="paragraph" svg:width="17cm" svg:height="11.305cm" draw:z-index="5"><draw:image xlink:href="Pictures/100002010000032000000214AA6F40A09C8F3001.png" xlink:type="simple" xlink:show="embed" xlink:actuate="onLoad" loext:mime-type="image/png"/></draw:frame><text:span text:style-name="T2">Exercice 7 :</text:span></text:p>
      <text:p text:style-name="P6"><text:span text:style-name="T2">Vous venez de plaquer l’ex-amour de votre vie ! Vous l’abandonnez sur la jetée (altitude de ses yeux humides : 4 m) et ramez irrésistiblement vers le large (altitude de vos yeux impitoyables : 1m).</text:span></text:p>
      <text:p text:style-name="P7"><text:soft-page-break/><text:span text:style-name="T2">à quelle distance du rivage (mesurée comme si vous marchiez sur l’eau) échapperez-vous à son regard déchirant, en disparaissant de son horizon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1:33:45.162000000</meta:creation-date>
    <dc:date>2021-11-29T22:05:38.749000000</dc:date>
    <meta:editing-duration>PT10M34S</meta:editing-duration>
    <meta:editing-cycles>1</meta:editing-cycles>
    <meta:document-statistic meta:table-count="1" meta:image-count="6" meta:object-count="0" meta:page-count="4" meta:paragraph-count="16" meta:word-count="131" meta:character-count="812" meta:non-whitespace-character-count="619"/>
    <meta:generator>LibreOffice/6.2.3.2$Windows_X86_64 LibreOffice_project/aecc05fe267cc68dde00352a451aa867b3b546ac</meta:generator>
  </office:meta>
</office:document-meta>
</file>