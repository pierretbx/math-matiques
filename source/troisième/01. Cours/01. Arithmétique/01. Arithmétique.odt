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A8000000D394F4982535DC132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officeooo:rsid="00007353" officeooo:paragraph-rsid="00007353"/>
    </style:style>
    <style:style style:name="P3" style:family="paragraph" style:parent-style-name="Standard" style:list-style-name="L1">
      <style:text-properties style:font-name="OpenDyslexic" style:text-underline-style="solid" style:text-underline-width="auto" style:text-underline-color="font-color" officeooo:rsid="00007353" officeooo:paragraph-rsid="00007353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07353" officeooo:paragraph-rsid="00007353"/>
    </style:style>
    <style:style style:name="P5" style:family="paragraph" style:parent-style-name="Standard" style:list-style-name="L1">
      <style:text-properties style:font-name="OpenDyslexic" style:text-underline-style="solid" style:text-underline-width="auto" style:text-underline-color="font-color" officeooo:rsid="0000764d" officeooo:paragraph-rsid="0000764d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0764d" officeooo:paragraph-rsid="0000764d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fo:font-weight="bold" officeooo:rsid="000245d8" officeooo:paragraph-rsid="000245d8" style:font-weight-asian="bold" style:font-weight-complex="bold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02eb8c" officeooo:paragraph-rsid="0002eb8c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0336b4" officeooo:paragraph-rsid="000336b4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03741d" officeooo:paragraph-rsid="0003741d"/>
    </style:style>
    <style:style style:name="P11" style:family="paragraph" style:parent-style-name="Standard">
      <style:text-properties style:font-name="OpenDyslexic" style:text-underline-style="solid" style:text-underline-width="auto" style:text-underline-color="font-color" officeooo:rsid="00051b27" officeooo:paragraph-rsid="00051b27"/>
    </style:style>
    <style:style style:name="P12" style:family="paragraph" style:parent-style-name="Standard">
      <style:text-properties style:font-name="OpenDyslexic" style:text-underline-style="solid" style:text-underline-width="auto" style:text-underline-color="font-color" officeooo:rsid="000564d7" officeooo:paragraph-rsid="000564d7"/>
    </style:style>
    <style:style style:name="P13" style:family="paragraph" style:parent-style-name="Standard">
      <style:text-properties style:font-name="OpenDyslexic" style:text-underline-style="solid" style:text-underline-width="auto" style:text-underline-color="font-color" officeooo:rsid="0006f5ac" officeooo:paragraph-rsid="0006f5ac"/>
    </style:style>
    <style:style style:name="P14" style:family="paragraph" style:parent-style-name="Standard">
      <style:text-properties style:font-name="OpenDyslexic" style:text-underline-style="solid" style:text-underline-width="auto" style:text-underline-color="font-color" officeooo:rsid="00072721" officeooo:paragraph-rsid="00072721"/>
    </style:style>
    <style:style style:name="P15" style:family="paragraph" style:parent-style-name="Standard">
      <style:text-properties style:font-name="OpenDyslexic" style:text-underline-style="solid" style:text-underline-width="auto" style:text-underline-color="font-color" officeooo:rsid="000753fd" officeooo:paragraph-rsid="000753fd"/>
    </style:style>
    <style:style style:name="P16" style:family="paragraph" style:parent-style-name="Standard">
      <style:text-properties style:font-name="OpenDyslexic" officeooo:rsid="0000764d" officeooo:paragraph-rsid="0000764d"/>
    </style:style>
    <style:style style:name="P17" style:family="paragraph" style:parent-style-name="Standard">
      <style:text-properties style:font-name="OpenDyslexic" style:text-underline-style="none" fo:font-weight="bold" officeooo:rsid="0000764d" officeooo:paragraph-rsid="0000764d" style:font-weight-asian="bold" style:font-weight-complex="bold"/>
    </style:style>
    <style:style style:name="P18" style:family="paragraph" style:parent-style-name="Standard">
      <style:text-properties style:font-name="OpenDyslexic" style:text-underline-style="none" officeooo:rsid="0003741d" officeooo:paragraph-rsid="0003741d"/>
    </style:style>
    <style:style style:name="P19" style:family="paragraph" style:parent-style-name="Standard">
      <style:text-properties style:font-name="OpenDyslexic" style:text-underline-style="none" officeooo:rsid="00051b27" officeooo:paragraph-rsid="00051b27"/>
    </style:style>
    <style:style style:name="P20" style:family="paragraph" style:parent-style-name="Standard">
      <style:text-properties style:font-name="OpenDyslexic" style:text-underline-style="none" officeooo:rsid="000564d7" officeooo:paragraph-rsid="000564d7"/>
    </style:style>
    <style:style style:name="P21" style:family="paragraph" style:parent-style-name="Table_20_Contents">
      <style:text-properties style:font-name="OpenDyslexic" officeooo:rsid="00007353" officeooo:paragraph-rsid="00007353"/>
    </style:style>
    <style:style style:name="P22" style:family="paragraph" style:parent-style-name="Table_20_Contents">
      <style:text-properties style:font-name="OpenDyslexic" officeooo:rsid="0000764d" officeooo:paragraph-rsid="0000764d"/>
    </style:style>
    <style:style style:name="P23" style:family="paragraph" style:parent-style-name="Table_20_Contents">
      <style:text-properties style:font-name="OpenDyslexic" style:text-underline-style="solid" style:text-underline-width="auto" style:text-underline-color="font-color" officeooo:rsid="0002eb8c" officeooo:paragraph-rsid="0002eb8c"/>
    </style:style>
    <style:style style:name="P24" style:family="paragraph" style:parent-style-name="Table_20_Contents">
      <style:paragraph-properties fo:text-align="center" style:justify-single-word="false"/>
      <style:text-properties style:font-name="OpenDyslexic" style:text-underline-style="solid" style:text-underline-width="auto" style:text-underline-color="font-color" officeooo:rsid="0002eb8c" officeooo:paragraph-rsid="0002eb8c"/>
    </style:style>
    <style:style style:name="P25" style:family="paragraph" style:parent-style-name="Table_20_Contents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2eb8c" officeooo:paragraph-rsid="0002eb8c"/>
    </style:style>
    <style:style style:name="P26" style:family="paragraph" style:parent-style-name="Table_20_Contents">
      <style:text-properties style:font-name="OpenDyslexic" style:text-underline-style="solid" style:text-underline-width="auto" style:text-underline-color="font-color" officeooo:rsid="0003741d" officeooo:paragraph-rsid="0003741d"/>
    </style:style>
    <style:style style:name="P27" style:family="paragraph" style:parent-style-name="Table_20_Contents">
      <style:text-properties style:font-name="OpenDyslexic" style:text-underline-style="solid" style:text-underline-width="auto" style:text-underline-color="font-color" officeooo:rsid="000564d7" officeooo:paragraph-rsid="000564d7"/>
    </style:style>
    <style:style style:name="P28" style:family="paragraph" style:parent-style-name="Table_20_Contents">
      <style:text-properties style:font-name="OpenDyslexic" style:text-underline-style="solid" style:text-underline-width="auto" style:text-underline-color="font-color" officeooo:rsid="0006f5ac" officeooo:paragraph-rsid="0006f5ac"/>
    </style:style>
    <style:style style:name="P29" style:family="paragraph" style:parent-style-name="Table_20_Contents">
      <style:text-properties style:font-name="OpenDyslexic" style:text-underline-style="solid" style:text-underline-width="auto" style:text-underline-color="font-color" officeooo:rsid="00072721" officeooo:paragraph-rsid="00072721"/>
    </style:style>
    <style:style style:name="P30" style:family="paragraph" style:parent-style-name="Table_20_Contents">
      <style:text-properties style:font-name="OpenDyslexic" style:text-underline-style="solid" style:text-underline-width="auto" style:text-underline-color="font-color" officeooo:rsid="000753fd" officeooo:paragraph-rsid="000753fd"/>
    </style:style>
    <style:style style:name="P31" style:family="paragraph" style:parent-style-name="Table_20_Contents">
      <style:text-properties style:font-name="OpenDyslexic" officeooo:rsid="00045a63" officeooo:paragraph-rsid="00045a63"/>
    </style:style>
    <style:style style:name="P32" style:family="paragraph" style:parent-style-name="Table_20_Contents">
      <style:text-properties style:font-name="OpenDyslexic" officeooo:rsid="00051b27" officeooo:paragraph-rsid="00051b27"/>
    </style:style>
    <style:style style:name="T1" style:family="text">
      <style:text-properties officeooo:rsid="0000764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2eb8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06f5ac"/>
    </style:style>
    <style:style style:name="T11" style:family="text">
      <style:text-properties officeooo:rsid="0002eb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Collège A.Lejeune <text:s text:c="67"/>3ème</text:p>
            <text:p text:style-name="P21">Cours <text:s text:c="28"/>Chapitre 1 : Les nombres entiers</text:p>
          </table:table-cell>
        </table:table-row>
      </table:table>
      <text:p text:style-name="P1"/>
      <text:p text:style-name="P2">Connaissances à acquérir à la fin du chapitre :</text:p>
      <text:p text:style-name="P2">-<text:span text:style-name="T1">Multiple et diviseur</text:span></text:p>
      <text:p text:style-name="P16">-Critères de divisibilité par 2, 3, 5 et 9</text:p>
      <text:p text:style-name="P16">-Division euclidienne (quotient, reste)</text:p>
      <text:p text:style-name="P16">-Définition d’un nombre premier, liste des nombres premiers inférieurs ou égaux à 30.</text:p>
      <text:p text:style-name="P16">-Fractions irréductibles</text:p>
      <text:list xml:id="list3633583088" text:style-name="L1">
        <text:list-item>
          <text:p text:style-name="P3">Division euclidienne</text:p>
          <text:list>
            <text:list-item>
              <text:p text:style-name="P5">Multiple et diviseur</text:p>
            </text:list-item>
          </text:list>
        </text:list-item>
      </text:list>
      <text:p text:style-name="P17">Soit a un entier naturel et b un entier naturel non nul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2"><text:span text:style-name="T6">Définition </text:span><text:span text:style-name="T11">: </text:span>Si <draw:frame draw:style-name="fr3" draw:name="Objet1" text:anchor-type="as-char" svg:y="-0.527cm" svg:width="1.743cm" svg:height="0.739cm" draw:z-index="0"><draw:object xlink:href="./Object 1" xlink:type="simple" xlink:show="embed" xlink:actuate="onLoad"/><draw:image xlink:href="./ObjectReplacements/Object 1" xlink:type="simple" xlink:show="embed" xlink:actuate="onLoad"/></draw:frame>( ou <draw:frame draw:style-name="fr3" draw:name="Objet2" text:anchor-type="as-char" svg:y="-0.527cm" svg:width="1.744cm" svg:height="0.739cm" draw:z-index="1"><draw:object xlink:href="./Object 2" xlink:type="simple" xlink:show="embed" xlink:actuate="onLoad"/><draw:image xlink:href="./ObjectReplacements/Object 2" xlink:type="simple" xlink:show="embed" xlink:actuate="onLoad"/></draw:frame>) où k est un entier naturel,</text:p>
            <text:p text:style-name="P22">alors <draw:frame draw:style-name="fr3" draw:name="Objet3" text:anchor-type="as-char" svg:y="-0.527cm" svg:width="0.46cm" svg:height="0.739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">est un </text:span><text:span text:style-name="T5">multiple</text:span><text:span text:style-name="T3"> de </text:span><text:span text:style-name="T2">b ou a </text:span><text:span text:style-name="T5">divisible</text:span><text:span text:style-name="T3"> par </text:span><text:span text:style-name="T2">b ou b </text:span><text:span text:style-name="T3">est un </text:span><text:span text:style-name="T5">diviseur</text:span><text:span text:style-name="T2"> de a ou b </text:span><text:span text:style-name="T5">divise</text:span><text:span text:style-name="T3"> </text:span><text:span text:style-name="T2">a.</text:span></text:p>
          </table:table-cell>
        </table:table-row>
      </table:table>
      <text:p text:style-name="P17"><text:span text:style-name="T2"/></text:p>
      <text:p text:style-name="P7"><text:span text:style-name="T2">Exemple :</text:span><text:span text:style-name="T8"> On sait que </text:span><text:span text:style-name="T8"><draw:frame draw:style-name="fr3" draw:name="Objet4" text:anchor-type="as-char" svg:y="-0.527cm" svg:width="1.974cm" svg:height="0.73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. Il faut compléter les phrases suivantes avec le mot « multiple », »divisible » et « diviseur ».</text:span></text:p>
      <text:p text:style-name="P7"><text:span text:style-name="T8">1) 63 est un …………………………… de 9.</text:span></text:p>
      <text:p text:style-name="P7"><text:span text:style-name="T8">2) 7 …………………………. 63.</text:span></text:p>
      <text:p text:style-name="P7"><text:span text:style-name="T8">3) 63 est ………………………………… par 9.</text:span></text:p>
      <text:list xml:id="list182814078445617" text:continue-numbering="true" text:style-name="L1">
        <text:list-item>
          <text:list>
            <text:list-item>
              <text:p text:style-name="P5">Division euclidienne</text:p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3">Définition :</text:p>
            <text:p text:style-name="P23"><text:span text:style-name="T7">a et b désignent deux nombres entiers positifs, avec </text:span><text:span text:style-name="T7"><draw:frame draw:style-name="fr3" draw:name="Objet5" text:anchor-type="as-char" svg:y="-0.527cm" svg:width="1.108cm" svg:height="0.73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7">.</text:span></text:p>
            <text:p text:style-name="P23"><text:span text:style-name="T7">Effectuer la </text:span><text:span text:style-name="T9">division euclidienne </text:span><text:span text:style-name="T8">de a par b signifie déterminer deux nombres entiers positifs q et r qui vérifient :</text:span></text:p>
            <text:p text:style-name="P24"><text:span text:style-name="T8"><draw:frame draw:style-name="fr3" draw:name="Objet6" text:anchor-type="as-char" svg:y="-0.527cm" svg:width="2.21cm" svg:height="0.73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<text:s/>avec </text:span><text:span text:style-name="T8"><draw:frame draw:style-name="fr3" draw:name="Objet7" text:anchor-type="as-char" svg:y="-0.527cm" svg:width="0.967cm" svg:height="0.739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    <text:p text:style-name="P25"><text:span text:style-name="T8">q s’appelle le quotient de la division euclidienne</text:span></text:p>
            <text:p text:style-name="P25"><text:span text:style-name="T8">r s’appelle le reste de la division euclidienne</text:span></text:p>
          </table:table-cell>
        </table:table-row>
      </table:table>
      <text:p text:style-name="P6"/>
      <text:p text:style-name="P8">Exemple :</text:p>
      <text:p text:style-name="P9"><text:span text:style-name="T7">a) Effectue la division euclidienne de 183 par 12.</text:span></text:p>
      <text:p text:style-name="P9"><text:soft-page-break/><text:span text:style-name="T7">b) </text:span><text:span text:style-name="T7"><draw:frame draw:style-name="fr3" draw:name="Objet8" text:anchor-type="as-char" svg:y="-0.527cm" svg:width="3.09cm" svg:height="0.73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. Quelle(s) division(s) euclidienne(s) cette égalité représente-t-elle ?</text:span></text:p>
      <text:p text:style-name="P9"><draw:frame draw:style-name="fr1" draw:name="Image1" text:anchor-type="paragraph" svg:width="20.876cm" svg:height="3.831cm" draw:z-index="8"><draw:image xlink:href="Pictures/10000201000003A8000000D394F4982535DC1324.png" xlink:type="simple" xlink:show="embed" xlink:actuate="onLoad" loext:mime-type="image/png"/></draw:frame><text:span text:style-name="T7"/></text:p>
      <text:list xml:id="list182812989935393" text:continue-numbering="true" text:style-name="L1">
        <text:list-item>
          <text:p text:style-name="P3">Plus Grand commun diviseur de deux entiers</text:p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6">Définition :<text:span text:style-name="T7"> a et b désignent deux nombres entiers strictement positifs. Le plus grand commun diviseur des nombres a et b s’appelle le PGCD des nombres a et b.</text:span></text:p>
            <text:p text:style-name="P26"><text:span text:style-name="T7">On le note : PGCD (a;b).</text:span></text:p>
          </table:table-cell>
        </table:table-row>
      </table:table>
      <text:p text:style-name="P4"/>
      <text:p text:style-name="P10">Exemples :</text:p>
      <text:p text:style-name="P18">1) Donner la liste des diviseurs de 18 :</text:p>
      <text:p text:style-name="P18"/>
      <text:p text:style-name="P18">2) Donner la liste des diviseurs de 45 :</text:p>
      <text:p text:style-name="P18"/>
      <text:p text:style-name="P18">3) Les diviseurs communs à 18 et 45 sont :</text:p>
      <text:p text:style-name="P18"/>
      <text:p text:style-name="P18">4) Donc : PGCD(18;45)=….</text:p>
      <text:p text:style-name="P1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1"><text:span text:style-name="T4">Propriétés :</text:span> a et b désignent deux nombres entiers strictement positifs, avec a&lt;b.</text:p>
            <text:p text:style-name="P31">PGCD(a;a)=a <text:s text:c="15"/>PGCD(a;1)=1 <text:s text:c="21"/>PGCD(a;b)=PGCD(b;a)</text:p>
            <text:p text:style-name="P31">Si b est un diviseur de a, alors PGCD(a;b)=b.</text:p>
          </table:table-cell>
        </table:table-row>
      </table:table>
      <text:p text:style-name="P18"/>
      <text:p text:style-name="P11">Exemples :</text:p>
      <text:p text:style-name="P19">- PGCD(103;103)=</text:p>
      <text:p text:style-name="P19">- PGCD(47;1)=</text:p>
      <text:p text:style-name="P19">- PGCD(31;27)=PGCD(…… ;……..)</text:p>
      <text:p text:style-name="P19">- On a <draw:frame draw:style-name="fr3" draw:name="Objet9" text:anchor-type="as-char" svg:y="-0.527cm" svg:width="2.208cm" svg:height="0.739cm" draw:z-index="9"><draw:object xlink:href="./Object 9" xlink:type="simple" xlink:show="embed" xlink:actuate="onLoad"/><draw:image xlink:href="./ObjectReplacements/Object 9" xlink:type="simple" xlink:show="embed" xlink:actuate="onLoad"/></draw:frame>, donc PGCD(85;17)=……</text:p>
      <table:table table:name="Tableau6" table:style-name="Tableau6">
        <table:table-column table:style-name="Tableau6.A"/>
        <text:soft-page-break/>
        <table:table-row>
          <table:table-cell table:style-name="Tableau6.A1" office:value-type="string">
            <text:p text:style-name="P32"><text:s/>Soit a et b deux nombres entiers strictement positifs, avec a&gt;b.</text:p>
            <text:p text:style-name="P32">PGCD(a;b)=PGCD(b;a-b)</text:p>
          </table:table-cell>
        </table:table-row>
      </table:table>
      <text:p text:style-name="P11">Exemple :</text:p>
      <text:p text:style-name="P19">Calcul du PGCD(145;58) :</text:p>
      <text:p text:style-name="P19">1) 145-58=87 d’où <text:s/>PGCD(145;58)=PGCD(58;87)</text:p>
      <text:p text:style-name="P19">2)</text:p>
      <text:p text:style-name="P19">3)</text:p>
      <text:p text:style-name="P19">4)</text:p>
      <text:p text:style-name="P20"/>
      <text:p text:style-name="P20"><draw:frame draw:style-name="fr2" draw:name="Image2" text:anchor-type="paragraph" svg:x="-1.937cm" svg:y="0.873cm" svg:width="20.876cm" svg:height="3.831cm" draw:z-index="10"><draw:image xlink:href="Pictures/10000201000003A8000000D394F4982535DC1324.png" xlink:type="simple" xlink:show="embed" xlink:actuate="onLoad" loext:mime-type="image/png"/></draw:frame>Calcul du PGCD(189;693) :</text:p>
      <text:p text:style-name="P2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7">Propriété :<text:span text:style-name="T7"> a et b désignent deux nombres entiers strictement positifs, avec a&gt;b. PGCD(a;b)=PGCD(b;r) où r est le reste de la division euclidienne de a par b.</text:span></text:p>
          </table:table-cell>
        </table:table-row>
      </table:table>
      <text:p text:style-name="P20"/>
      <text:p text:style-name="P12">Exemple :<text:span text:style-name="T7"> </text:span><text:span text:style-name="T10">Calcul du PGCD(224;80)</text:span></text:p>
      <text:p text:style-name="P13"><text:span text:style-name="T7"><draw:frame draw:style-name="fr3" draw:name="Objet10" text:anchor-type="as-char" svg:y="-0.527cm" svg:width="3.366cm" svg:height="0.739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7">d’où PGCD(224;80)=PGCD(80;64)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list xml:id="list182813727525337" text:continue-numbering="true" text:style-name="L1">
        <text:list-item>
          <text:p text:style-name="P3">Fraction irréductible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8">Définition :<text:span text:style-name="T7"> On dit que deux nombres entiers sont premiers entre eux lorsque leur PGCD est égal à 1.</text:span></text:p>
          </table:table-cell>
        </table:table-row>
      </table:table>
      <text:p text:style-name="P4"/>
      <text:p text:style-name="P14">Exemples :<text:span text:style-name="T7"> Démontrer que 26 et 49 sont des nombres premiers entre eux.</text:span></text:p>
      <text:p text:style-name="P14"><text:span text:style-name="T7"/></text:p>
      <text:p text:style-name="P14"><text:span text:style-name="T7"/></text:p>
      <table:table table:name="Tableau9" table:style-name="Tableau9">
        <table:table-column table:style-name="Tableau9.A"/>
        <text:soft-page-break/>
        <table:table-row>
          <table:table-cell table:style-name="Tableau9.A1" office:value-type="string">
            <text:p text:style-name="P29">Définition :<text:span text:style-name="T7"> Une fraction est irréductible lorsque son numérateur et son dénominateur sont premiers entre eux.</text:span></text:p>
          </table:table-cell>
        </table:table-row>
      </table:table>
      <text:p text:style-name="P14">Exemples :</text:p>
      <text:p text:style-name="P14"><text:span text:style-name="T7">1) Peut-on simplifier la fraction suivante </text:span><text:span text:style-name="T7"><draw:frame draw:style-name="fr3" draw:name="Objet11" text:anchor-type="as-char" svg:y="-0.891cm" svg:width="0.843cm" svg:height="1.54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7"> ?</text:span></text:p>
      <text:p text:style-name="P14"><text:span text:style-name="T7"/></text:p>
      <text:p text:style-name="P14"><text:span text:style-name="T7">2) Peut-on simplifier la fraction suivante </text:span><text:span text:style-name="T7"><draw:frame draw:style-name="fr3" draw:name="Objet12" text:anchor-type="as-char" svg:y="-0.891cm" svg:width="0.831cm" svg:height="1.54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7"> ?</text:span></text:p>
      <text:p text:style-name="P14"><text:span text:style-name="T7"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0">Propriété :<text:span text:style-name="T7"> a et b désignent des nombres entiers positifs, avec </text:span><text:span text:style-name="T7"><draw:frame draw:style-name="fr3" draw:name="Objet13" text:anchor-type="as-char" svg:y="-0.527cm" svg:width="1.108cm" svg:height="0.739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7">.</text:span></text:p>
            <text:p text:style-name="P30"><text:span text:style-name="T7">La fraction </text:span><text:span text:style-name="T7"><draw:frame draw:style-name="fr3" draw:name="Objet14" text:anchor-type="as-char" svg:y="-0.891cm" svg:width="0.564cm" svg:height="1.54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7">peut être simplifiée par le PGCD (a;b) et la fraction ainsi obtenue est irréductible.</text:span></text:p>
          </table:table-cell>
        </table:table-row>
      </table:table>
      <text:p text:style-name="P14"><text:span text:style-name="T7"/></text:p>
      <text:p text:style-name="P15">Exemple :<text:span text:style-name="T7"> Rendre irréductible la fraction </text:span><text:span text:style-name="T7"><draw:frame draw:style-name="fr3" draw:name="Objet15" text:anchor-type="as-char" svg:y="-0.891cm" svg:width="1.104cm" svg:height="1.54cm" draw:z-index="16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Exemple :<text:span text:style-name="T7"> Rendre irréductible la fraction </text:span><text:span text:style-name="T7"><draw:frame draw:style-name="fr3" draw:name="Objet16" text:anchor-type="as-char" svg:y="-0.891cm" svg:width="1.064cm" svg:height="1.54cm" draw:z-index="17"><draw:object xlink:href="./Object 16" xlink:type="simple" xlink:show="embed" xlink:actuate="onLoad"/><draw:image xlink:href="./ObjectReplacements/Object 16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5T16:13:46.308000000</meta:creation-date>
    <dc:date>2021-09-05T18:28:11.903000000</dc:date>
    <meta:editing-duration>PT2M28S</meta:editing-duration>
    <meta:editing-cycles>1</meta:editing-cycles>
    <meta:document-statistic meta:table-count="10" meta:image-count="2" meta:object-count="16" meta:page-count="4" meta:paragraph-count="66" meta:word-count="503" meta:character-count="3040" meta:non-whitespace-character-count="2469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i>b</mi>
        <mo stretchy="false">×</mo>
        <mi>k</mi>
      </mrow>
    </mrow>
    <annotation encoding="StarMath 5.0">a= b times k</annotation>
  </semantics>
</math>
</file>

<file path=Object 10/content.xml><?xml version="1.0" encoding="utf-8"?>
<math xmlns="http://www.w3.org/1998/Math/MathML" display="block">
  <semantics>
    <mrow>
      <mn>224</mn>
      <mo stretchy="false">=</mo>
      <mrow>
        <mrow>
          <mn>80</mn>
          <mo stretchy="false">×</mo>
          <mn>2</mn>
        </mrow>
        <mo stretchy="false">+</mo>
        <mn>64</mn>
      </mrow>
    </mrow>
    <annotation encoding="StarMath 5.0">224=80 times 2 + 64</annotation>
  </semantics>
</math>
</file>

<file path=Object 11/content.xml><?xml version="1.0" encoding="utf-8"?>
<math xmlns="http://www.w3.org/1998/Math/MathML" display="block">
  <semantics>
    <mfrac>
      <mn>26</mn>
      <mn>49</mn>
    </mfrac>
    <annotation encoding="StarMath 5.0">26 over 49</annotation>
  </semantics>
</math>
</file>

<file path=Object 12/content.xml><?xml version="1.0" encoding="utf-8"?>
<math xmlns="http://www.w3.org/1998/Math/MathML" display="block">
  <semantics>
    <mfrac>
      <mn>18</mn>
      <mn>45</mn>
    </mfrac>
    <annotation encoding="StarMath 5.0">18 over 45</annotation>
  </semantics>
</math>
</file>

<file path=Object 13/content.xml><?xml version="1.0" encoding="utf-8"?>
<math xmlns="http://www.w3.org/1998/Math/MathML" display="block">
  <semantics>
    <mrow>
      <mi>b</mi>
      <mo stretchy="false">≠</mo>
      <mn>0</mn>
    </mrow>
    <annotation encoding="StarMath 5.0">b  &lt;&gt; 0</annotation>
  </semantics>
</math>
</file>

<file path=Object 14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5/content.xml><?xml version="1.0" encoding="utf-8"?>
<math xmlns="http://www.w3.org/1998/Math/MathML" display="block">
  <semantics>
    <mfrac>
      <mn>312</mn>
      <mn>546</mn>
    </mfrac>
    <annotation encoding="StarMath 5.0">312 over 546</annotation>
  </semantics>
</math>
</file>

<file path=Object 16/content.xml><?xml version="1.0" encoding="utf-8"?>
<math xmlns="http://www.w3.org/1998/Math/MathML" display="block">
  <semantics>
    <mfrac>
      <mn>105</mn>
      <mn>135</mn>
    </mfrac>
    <annotation encoding="StarMath 5.0">105 over 135</annotation>
  </semantics>
</math>
</file>

<file path=Object 2/content.xml><?xml version="1.0" encoding="utf-8"?>
<math xmlns="http://www.w3.org/1998/Math/MathML" display="block">
  <semantics>
    <mrow>
      <mrow>
        <mi>a</mi>
        <mo stretchy="false">÷</mo>
        <mi>b</mi>
      </mrow>
      <mo stretchy="false">=</mo>
      <mi>k</mi>
    </mrow>
    <annotation encoding="StarMath 5.0">a  div b= k 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row>
      <mn>63</mn>
      <mo stretchy="false">=</mo>
      <mrow>
        <mn>7</mn>
        <mo stretchy="false">×</mo>
        <mn>9</mn>
      </mrow>
    </mrow>
    <annotation encoding="StarMath 5.0">63=7 times 9</annotation>
  </semantics>
</math>
</file>

<file path=Object 5/content.xml><?xml version="1.0" encoding="utf-8"?>
<math xmlns="http://www.w3.org/1998/Math/MathML" display="block">
  <semantics>
    <mrow>
      <mi>b</mi>
      <mo stretchy="false">≠</mo>
      <mn>0</mn>
    </mrow>
    <annotation encoding="StarMath 5.0">b  &lt;&gt; 0 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row>
          <mi>b</mi>
          <mo stretchy="false">×</mo>
          <mi>q</mi>
        </mrow>
        <mo stretchy="false">+</mo>
        <mi>r</mi>
      </mrow>
    </mrow>
    <annotation encoding="StarMath 5.0">a= b times q + r</annotation>
  </semantics>
</math>
</file>

<file path=Object 7/content.xml><?xml version="1.0" encoding="utf-8"?>
<math xmlns="http://www.w3.org/1998/Math/MathML" display="block">
  <semantics>
    <mrow>
      <mi>r</mi>
      <mo stretchy="false">&lt;</mo>
      <mi>b</mi>
    </mrow>
    <annotation encoding="StarMath 5.0">r &lt; b</annotation>
  </semantics>
</math>
</file>

<file path=Object 8/content.xml><?xml version="1.0" encoding="utf-8"?>
<math xmlns="http://www.w3.org/1998/Math/MathML" display="block">
  <semantics>
    <mrow>
      <mn>278</mn>
      <mo stretchy="false">=</mo>
      <mrow>
        <mrow>
          <mn>6</mn>
          <mo stretchy="false">×</mo>
          <mn>45</mn>
        </mrow>
        <mo stretchy="false">+</mo>
        <mn>8</mn>
      </mrow>
    </mrow>
    <annotation encoding="StarMath 5.0">278= 6 times 45 +8</annotation>
  </semantics>
</math>
</file>

<file path=Object 9/content.xml><?xml version="1.0" encoding="utf-8"?>
<math xmlns="http://www.w3.org/1998/Math/MathML" display="block">
  <semantics>
    <mrow>
      <mn>85</mn>
      <mo stretchy="false">=</mo>
      <mrow>
        <mn>17</mn>
        <mo stretchy="false">×</mo>
        <mn>5</mn>
      </mrow>
    </mrow>
    <annotation encoding="StarMath 5.0">85=17 times 5</annotation>
  </semantics>
</math>
</file>