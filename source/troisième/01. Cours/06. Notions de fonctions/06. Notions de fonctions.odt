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36600000098A955C361106D542A.png" manifest:media-type="image/png"/>
  <manifest:file-entry manifest:full-path="Pictures/1000020100000352000000EDB41A2B73361ACD3E.png" manifest:media-type="image/png"/>
  <manifest:file-entry manifest:full-path="Pictures/10000201000001E800000270A636E29B63B2D84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7cm" style:rel-column-width="6553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J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OpenDyslexic"/>
    </style:style>
    <style:style style:name="P2" style:family="paragraph" style:parent-style-name="Standard" style:list-style-name="L1">
      <style:text-properties style:font-name="OpenDyslexic" style:text-underline-style="solid" style:text-underline-width="auto" style:text-underline-color="font-color" officeooo:rsid="000dd66e" officeooo:paragraph-rsid="000dd66e"/>
    </style:style>
    <style:style style:name="P3" style:family="paragraph" style:parent-style-name="Standard">
      <style:text-properties style:font-name="OpenDyslexic" style:text-underline-style="solid" style:text-underline-width="auto" style:text-underline-color="font-color" officeooo:rsid="000dd66e" officeooo:paragraph-rsid="000dd66e"/>
    </style:style>
    <style:style style:name="P4" style:family="paragraph" style:parent-style-name="Standard">
      <style:text-properties style:font-name="OpenDyslexic" style:text-underline-style="solid" style:text-underline-width="auto" style:text-underline-color="font-color" officeooo:rsid="000e2970" officeooo:paragraph-rsid="000e2970"/>
    </style:style>
    <style:style style:name="P5" style:family="paragraph" style:parent-style-name="Standard" style:list-style-name="L3">
      <style:text-properties style:font-name="OpenDyslexic" style:text-underline-style="solid" style:text-underline-width="auto" style:text-underline-color="font-color" officeooo:rsid="000e2970" officeooo:paragraph-rsid="000e2970"/>
    </style:style>
    <style:style style:name="P6" style:family="paragraph" style:parent-style-name="Standard">
      <style:text-properties style:font-name="OpenDyslexic" style:text-underline-style="solid" style:text-underline-width="auto" style:text-underline-color="font-color" officeooo:rsid="000ed497" officeooo:paragraph-rsid="000ed497"/>
    </style:style>
    <style:style style:name="P7" style:family="paragraph" style:parent-style-name="Standard">
      <style:text-properties style:font-name="OpenDyslexic" style:text-underline-style="solid" style:text-underline-width="auto" style:text-underline-color="font-color" officeooo:rsid="0010b168" officeooo:paragraph-rsid="0010b168"/>
    </style:style>
    <style:style style:name="P8" style:family="paragraph" style:parent-style-name="Standard">
      <style:text-properties style:font-name="OpenDyslexic" style:text-underline-style="none" officeooo:rsid="000dd66e" officeooo:paragraph-rsid="000dd66e"/>
    </style:style>
    <style:style style:name="P9" style:family="paragraph" style:parent-style-name="Standard">
      <style:text-properties style:font-name="OpenDyslexic" style:text-underline-style="none" officeooo:rsid="000e2970" officeooo:paragraph-rsid="000e2970"/>
    </style:style>
    <style:style style:name="P10" style:family="paragraph" style:parent-style-name="Standard">
      <style:text-properties style:font-name="OpenDyslexic" fo:font-style="normal" style:text-underline-style="none" officeooo:rsid="000ed497" officeooo:paragraph-rsid="000ed497" style:font-style-asian="normal" style:font-style-complex="normal"/>
    </style:style>
    <style:style style:name="P11" style:family="paragraph" style:parent-style-name="Standard">
      <style:text-properties style:font-name="OpenDyslexic" fo:font-style="normal" style:text-underline-style="none" officeooo:rsid="0010b168" officeooo:paragraph-rsid="0010b168" style:font-style-asian="normal" style:font-style-complex="normal"/>
    </style:style>
    <style:style style:name="P12" style:family="paragraph" style:parent-style-name="Table_20_Contents">
      <style:text-properties style:font-name="OpenDyslexic" officeooo:rsid="000dd66e" officeooo:paragraph-rsid="000dd66e"/>
    </style:style>
    <style:style style:name="P13" style:family="paragraph" style:parent-style-name="Table_20_Contents">
      <style:text-properties style:font-name="OpenDyslexic" style:text-underline-style="solid" style:text-underline-width="auto" style:text-underline-color="font-color" officeooo:rsid="000dd66e" officeooo:paragraph-rsid="000dd66e"/>
    </style:style>
    <style:style style:name="P14" style:family="paragraph" style:parent-style-name="Table_20_Contents">
      <style:text-properties style:font-name="OpenDyslexic" style:text-underline-style="solid" style:text-underline-width="auto" style:text-underline-color="font-color" officeooo:rsid="000e2970" officeooo:paragraph-rsid="000e2970"/>
    </style:style>
    <style:style style:name="P15" style:family="paragraph" style:parent-style-name="Table_20_Contents" style:list-style-name="L2">
      <style:text-properties style:font-name="OpenDyslexic" style:text-underline-style="solid" style:text-underline-width="auto" style:text-underline-color="font-color" officeooo:rsid="000e2970" officeooo:paragraph-rsid="000e2970"/>
    </style:style>
    <style:style style:name="P16" style:family="paragraph" style:parent-style-name="Table_20_Contents">
      <style:text-properties style:font-name="OpenDyslexic" style:text-underline-style="solid" style:text-underline-width="auto" style:text-underline-color="font-color" officeooo:rsid="000ed497" officeooo:paragraph-rsid="000ed497"/>
    </style:style>
    <style:style style:name="P17" style:family="paragraph" style:parent-style-name="Table_20_Contents">
      <style:text-properties style:font-name="OpenDyslexic" style:text-underline-style="solid" style:text-underline-width="auto" style:text-underline-color="font-color" officeooo:rsid="0010b168" officeooo:paragraph-rsid="0010b168"/>
    </style:style>
    <style:style style:name="P18" style:family="paragraph" style:parent-style-name="Table_20_Contents">
      <style:text-properties style:font-name="OpenDyslexic" style:text-underline-style="none" officeooo:rsid="000ed497" officeooo:paragraph-rsid="000ed497"/>
    </style:style>
    <style:style style:name="P19" style:family="paragraph" style:parent-style-name="Table_20_Contents">
      <style:text-properties style:font-name="OpenDyslexic" style:text-underline-style="none" officeooo:rsid="0010b168" officeooo:paragraph-rsid="0010b168"/>
    </style:style>
    <style:style style:name="P20" style:family="paragraph" style:parent-style-name="Table_20_Contents">
      <style:paragraph-properties fo:text-align="center" style:justify-single-word="false"/>
      <style:text-properties style:font-name="OpenDyslexic"/>
    </style:style>
    <style:style style:name="P21" style:family="paragraph" style:parent-style-name="Table_20_Contents">
      <style:paragraph-properties fo:text-align="center" style:justify-single-word="false"/>
      <style:text-properties style:font-name="OpenDyslexic" fo:font-style="italic" officeooo:rsid="000ed497" officeooo:paragraph-rsid="000ed497" style:font-style-asian="italic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style:font-name="OpenDyslexic" officeooo:rsid="000ed497" officeooo:paragraph-rsid="000ed49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ed497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fo:color="#ffffff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0ed49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2">Collège A.Lejeune <text:s text:c="62"/>3ème</text:p>
            <text:p text:style-name="P12">Cours <text:s text:c="29"/>Chapitre 4 : Notion de fonction</text:p>
          </table:table-cell>
        </table:table-row>
      </table:table>
      <text:p text:style-name="P1"/>
      <text:list xml:id="list198938101" text:style-name="L1">
        <text:list-item>
          <text:p text:style-name="P2">Généralités</text:p>
          <text:list>
            <text:list-item>
              <text:p text:style-name="P2">Notion de fonction</text:p>
            </text:list-item>
          </text:list>
        </text:list-item>
      </text:list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3">Définition :</text:p>
            <text:p text:style-name="P12">Une fonction est un procédé qui, à un nombre, associe un unique nombre.</text:p>
          </table:table-cell>
        </table:table-row>
      </table:table>
      <text:p text:style-name="P3"/>
      <text:p text:style-name="P3">Remarque :</text:p>
      <text:p text:style-name="P8">On utilise la notation : <draw:frame draw:style-name="fr4" draw:name="Objet1" text:anchor-type="as-char" svg:y="-0.527cm" svg:width="2.148cm" svg:height="0.739cm" draw:z-index="0"><draw:object xlink:href="./Object 1" xlink:type="simple" xlink:show="embed" xlink:actuate="onLoad"/><draw:image xlink:href="./ObjectReplacements/Object 1" xlink:type="simple" xlink:show="embed" xlink:actuate="onLoad"/></draw:frame><text:s/>qui se lit « <text:span text:style-name="T1">f</text:span><text:span text:style-name="T4"> est la fonction qui, à </text:span><text:span text:style-name="T1">x</text:span><text:span text:style-name="T4"> associe le nombre </text:span><text:span text:style-name="T1">f(x) </text:span><text:span text:style-name="T4">».</text:span></text:p>
      <text:p text:style-name="P8"><text:span text:style-name="T4"/></text:p>
      <text:p text:style-name="P3"><text:span text:style-name="T4">Exemple :</text:span></text:p>
      <text:p text:style-name="P8"><text:span text:style-name="T4">a. Détermine la fonction </text:span><text:span text:style-name="T1">g</text:span><text:span text:style-name="T4"> qui, à la longueur </text:span><text:span text:style-name="T1">x</text:span><text:span text:style-name="T4"> d’une arrête d’un cube, associe le périmètre d’une face de ce cube.</text:span></text:p>
      <text:p text:style-name="P8"><text:span text:style-name="T4">b. Détermine la fonction </text:span><text:span text:style-name="T1">h</text:span><text:span text:style-name="T4"> qui, à la longueur </text:span><text:span text:style-name="T1">x</text:span><text:span text:style-name="T4"> d’une arrête d’un cube, associe le volume de ce cube.</text:span></text:p>
      <text:p text:style-name="P8"><draw:frame draw:style-name="fr1" draw:name="Image1" text:anchor-type="paragraph" svg:width="17cm" svg:height="2.969cm" draw:z-index="1"><draw:image xlink:href="Pictures/100002010000036600000098A955C361106D542A.png" xlink:type="simple" xlink:show="embed" xlink:actuate="onLoad" loext:mime-type="image/png"/></draw:frame><text:span text:style-name="T4"/></text:p>
      <text:list xml:id="list220248762325131" text:continue-numbering="true" text:style-name="L1">
        <text:list-item>
          <text:list>
            <text:list-item>
              <text:p text:style-name="P2">Images et antécédents</text:p>
            </text:list-item>
          </text:list>
        </text:list-item>
      </text:list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4">Définitions :</text:p>
            <text:p text:style-name="P14"><text:span text:style-name="T6">Soit </text:span><text:span text:style-name="T2">f</text:span><text:span text:style-name="T6"> une fonction.</text:span></text:p>
            <text:p text:style-name="P14"><text:span text:style-name="T6">Si </text:span><text:span text:style-name="T2">f(a)=b</text:span><text:span text:style-name="T6"> alors on dit que :</text:span></text:p>
            <text:list xml:id="list5217331" text:style-name="L2">
              <text:list-item>
                <text:p text:style-name="P15"><text:span text:style-name="T6">b est l’</text:span><text:span text:style-name="T7">image</text:span><text:span text:style-name="T8"> de a par </text:span><text:span text:style-name="T3">f</text:span><text:span text:style-name="T8"> <text:s text:c="9"/>L’image d’un nombre est unique.</text:span></text:p>
              </text:list-item>
              <text:list-item>
                <text:p text:style-name="P15"><text:span text:style-name="T8">A est un antécédent de b par </text:span><text:span text:style-name="T3">f</text:span><text:span text:style-name="T8">. <text:s/>Un nombre </text:span><text:span text:style-name="T3">b </text:span><text:span text:style-name="T8">peut avoir plusieurs <text:s text:c="92"/></text:span><text:span text:style-name="T10">vvvvvvvvvvvvvvvvvvvvvvvvvvvvvvvvvvvvvvvvvb</text:span><text:span text:style-name="T8">antécédents.</text:span></text:p>
              </text:list-item>
            </text:list>
          </table:table-cell>
        </table:table-row>
      </table:table>
      <text:p text:style-name="P3"/>
      <text:p text:style-name="P4">Exemple 1 :<text:span text:style-name="T9"> Soit </text:span><text:span text:style-name="T2">f</text:span><text:span text:style-name="T6"> une fonction telle que </text:span><text:span text:style-name="T2">f(-2)=0</text:span><text:span text:style-name="T6">. Traduis cette égalité par deux phrases.</text:span></text:p>
      <text:list xml:id="list3821315483" text:style-name="L3">
        <text:list-item>
          <text:p text:style-name="P5"><text:span text:style-name="T6">0 est ………………………………. de -2 par la fonction </text:span><text:span text:style-name="T2">f</text:span><text:span text:style-name="T6">.</text:span></text:p>
        </text:list-item>
        <text:list-item>
          <text:p text:style-name="P5"><text:soft-page-break/><text:span text:style-name="T6">-2 est ……………………………… du nombre 0 par la fonction </text:span><text:span text:style-name="T2">f</text:span><text:span text:style-name="T6">.</text:span></text:p>
        </text:list-item>
      </text:list>
      <text:p text:style-name="P4"><text:span text:style-name="T6"/></text:p>
      <text:p text:style-name="P4"><text:span text:style-name="T4">Exemple 2 :</text:span></text:p>
      <text:p text:style-name="P9"><text:span text:style-name="T4">Soit la fonction </text:span><text:span text:style-name="T4"><draw:frame draw:style-name="fr4" draw:name="Objet2" text:anchor-type="as-char" svg:y="-0.57cm" svg:width="2.381cm" svg:height="0.781cm" draw:z-index="2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4">.</text:span></text:p>
      <text:p text:style-name="P9"><draw:frame draw:style-name="fr2" draw:name="Image2" text:anchor-type="paragraph" svg:x="-1.094cm" svg:y="0.855cm" svg:width="18.54cm" svg:height="4.74cm" draw:z-index="3"><draw:image xlink:href="Pictures/1000020100000352000000EDB41A2B73361ACD3E.png" xlink:type="simple" xlink:show="embed" xlink:actuate="onLoad" loext:mime-type="image/png"/></draw:frame><text:span text:style-name="T4">Détermine l’image de - 5 puis celle de 5 par </text:span><text:span text:style-name="T1">f</text:span><text:span text:style-name="T4">. Que remarques-</text:span><text:span text:style-name="T5">tu ?</text:span></text:p>
      <text:p text:style-name="P9"><text:span text:style-name="T5"/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6">Définition :</text:p>
            <text:p text:style-name="P18">Les images respectives par la fonction <text:span text:style-name="T1">f</text:span><text:span text:style-name="T4"> de certaines valeurs de </text:span><text:span text:style-name="T1">x</text:span><text:span text:style-name="T4"> peuvent être présentées dans un tableau appelé tableau de valeurs.</text:span></text:p>
          </table:table-cell>
        </table:table-row>
      </table:table>
      <text:p text:style-name="P9"><text:span text:style-name="T5"/></text:p>
      <text:p text:style-name="P6"><text:span text:style-name="T4">Exemple 3 :</text:span></text:p>
      <text:p text:style-name="P10">Voici un tableau de valeurs de la fonction <draw:frame draw:style-name="fr4" draw:name="Objet3" text:anchor-type="as-char" svg:y="-0.57cm" svg:width="2.381cm" svg:height="0.781cm" draw:z-index="4"><draw:object xlink:href="./Object 3" xlink:type="simple" xlink:show="embed" xlink:actuate="onLoad"/><draw:image xlink:href="./ObjectReplacements/Object 3" xlink:type="simple" xlink:show="embed" xlink:actuate="onLoad"/><svg:desc>formule</svg:desc></draw:frame>.</text:p>
      <table:table table:name="Tableau5" table:style-name="Tableau5">
        <table:table-column table:style-name="Tableau5.A" table:number-columns-repeated="10"/>
        <table:table-row>
          <table:table-cell table:style-name="Tableau5.A1" office:value-type="string">
            <text:p text:style-name="P21">x</text:p>
          </table:table-cell>
          <table:table-cell table:style-name="Tableau5.A1" office:value-type="string">
            <text:p text:style-name="P20">-<text:span text:style-name="T11">4</text:span></text:p>
          </table:table-cell>
          <table:table-cell table:style-name="Tableau5.A1" office:value-type="string">
            <text:p text:style-name="P20">-<text:span text:style-name="T11">3</text:span></text:p>
          </table:table-cell>
          <table:table-cell table:style-name="Tableau5.A1" office:value-type="string">
            <text:p text:style-name="P20">-<text:span text:style-name="T11">2</text:span></text:p>
          </table:table-cell>
          <table:table-cell table:style-name="Tableau5.A1" office:value-type="string">
            <text:p text:style-name="P20">-<text:span text:style-name="T11">1</text:span></text:p>
          </table:table-cell>
          <table:table-cell table:style-name="Tableau5.A1" office:value-type="string">
            <text:p text:style-name="P22">0</text:p>
          </table:table-cell>
          <table:table-cell table:style-name="Tableau5.A1" office:value-type="string">
            <text:p text:style-name="P22">1</text:p>
          </table:table-cell>
          <table:table-cell table:style-name="Tableau5.A1" office:value-type="string">
            <text:p text:style-name="P22">2</text:p>
          </table:table-cell>
          <table:table-cell table:style-name="Tableau5.A1" office:value-type="string">
            <text:p text:style-name="P22">3</text:p>
          </table:table-cell>
          <table:table-cell table:style-name="Tableau5.J1" office:value-type="string">
            <text:p text:style-name="P22">4</text:p>
          </table:table-cell>
        </table:table-row>
        <table:table-row>
          <table:table-cell table:style-name="Tableau5.A2" office:value-type="string">
            <text:p text:style-name="P22">f(x)</text:p>
          </table:table-cell>
          <table:table-cell table:style-name="Tableau5.A2" office:value-type="string">
            <text:p text:style-name="P22">12</text:p>
          </table:table-cell>
          <table:table-cell table:style-name="Tableau5.A2" office:value-type="string">
            <text:p text:style-name="P22">5</text:p>
          </table:table-cell>
          <table:table-cell table:style-name="Tableau5.A2" office:value-type="string">
            <text:p text:style-name="P22">0</text:p>
          </table:table-cell>
          <table:table-cell table:style-name="Tableau5.A2" office:value-type="string">
            <text:p text:style-name="P20">-<text:span text:style-name="T11">3</text:span></text:p>
          </table:table-cell>
          <table:table-cell table:style-name="Tableau5.A2" office:value-type="string">
            <text:p text:style-name="P20">-<text:span text:style-name="T11">4</text:span></text:p>
          </table:table-cell>
          <table:table-cell table:style-name="Tableau5.A2" office:value-type="string">
            <text:p text:style-name="P20">-<text:span text:style-name="T11">3</text:span></text:p>
          </table:table-cell>
          <table:table-cell table:style-name="Tableau5.A2" office:value-type="string">
            <text:p text:style-name="P22">0</text:p>
          </table:table-cell>
          <table:table-cell table:style-name="Tableau5.A2" office:value-type="string">
            <text:p text:style-name="P22">5</text:p>
          </table:table-cell>
          <table:table-cell table:style-name="Tableau5.J2" office:value-type="string">
            <text:p text:style-name="P22">12</text:p>
          </table:table-cell>
        </table:table-row>
      </table:table>
      <text:p text:style-name="P11">a. Détermine l’image de 0 par la fonction <text:span text:style-name="T1">f</text:span>.</text:p>
      <text:p text:style-name="P11">b. Détermine le(s) antécédent(s) de 5 par la fonction <text:span text:style-name="T1">f</text:span>.</text:p>
      <text:p text:style-name="P11"><draw:frame draw:style-name="fr2" draw:name="Image3" text:anchor-type="paragraph" svg:x="-1.094cm" svg:y="0.855cm" svg:width="18.54cm" svg:height="4.74cm" draw:z-index="5"><draw:image xlink:href="Pictures/1000020100000352000000EDB41A2B73361ACD3E.png" xlink:type="simple" xlink:show="embed" xlink:actuate="onLoad" loext:mime-type="image/png"/></draw:frame></text:p>
      <text:list xml:id="list220250371258345" text:continue-list="list220248762325131" text:style-name="L1">
        <text:list-item>
          <text:p text:style-name="P2">Représentation graphique</text:p>
        </text:list-item>
      </text:list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7">Définition :</text:p>
            <text:p text:style-name="P19">La représentation graphique d’une fonction <text:span text:style-name="T1">f</text:span><text:span text:style-name="T4"> est la courbe constituée de </text:span><text:soft-page-break/><text:span text:style-name="T4">l’ensemble des points de coordonnées </text:span><text:span text:style-name="T4"><draw:frame draw:style-name="fr4" draw:name="Objet4" text:anchor-type="as-char" svg:y="-0.527cm" svg:width="1.896cm" svg:height="0.739cm" draw:z-index="6"><draw:object xlink:href="./Object 4" xlink:type="simple" xlink:show="embed" xlink:actuate="onLoad"/><draw:image xlink:href="./ObjectReplacements/Object 4" xlink:type="simple" xlink:show="embed" xlink:actuate="onLoad"/></draw:frame></text:span><text:span text:style-name="T4">.</text:span></text:p>
          </table:table-cell>
        </table:table-row>
      </table:table>
      <text:p text:style-name="P7"/>
      <text:p text:style-name="P7">Exemple :<text:span text:style-name="T9"> Le graphique ci-dessous représente la fonction </text:span><text:span text:style-name="T9"><draw:frame draw:style-name="fr4" draw:name="Objet5" text:anchor-type="as-char" svg:y="-0.57cm" svg:width="2.381cm" svg:height="0.781cm" draw:z-index="7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9">.</text:span></text:p>
      <text:p text:style-name="P7"><text:span text:style-name="T9">a. Détermine graphiquement l’image de 1,5 par la fonction f.</text:span></text:p>
      <text:p text:style-name="P7"><text:span text:style-name="T9">b. Détermine graphiquement le (les) antécédent(s) de -3 par la fonction f.</text:span></text:p>
      <text:p text:style-name="P7"><draw:frame draw:style-name="fr3" draw:name="Image4" text:anchor-type="paragraph" svg:width="12.913cm" svg:height="16.512cm" draw:z-index="8"><draw:image xlink:href="Pictures/10000201000001E800000270A636E29B63B2D846.png" xlink:type="simple" xlink:show="embed" xlink:actuate="onLoad" loext:mime-type="image/png"/></draw:frame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6T21:22:27.461000000</meta:creation-date>
    <dc:date>2021-11-16T22:02:48.509000000</dc:date>
    <meta:editing-duration>PT7M29S</meta:editing-duration>
    <meta:editing-cycles>1</meta:editing-cycles>
    <meta:document-statistic meta:table-count="6" meta:image-count="4" meta:object-count="5" meta:page-count="3" meta:paragraph-count="55" meta:word-count="330" meta:character-count="1910" meta:non-whitespace-character-count="1449"/>
    <meta:generator>LibreOffice/6.2.3.2$Windows_X86_64 LibreOffice_project/aecc05fe267cc68dde00352a451aa867b3b546ac</meta:generator>
  </office:meta>
</office:document-meta>
</file>

<file path=Object 1/content.xml><?xml version="1.0" encoding="utf-8"?>
<math xmlns="http://www.w3.org/1998/Math/MathML" display="block">
  <semantics>
    <mrow>
      <mi>f</mi>
      <mi mathvariant="normal">:</mi>
      <mrow>
        <mi>x</mi>
        <mo stretchy="false">→</mo>
        <mi>f</mi>
      </mrow>
      <mrow>
        <mo fence="true" stretchy="false">(</mo>
        <mrow>
          <mi>x</mi>
        </mrow>
        <mo fence="true" stretchy="false">)</mo>
      </mrow>
    </mrow>
    <annotation encoding="StarMath 5.0">f: x  toward f( x ) </annotation>
  </semantics>
</math>
</file>

<file path=Object 2/content.xml><?xml version="1.0" encoding="utf-8"?>
<math xmlns="http://www.w3.org/1998/Math/MathML" display="block">
  <semantics>
    <mrow>
      <mi>f</mi>
      <mi mathvariant="normal">:</mi>
      <mrow>
        <mi>x</mi>
        <mo stretchy="false">→</mo>
        <mrow>
          <msup>
            <mi>x</mi>
            <mn>2</mn>
          </msup>
          <mo stretchy="false">−</mo>
          <mn>4</mn>
        </mrow>
      </mrow>
    </mrow>
    <annotation encoding="StarMath 5.0">f: x  toward x^2 - 4</annotation>
  </semantics>
</math>
</file>

<file path=Object 3/content.xml><?xml version="1.0" encoding="utf-8"?>
<math xmlns="http://www.w3.org/1998/Math/MathML" display="block">
  <semantics>
    <mrow>
      <mi>f</mi>
      <mi mathvariant="normal">:</mi>
      <mrow>
        <mi>x</mi>
        <mo stretchy="false">→</mo>
        <mrow>
          <msup>
            <mi>x</mi>
            <mn>2</mn>
          </msup>
          <mo stretchy="false">−</mo>
          <mn>4</mn>
        </mrow>
      </mrow>
    </mrow>
    <annotation encoding="StarMath 5.0">f: x  toward x^2 - 4</annotation>
  </semantics>
</math>
</file>

<file path=Object 4/content.xml><?xml version="1.0" encoding="utf-8"?>
<math xmlns="http://www.w3.org/1998/Math/MathML" display="block">
  <semantics>
    <mrow>
      <mo fence="true" stretchy="false">(</mo>
      <mrow>
        <mrow>
          <mi>x</mi>
          <mi>;</mi>
          <mi>f</mi>
          <mrow>
            <mo fence="true" stretchy="false">(</mo>
            <mrow>
              <mi>x</mi>
            </mrow>
            <mo fence="true" stretchy="false">)</mo>
          </mrow>
        </mrow>
      </mrow>
      <mo fence="true" stretchy="false">)</mo>
    </mrow>
    <annotation encoding="StarMath 5.0">( x;f(x) )</annotation>
  </semantics>
</math>
</file>

<file path=Object 5/content.xml><?xml version="1.0" encoding="utf-8"?>
<math xmlns="http://www.w3.org/1998/Math/MathML" display="block">
  <semantics>
    <mrow>
      <mi>f</mi>
      <mi mathvariant="normal">:</mi>
      <mrow>
        <mi>x</mi>
        <mo stretchy="false">→</mo>
        <mrow>
          <msup>
            <mi>x</mi>
            <mn>2</mn>
          </msup>
          <mo stretchy="false">−</mo>
          <mn>4</mn>
        </mrow>
      </mrow>
    </mrow>
    <annotation encoding="StarMath 5.0">f: x  toward x^2 - 4</annotation>
  </semantics>
</math>
</file>