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png" manifest:media-type="image/png"/>
  <manifest:file-entry manifest:full-path="media/image7.jpg" manifest:media-type="image/jpeg"/>
  <manifest:file-entry manifest:full-path="media/image1.png" manifest:media-type="image/png"/>
  <manifest:file-entry manifest:full-path="media/image6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Policepardéfaut" style:family="text">
      <style:text-properties style:language-asian="fr" style:country-asian="FR" style:language-complex="ar" style:country-complex="SA"/>
    </style:style>
    <style:style style:name="P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4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5" style:parent-style-name="Policepardéfaut" style:family="text">
      <style:text-properties style:language-asian="fr" style:country-asian="FR" style:language-complex="ar" style:country-complex="SA"/>
    </style:style>
    <style:style style:name="T6" style:parent-style-name="Policepardéfaut" style:family="text">
      <style:text-properties style:language-asian="fr" style:country-asian="FR" style:language-complex="ar" style:country-complex="SA"/>
    </style:style>
    <style:style style:name="T7" style:parent-style-name="Policepardéfaut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8" style:parent-style-name="Policepardéfaut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9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10" style:parent-style-name="Policepardéfaut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1" style:parent-style-name="Policepardéfaut" style:family="text">
      <style:text-properties style:language-asian="fr" style:country-asian="FR" style:language-complex="ar" style:country-complex="SA"/>
    </style:style>
    <style:style style:name="P12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3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4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5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6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7" style:parent-style-name="Policepardéfaut" style:family="text">
      <style:text-properties style:language-asian="fr" style:country-asian="FR" style:language-complex="ar" style:country-complex="SA"/>
    </style:style>
    <style:style style:name="T18" style:parent-style-name="Policepardéfaut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9" style:parent-style-name="Policepardéfaut" style:family="text">
      <style:text-properties style:language-asian="fr" style:country-asian="FR" style:language-complex="ar" style:country-complex="SA"/>
    </style:style>
    <style:style style:name="P20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1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2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3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4" style:parent-style-name="Policepardéfaut" style:family="text">
      <style:text-properties style:language-asian="fr" style:country-asian="FR" style:language-complex="ar" style:country-complex="SA"/>
    </style:style>
    <style:style style:name="P25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6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7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8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9" style:parent-style-name="Policepardéfaut" style:family="text">
      <style:text-properties style:language-asian="fr" style:country-asian="FR" style:language-complex="ar" style:country-complex="SA"/>
    </style:style>
    <style:style style:family="graphic" style:name="a6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<draw:frame draw:z-index="7" draw:style-name="a0" draw:name="Image8" text:anchor-type="paragraph" svg:x="-0.18819in" svg:y="-0.17008in" svg:width="3.43976in" svg:height="1.11181in" style:rel-width="scale" style:rel-height="scale"><draw:image xlink:href="media/image1.png" xlink:type="simple" xlink:show="embed" xlink:actuate="onLoad"/><svg:title/><svg:desc/></draw:frame></text:span></text:p>
      <text:p text:style-name="P3"/>
      <text:p text:style-name="Standard"><text:span text:style-name="T4"><text:tab/></text:span><text:tab/><text:tab/><text:tab/><text:tab/><text:tab/><text:tab/><text:tab/><text:tab/></text:p>
      <text:p text:style-name="Standard"/>
      <text:p text:style-name="Standard"><text:span text:style-name="T5"><draw:frame draw:z-index="251658240" draw:style-name="a1" draw:name="Image1" text:anchor-type="paragraph" svg:x="0.98189in" svg:y="0.17638in" svg:width="5.6311in" svg:height="2.19803in" style:rel-width="scale" style:rel-height="scale"><draw:image xlink:href="media/image2.png" xlink:type="simple" xlink:show="embed" xlink:actuate="onLoad"/><svg:title/><svg:desc/></draw:frame></text:span></text:p>
      <text:p text:style-name="Standard"><text:tab/><text:tab/><text:tab/><text:tab/><text:tab/></text:p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6"><draw:frame draw:z-index="251659264" draw:style-name="a2" draw:name="Image2" text:anchor-type="paragraph" svg:x="-0.04724in" svg:y="0.46654in" svg:width="7.40157in" svg:height="1.34921in" style:rel-width="scale" style:rel-height="scale"><draw:image xlink:href="media/image3.png" xlink:type="simple" xlink:show="embed" xlink:actuate="onLoad"/><svg:title/><svg:desc/></draw:frame></text:span></text:p>
      <text:p text:style-name="Standard"><text:span text:style-name="T7">ÉNIGME</text:span><text:span text:style-name="T8"><text:s/>1 </text:span><text:span text:style-name="T9">:</text:span></text:p>
      <text:p text:style-name="Standard"/>
      <text:p text:style-name="Standard"/>
      <text:p text:style-name="Standard"><text:span text:style-name="T10">ÉNIGME 2 </text:span>:</text:p>
      <text:p text:style-name="Standard"><text:span text:style-name="T11"><draw:frame draw:z-index="2" draw:style-name="a3" draw:name="Image3" text:anchor-type="paragraph" svg:x="3.66654in" svg:y="0.11024in" svg:width="3.1563in" svg:height="2.25in" style:rel-width="scale" style:rel-height="scale"><draw:image xlink:href="media/image4.png" xlink:type="simple" xlink:show="embed" xlink:actuate="onLoad"/><svg:title/><svg:desc/></draw:frame></text:span></text:p>
      <text:p text:style-name="Standard">Quel est le poids des trois animaux réunis ?<text:tab/></text:p>
      <text:p text:style-name="Standard"/>
      <text:p text:style-name="Standard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Standard"/>
      <text:p text:style-name="P12"/>
      <text:p text:style-name="P13"/>
      <text:p text:style-name="P14"/>
      <text:p text:style-name="P15"/>
      <text:p text:style-name="P16">ÉNIGME<text:s/>3 :</text:p>
      <text:p text:style-name="Standard">Un élève veut déplacer quatre allumettes<text:span text:style-name="T17"><draw:frame draw:z-index="3" draw:style-name="a4" draw:name="Image4" text:anchor-type="paragraph" svg:x="4.21181in" svg:y="0.16614in" svg:width="2.6374in" svg:height="1.49173in" style:rel-width="scale" style:rel-height="scale"><draw:image xlink:href="media/image5.png" xlink:type="simple" xlink:show="embed" xlink:actuate="onLoad"/><svg:title/><svg:desc/></draw:frame></text:span></text:p>
      <text:p text:style-name="Standard"><text:s/>pour former cinq triangles. Comment doit-il s’y prendre ?</text:p>
      <text:p text:style-name="Standard"/>
      <text:p text:style-name="Standard"/>
      <text:p text:style-name="Standard"><text:tab/><text:tab/><text:tab/><text:tab/><text:tab/><text:tab/><text:tab/><text:tab/><text:tab/><text:tab/><text:tab/><text:tab/><text:tab/><text:tab/></text:p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text:span text:style-name="T18">ÉNIGME 4 :</text:span><text:s/><text:span text:style-name="T19"><draw:frame draw:z-index="6" draw:style-name="a5" draw:name="Image7" text:anchor-type="paragraph" svg:x="5.01654in" svg:y="0.13543in" svg:width="2.42913in" svg:height="1.66811in" style:rel-width="scale" style:rel-height="scale"><draw:image xlink:href="media/image6.png" xlink:type="simple" xlink:show="embed" xlink:actuate="onLoad"/><svg:title/><svg:desc/></draw:frame></text:span></text:p>
      <text:p text:style-name="Standard">Une sorcière mange 5 crapauds chaque jour sauf les jours où elle regarde la télé. Elle en mange alors 10.</text:p>
      <text:p text:style-name="Standard">En 9 jours,<text:s/>elle a mangé 60 crapauds. Combien de jours a t-elle regardé la télé ?</text:p>
      <text:p text:style-name="Standard"/>
      <text:p text:style-name="Standard"/>
      <text:p text:style-name="P20"/>
      <text:p text:style-name="P21"/>
      <text:p text:style-name="P22"/>
      <text:p text:style-name="P23">ÉNIGME 5 :</text:p>
      <text:p text:style-name="Standard">Pierre a défait son puzzle préféré. Il veut le refaire, mais pour ne rien arranger, sa petite sœur a rajouté des morceaux inutiles.</text:p>
      <text:p text:style-name="Standard">Aide le à retrouver les t<text:span text:style-name="T24"><draw:frame draw:z-index="4" draw:style-name="a6" draw:name="Image5" text:anchor-type="paragraph" svg:x="1.56102in" svg:y="0.36535in" svg:width="4.18543in" svg:height="3.27283in" style:rel-width="scale" style:rel-height="scale"><draw:image xlink:href="media/image7.jpg" xlink:type="simple" xlink:show="embed" xlink:actuate="onLoad"/><svg:title/><svg:desc/></draw:frame></text:span>rois éléments pour reconstituer son puzzle.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5"/>
      <text:p text:style-name="P26"/>
      <text:p text:style-name="P27"/>
      <text:p text:style-name="P28">ÉNIGME COMMUNE A TOUS LES ÉLÈVES :</text:p>
      <text:p text:style-name="Standard"><text:span text:style-name="T29"><draw:frame draw:z-index="5" draw:style-name="a7" draw:name="Image6" text:anchor-type="paragraph" svg:x="0.0437in" svg:y="0.1126in" svg:width="7.40157in" svg:height="2.38189in" style:rel-width="scale" style:rel-height="scale"><draw:image xlink:href="media/image8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3152in" fo:margin-left="0.4333in" fo:margin-bottom="0.2756in" fo:margin-right="0.433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Bastien PONSARD</meta:initial-creator>
    <dc:creator>Bastien PONSARD</dc:creator>
    <meta:creation-date>2022-03-06T14:19:00Z</meta:creation-date>
    <dc:date>2022-03-06T19:29:00Z</dc:date>
    <meta:template xlink:href="Normal.dotm" xlink:type="simple"/>
    <meta:editing-cycles>1</meta:editing-cycles>
    <meta:editing-duration>PT1800S</meta:editing-duration>
    <meta:document-statistic meta:page-count="2" meta:paragraph-count="1" meta:word-count="131" meta:character-count="854" meta:row-count="6" meta:non-whitespace-character-count="724"/>
  </office:meta>
</office:document-meta>
</file>